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7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fo:color="#ff0000" style:font-name="Liberation Sans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ext-properties style:use-window-font-color="true" style:font-name="Liberation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-40°F</text:p>
          </table:table-cell>
          <table:table-cell office:value-type="string" calcext:value-type="string">
            <text:p>-40.000°C</text:p>
          </table:table-cell>
          <table:table-cell office:value-type="string" calcext:value-type="string">
            <text:p>239686.000 Ω</text:p>
          </table:table-cell>
          <table:table-cell office:value-type="string" calcext:value-type="string">
            <text:p>73°F</text:p>
          </table:table-cell>
          <table:table-cell office:value-type="string" calcext:value-type="string">
            <text:p>22.778°C</text:p>
          </table:table-cell>
          <table:table-cell office:value-type="string" calcext:value-type="string">
            <text:p>10943.446 Ω</text:p>
          </table:table-cell>
          <table:table-cell office:value-type="string" calcext:value-type="string">
            <text:p>186°F</text:p>
          </table:table-cell>
          <table:table-cell office:value-type="string" calcext:value-type="string">
            <text:p>85.556°C</text:p>
          </table:table-cell>
          <table:table-cell office:value-type="string" calcext:value-type="string">
            <text:p>1234.327 Ω</text:p>
          </table:table-cell>
        </table:table-row>
        <table:table-row table:style-name="ro1">
          <table:table-cell office:value-type="string" calcext:value-type="string">
            <text:p>-39°F</text:p>
          </table:table-cell>
          <table:table-cell office:value-type="string" calcext:value-type="string">
            <text:p>-39.444°C</text:p>
          </table:table-cell>
          <table:table-cell office:value-type="string" calcext:value-type="string">
            <text:p>231973.799 Ω</text:p>
          </table:table-cell>
          <table:table-cell office:value-type="string" calcext:value-type="string">
            <text:p>74°F</text:p>
          </table:table-cell>
          <table:table-cell office:value-type="string" calcext:value-type="string">
            <text:p>23.333°C</text:p>
          </table:table-cell>
          <table:table-cell office:value-type="string" calcext:value-type="string">
            <text:p>10698.446 Ω</text:p>
          </table:table-cell>
          <table:table-cell office:value-type="string" calcext:value-type="string">
            <text:p>187°F</text:p>
          </table:table-cell>
          <table:table-cell office:value-type="string" calcext:value-type="string">
            <text:p>86.111°C</text:p>
          </table:table-cell>
          <table:table-cell office:value-type="string" calcext:value-type="string">
            <text:p>1214.243 Ω</text:p>
          </table:table-cell>
        </table:table-row>
        <table:table-row table:style-name="ro1">
          <table:table-cell office:value-type="string" calcext:value-type="string">
            <text:p>-38°F</text:p>
          </table:table-cell>
          <table:table-cell office:value-type="string" calcext:value-type="string">
            <text:p>-38.889°C</text:p>
          </table:table-cell>
          <table:table-cell office:value-type="string" calcext:value-type="string">
            <text:p>224534.802 Ω</text:p>
          </table:table-cell>
          <table:table-cell office:value-type="string" calcext:value-type="string">
            <text:p>75°F</text:p>
          </table:table-cell>
          <table:table-cell office:value-type="string" calcext:value-type="string">
            <text:p>23.889°C</text:p>
          </table:table-cell>
          <table:table-cell office:value-type="string" calcext:value-type="string">
            <text:p>10459.654 Ω</text:p>
          </table:table-cell>
          <table:table-cell office:value-type="string" calcext:value-type="string">
            <text:p>188°F</text:p>
          </table:table-cell>
          <table:table-cell office:value-type="string" calcext:value-type="string">
            <text:p>86.667°C</text:p>
          </table:table-cell>
          <table:table-cell office:value-type="string" calcext:value-type="string">
            <text:p>1194.537 Ω</text:p>
          </table:table-cell>
        </table:table-row>
        <table:table-row table:style-name="ro1">
          <table:table-cell office:value-type="string" calcext:value-type="string">
            <text:p>-37°F</text:p>
          </table:table-cell>
          <table:table-cell office:value-type="string" calcext:value-type="string">
            <text:p>-38.333°C</text:p>
          </table:table-cell>
          <table:table-cell office:value-type="string" calcext:value-type="string">
            <text:p>217358.518 Ω</text:p>
          </table:table-cell>
          <table:table-cell office:value-type="string" calcext:value-type="string">
            <text:p>76°F</text:p>
          </table:table-cell>
          <table:table-cell office:value-type="string" calcext:value-type="string">
            <text:p>24.444°C</text:p>
          </table:table-cell>
          <table:table-cell office:value-type="string" calcext:value-type="string">
            <text:p>10226.895 Ω</text:p>
          </table:table-cell>
          <table:table-cell office:value-type="string" calcext:value-type="string">
            <text:p>189°F</text:p>
          </table:table-cell>
          <table:table-cell office:value-type="string" calcext:value-type="string">
            <text:p>87.222°C</text:p>
          </table:table-cell>
          <table:table-cell office:value-type="string" calcext:value-type="string">
            <text:p>1175.202 Ω</text:p>
          </table:table-cell>
        </table:table-row>
        <table:table-row table:style-name="ro1">
          <table:table-cell office:value-type="string" calcext:value-type="string">
            <text:p>-36°F</text:p>
          </table:table-cell>
          <table:table-cell office:value-type="string" calcext:value-type="string">
            <text:p>-37.778°C</text:p>
          </table:table-cell>
          <table:table-cell office:value-type="string" calcext:value-type="string">
            <text:p>210434.888 Ω</text:p>
          </table:table-cell>
          <table:table-cell office:value-type="string" calcext:value-type="string">
            <text:p>77°F</text:p>
          </table:table-cell>
          <table:table-cell office:value-type="string" calcext:value-type="string">
            <text:p>25.000°C</text:p>
          </table:table-cell>
          <table:table-cell office:value-type="string" calcext:value-type="string">
            <text:p>10000.000 Ω</text:p>
          </table:table-cell>
          <table:table-cell office:value-type="string" calcext:value-type="string">
            <text:p>190°F</text:p>
          </table:table-cell>
          <table:table-cell office:value-type="string" calcext:value-type="string">
            <text:p>87.778°C</text:p>
          </table:table-cell>
          <table:table-cell office:value-type="string" calcext:value-type="string">
            <text:p>1156.230 Ω</text:p>
          </table:table-cell>
        </table:table-row>
        <table:table-row table:style-name="ro1">
          <table:table-cell office:value-type="string" calcext:value-type="string">
            <text:p>-35°F</text:p>
          </table:table-cell>
          <table:table-cell office:value-type="string" calcext:value-type="string">
            <text:p>-37.222°C</text:p>
          </table:table-cell>
          <table:table-cell office:value-type="string" calcext:value-type="string">
            <text:p>203754.268 Ω</text:p>
          </table:table-cell>
          <table:table-cell office:value-type="string" calcext:value-type="string">
            <text:p>78°F</text:p>
          </table:table-cell>
          <table:table-cell office:value-type="string" calcext:value-type="string">
            <text:p>25.556°C</text:p>
          </table:table-cell>
          <table:table-cell office:value-type="string" calcext:value-type="string">
            <text:p>9778.805 Ω</text:p>
          </table:table-cell>
          <table:table-cell office:value-type="string" calcext:value-type="string">
            <text:p>191°F</text:p>
          </table:table-cell>
          <table:table-cell office:value-type="string" calcext:value-type="string">
            <text:p>88.333°C</text:p>
          </table:table-cell>
          <table:table-cell office:value-type="string" calcext:value-type="string">
            <text:p>1137.613 Ω</text:p>
          </table:table-cell>
        </table:table-row>
        <table:table-row table:style-name="ro1">
          <table:table-cell office:value-type="string" calcext:value-type="string">
            <text:p>-34°F</text:p>
          </table:table-cell>
          <table:table-cell office:value-type="string" calcext:value-type="string">
            <text:p>-36.667°C</text:p>
          </table:table-cell>
          <table:table-cell office:value-type="string" calcext:value-type="string">
            <text:p>197307.406 Ω</text:p>
          </table:table-cell>
          <table:table-cell office:value-type="string" calcext:value-type="string">
            <text:p>79°F</text:p>
          </table:table-cell>
          <table:table-cell office:value-type="string" calcext:value-type="string">
            <text:p>26.111°C</text:p>
          </table:table-cell>
          <table:table-cell office:value-type="string" calcext:value-type="string">
            <text:p>9563.152 Ω</text:p>
          </table:table-cell>
          <table:table-cell office:value-type="string" calcext:value-type="string">
            <text:p>192°F</text:p>
          </table:table-cell>
          <table:table-cell office:value-type="string" calcext:value-type="string">
            <text:p>88.889°C</text:p>
          </table:table-cell>
          <table:table-cell office:value-type="string" calcext:value-type="string">
            <text:p>1119.344 Ω</text:p>
          </table:table-cell>
        </table:table-row>
        <table:table-row table:style-name="ro1">
          <table:table-cell office:value-type="string" calcext:value-type="string">
            <text:p>-33°F</text:p>
          </table:table-cell>
          <table:table-cell office:value-type="string" calcext:value-type="string">
            <text:p>-36.111°C</text:p>
          </table:table-cell>
          <table:table-cell office:value-type="string" calcext:value-type="string">
            <text:p>191085.429 Ω</text:p>
          </table:table-cell>
          <table:table-cell office:value-type="string" calcext:value-type="string">
            <text:p>80°F</text:p>
          </table:table-cell>
          <table:table-cell office:value-type="string" calcext:value-type="string">
            <text:p>26.667°C</text:p>
          </table:table-cell>
          <table:table-cell office:value-type="string" calcext:value-type="string">
            <text:p>9352.887 Ω</text:p>
          </table:table-cell>
          <table:table-cell office:value-type="string" calcext:value-type="string">
            <text:p>193°F</text:p>
          </table:table-cell>
          <table:table-cell office:value-type="string" calcext:value-type="string">
            <text:p>89.444°C</text:p>
          </table:table-cell>
          <table:table-cell office:value-type="string" calcext:value-type="string">
            <text:p>1101.416 Ω</text:p>
          </table:table-cell>
        </table:table-row>
        <table:table-row table:style-name="ro1">
          <table:table-cell office:value-type="string" calcext:value-type="string">
            <text:p>-32°F</text:p>
          </table:table-cell>
          <table:table-cell office:value-type="string" calcext:value-type="string">
            <text:p>-35.556°C</text:p>
          </table:table-cell>
          <table:table-cell office:value-type="string" calcext:value-type="string">
            <text:p>185079.825 Ω</text:p>
          </table:table-cell>
          <table:table-cell office:value-type="string" calcext:value-type="string">
            <text:p>81°F</text:p>
          </table:table-cell>
          <table:table-cell office:value-type="string" calcext:value-type="string">
            <text:p>27.222°C</text:p>
          </table:table-cell>
          <table:table-cell office:value-type="string" calcext:value-type="string">
            <text:p>9147.860 Ω</text:p>
          </table:table-cell>
          <table:table-cell office:value-type="string" calcext:value-type="string">
            <text:p>194°F</text:p>
          </table:table-cell>
          <table:table-cell office:value-type="string" calcext:value-type="string">
            <text:p>90.000°C</text:p>
          </table:table-cell>
          <table:table-cell office:value-type="string" calcext:value-type="string">
            <text:p>1083.820 Ω</text:p>
          </table:table-cell>
        </table:table-row>
        <table:table-row table:style-name="ro1">
          <table:table-cell office:value-type="string" calcext:value-type="string">
            <text:p>-31°F</text:p>
          </table:table-cell>
          <table:table-cell office:value-type="string" calcext:value-type="string">
            <text:p>-35.000°C</text:p>
          </table:table-cell>
          <table:table-cell office:value-type="string" calcext:value-type="string">
            <text:p>179282.426 Ω</text:p>
          </table:table-cell>
          <table:table-cell office:value-type="string" calcext:value-type="string">
            <text:p>82°F</text:p>
          </table:table-cell>
          <table:table-cell office:value-type="string" calcext:value-type="string">
            <text:p>27.778°C</text:p>
          </table:table-cell>
          <table:table-cell office:value-type="string" calcext:value-type="string">
            <text:p>8947.928 Ω</text:p>
          </table:table-cell>
          <table:table-cell office:value-type="string" calcext:value-type="string">
            <text:p>195°F</text:p>
          </table:table-cell>
          <table:table-cell office:value-type="string" calcext:value-type="string">
            <text:p>90.556°C</text:p>
          </table:table-cell>
          <table:table-cell office:value-type="string" calcext:value-type="string">
            <text:p>1066.551 Ω</text:p>
          </table:table-cell>
        </table:table-row>
        <table:table-row table:style-name="ro1">
          <table:table-cell office:value-type="string" calcext:value-type="string">
            <text:p>-30°F</text:p>
          </table:table-cell>
          <table:table-cell office:value-type="string" calcext:value-type="string">
            <text:p>-34.444°C</text:p>
          </table:table-cell>
          <table:table-cell office:value-type="string" calcext:value-type="string">
            <text:p>173685.397 Ω</text:p>
          </table:table-cell>
          <table:table-cell office:value-type="string" calcext:value-type="string">
            <text:p>83°F</text:p>
          </table:table-cell>
          <table:table-cell office:value-type="string" calcext:value-type="string">
            <text:p>28.333°C</text:p>
          </table:table-cell>
          <table:table-cell office:value-type="string" calcext:value-type="string">
            <text:p>8752.949 Ω</text:p>
          </table:table-cell>
          <table:table-cell office:value-type="string" calcext:value-type="string">
            <text:p>196°F</text:p>
          </table:table-cell>
          <table:table-cell office:value-type="string" calcext:value-type="string">
            <text:p>91.111°C</text:p>
          </table:table-cell>
          <table:table-cell office:value-type="string" calcext:value-type="string">
            <text:p>1049.601 Ω</text:p>
          </table:table-cell>
        </table:table-row>
        <table:table-row table:style-name="ro1">
          <table:table-cell office:value-type="string" calcext:value-type="string">
            <text:p>-29°F</text:p>
          </table:table-cell>
          <table:table-cell office:value-type="string" calcext:value-type="string">
            <text:p>-33.889°C</text:p>
          </table:table-cell>
          <table:table-cell office:value-type="string" calcext:value-type="string">
            <text:p>168281.218 Ω</text:p>
          </table:table-cell>
          <table:table-cell office:value-type="string" calcext:value-type="string">
            <text:p>84°F</text:p>
          </table:table-cell>
          <table:table-cell office:value-type="string" calcext:value-type="string">
            <text:p>28.889°C</text:p>
          </table:table-cell>
          <table:table-cell office:value-type="string" calcext:value-type="string">
            <text:p>8562.788 Ω</text:p>
          </table:table-cell>
          <table:table-cell office:value-type="string" calcext:value-type="string">
            <text:p>197°F</text:p>
          </table:table-cell>
          <table:table-cell office:value-type="string" calcext:value-type="string">
            <text:p>91.667°C</text:p>
          </table:table-cell>
          <table:table-cell office:value-type="string" calcext:value-type="string">
            <text:p>1032.964 Ω</text:p>
          </table:table-cell>
        </table:table-row>
        <table:table-row table:style-name="ro1">
          <table:table-cell office:value-type="string" calcext:value-type="string">
            <text:p>-28°F</text:p>
          </table:table-cell>
          <table:table-cell office:value-type="string" calcext:value-type="string">
            <text:p>-33.333°C</text:p>
          </table:table-cell>
          <table:table-cell office:value-type="string" calcext:value-type="string">
            <text:p>163062.672 Ω</text:p>
          </table:table-cell>
          <table:table-cell office:value-type="string" calcext:value-type="string">
            <text:p>85°F</text:p>
          </table:table-cell>
          <table:table-cell office:value-type="string" calcext:value-type="string">
            <text:p>29.444°C</text:p>
          </table:table-cell>
          <table:table-cell office:value-type="string" calcext:value-type="string">
            <text:p>8377.312 Ω</text:p>
          </table:table-cell>
          <table:table-cell office:value-type="string" calcext:value-type="string">
            <text:p>198°F</text:p>
          </table:table-cell>
          <table:table-cell office:value-type="string" calcext:value-type="string">
            <text:p>92.222°C</text:p>
          </table:table-cell>
          <table:table-cell office:value-type="string" calcext:value-type="string">
            <text:p>1016.633 Ω</text:p>
          </table:table-cell>
        </table:table-row>
        <table:table-row table:style-name="ro1">
          <table:table-cell office:value-type="string" calcext:value-type="string">
            <text:p>-27°F</text:p>
          </table:table-cell>
          <table:table-cell office:value-type="string" calcext:value-type="string">
            <text:p>-32.778°C</text:p>
          </table:table-cell>
          <table:table-cell office:value-type="string" calcext:value-type="string">
            <text:p>158022.832 Ω</text:p>
          </table:table-cell>
          <table:table-cell office:value-type="string" calcext:value-type="string">
            <text:p>86°F</text:p>
          </table:table-cell>
          <table:table-cell office:value-type="string" calcext:value-type="string">
            <text:p>30.000°C</text:p>
          </table:table-cell>
          <table:table-cell office:value-type="string" calcext:value-type="string">
            <text:p>8196.393 Ω</text:p>
          </table:table-cell>
          <table:table-cell office:value-type="string" calcext:value-type="string">
            <text:p>199°F</text:p>
          </table:table-cell>
          <table:table-cell office:value-type="string" calcext:value-type="string">
            <text:p>92.778°C</text:p>
          </table:table-cell>
          <table:table-cell office:value-type="string" calcext:value-type="string">
            <text:p>1000.602 Ω</text:p>
          </table:table-cell>
        </table:table-row>
        <table:table-row table:style-name="ro1">
          <table:table-cell office:value-type="string" calcext:value-type="string">
            <text:p>-26°F</text:p>
          </table:table-cell>
          <table:table-cell office:value-type="string" calcext:value-type="string">
            <text:p>-32.222°C</text:p>
          </table:table-cell>
          <table:table-cell office:value-type="string" calcext:value-type="string">
            <text:p>153155.048 Ω</text:p>
          </table:table-cell>
          <table:table-cell office:value-type="string" calcext:value-type="string">
            <text:p>87°F</text:p>
          </table:table-cell>
          <table:table-cell office:value-type="string" calcext:value-type="string">
            <text:p>30.556°C</text:p>
          </table:table-cell>
          <table:table-cell office:value-type="string" calcext:value-type="string">
            <text:p>8019.908 Ω</text:p>
          </table:table-cell>
          <table:table-cell office:value-type="string" calcext:value-type="string">
            <text:p>200°F</text:p>
          </table:table-cell>
          <table:table-cell office:value-type="string" calcext:value-type="string">
            <text:p>93.333°C</text:p>
          </table:table-cell>
          <table:table-cell office:value-type="string" calcext:value-type="string">
            <text:p>984.865 Ω</text:p>
          </table:table-cell>
        </table:table-row>
        <table:table-row table:style-name="ro1">
          <table:table-cell office:value-type="string" calcext:value-type="string">
            <text:p>-25°F</text:p>
          </table:table-cell>
          <table:table-cell office:value-type="string" calcext:value-type="string">
            <text:p>-31.667°C</text:p>
          </table:table-cell>
          <table:table-cell office:value-type="string" calcext:value-type="string">
            <text:p>148452.937 Ω</text:p>
          </table:table-cell>
          <table:table-cell office:value-type="string" calcext:value-type="string">
            <text:p>88°F</text:p>
          </table:table-cell>
          <table:table-cell office:value-type="string" calcext:value-type="string">
            <text:p>31.111°C</text:p>
          </table:table-cell>
          <table:table-cell office:value-type="string" calcext:value-type="string">
            <text:p>7847.736 Ω</text:p>
          </table:table-cell>
          <table:table-cell office:value-type="string" calcext:value-type="string">
            <text:p>201°F</text:p>
          </table:table-cell>
          <table:table-cell office:value-type="string" calcext:value-type="string">
            <text:p>93.889°C</text:p>
          </table:table-cell>
          <table:table-cell office:value-type="string" calcext:value-type="string">
            <text:p>969.416 Ω</text:p>
          </table:table-cell>
        </table:table-row>
        <table:table-row table:style-name="ro1">
          <table:table-cell office:value-type="string" calcext:value-type="string">
            <text:p>-24°F</text:p>
          </table:table-cell>
          <table:table-cell office:value-type="string" calcext:value-type="string">
            <text:p>-31.111°C</text:p>
          </table:table-cell>
          <table:table-cell office:value-type="string" calcext:value-type="string">
            <text:p>143910.369 Ω</text:p>
          </table:table-cell>
          <table:table-cell office:value-type="string" calcext:value-type="string">
            <text:p>89°F</text:p>
          </table:table-cell>
          <table:table-cell office:value-type="string" calcext:value-type="string">
            <text:p>31.667°C</text:p>
          </table:table-cell>
          <table:table-cell office:value-type="string" calcext:value-type="string">
            <text:p>7679.759 Ω</text:p>
          </table:table-cell>
          <table:table-cell office:value-type="string" calcext:value-type="string">
            <text:p>202°F</text:p>
          </table:table-cell>
          <table:table-cell office:value-type="string" calcext:value-type="string">
            <text:p>94.444°C</text:p>
          </table:table-cell>
          <table:table-cell office:value-type="string" calcext:value-type="string">
            <text:p>954.248 Ω</text:p>
          </table:table-cell>
        </table:table-row>
        <table:table-row table:style-name="ro1">
          <table:table-cell office:value-type="string" calcext:value-type="string">
            <text:p>-23°F</text:p>
          </table:table-cell>
          <table:table-cell office:value-type="string" calcext:value-type="string">
            <text:p>-30.556°C</text:p>
          </table:table-cell>
          <table:table-cell office:value-type="string" calcext:value-type="string">
            <text:p>139521.457 Ω</text:p>
          </table:table-cell>
          <table:table-cell office:value-type="string" calcext:value-type="string">
            <text:p>90°F</text:p>
          </table:table-cell>
          <table:table-cell office:value-type="string" calcext:value-type="string">
            <text:p>32.222°C</text:p>
          </table:table-cell>
          <table:table-cell office:value-type="string" calcext:value-type="string">
            <text:p>7515.864 Ω</text:p>
          </table:table-cell>
          <table:table-cell office:value-type="string" calcext:value-type="string">
            <text:p>203°F</text:p>
          </table:table-cell>
          <table:table-cell office:value-type="string" calcext:value-type="string">
            <text:p>95.000°C</text:p>
          </table:table-cell>
          <table:table-cell office:value-type="string" calcext:value-type="string">
            <text:p>939.356 Ω</text:p>
          </table:table-cell>
        </table:table-row>
        <table:table-row table:style-name="ro1">
          <table:table-cell office:value-type="string" calcext:value-type="string">
            <text:p>-22°F</text:p>
          </table:table-cell>
          <table:table-cell office:value-type="string" calcext:value-type="string">
            <text:p>-30.000°C</text:p>
          </table:table-cell>
          <table:table-cell office:value-type="string" calcext:value-type="string">
            <text:p>135280.551 Ω</text:p>
          </table:table-cell>
          <table:table-cell office:value-type="string" calcext:value-type="string">
            <text:p>91°F</text:p>
          </table:table-cell>
          <table:table-cell office:value-type="string" calcext:value-type="string">
            <text:p>32.778°C</text:p>
          </table:table-cell>
          <table:table-cell office:value-type="string" calcext:value-type="string">
            <text:p>7355.942 Ω</text:p>
          </table:table-cell>
          <table:table-cell office:value-type="string" calcext:value-type="string">
            <text:p>204°F</text:p>
          </table:table-cell>
          <table:table-cell office:value-type="string" calcext:value-type="string">
            <text:p>95.556°C</text:p>
          </table:table-cell>
          <table:table-cell office:value-type="string" calcext:value-type="string">
            <text:p>924.734 Ω</text:p>
          </table:table-cell>
        </table:table-row>
        <table:table-row table:style-name="ro1">
          <table:table-cell office:value-type="string" calcext:value-type="string">
            <text:p>-21°F</text:p>
          </table:table-cell>
          <table:table-cell office:value-type="string" calcext:value-type="string">
            <text:p>-29.444°C</text:p>
          </table:table-cell>
          <table:table-cell office:value-type="string" calcext:value-type="string">
            <text:p>131182.219 Ω</text:p>
          </table:table-cell>
          <table:table-cell office:value-type="string" calcext:value-type="string">
            <text:p>92°F</text:p>
          </table:table-cell>
          <table:table-cell office:value-type="string" calcext:value-type="string">
            <text:p>33.333°C</text:p>
          </table:table-cell>
          <table:table-cell office:value-type="string" calcext:value-type="string">
            <text:p>7199.884 Ω</text:p>
          </table:table-cell>
          <table:table-cell office:value-type="string" calcext:value-type="string">
            <text:p>205°F</text:p>
          </table:table-cell>
          <table:table-cell office:value-type="string" calcext:value-type="string">
            <text:p>96.111°C</text:p>
          </table:table-cell>
          <table:table-cell office:value-type="string" calcext:value-type="string">
            <text:p>910.377 Ω</text:p>
          </table:table-cell>
        </table:table-row>
        <table:table-row table:style-name="ro1">
          <table:table-cell office:value-type="string" calcext:value-type="string">
            <text:p>-20°F</text:p>
          </table:table-cell>
          <table:table-cell office:value-type="string" calcext:value-type="string">
            <text:p>-28.889°C</text:p>
          </table:table-cell>
          <table:table-cell office:value-type="string" calcext:value-type="string">
            <text:p>127221.248 Ω</text:p>
          </table:table-cell>
          <table:table-cell office:value-type="string" calcext:value-type="string">
            <text:p>93°F</text:p>
          </table:table-cell>
          <table:table-cell office:value-type="string" calcext:value-type="string">
            <text:p>33.889°C</text:p>
          </table:table-cell>
          <table:table-cell office:value-type="string" calcext:value-type="string">
            <text:p>7047.588 Ω</text:p>
          </table:table-cell>
          <table:table-cell office:value-type="string" calcext:value-type="string">
            <text:p>206°F</text:p>
          </table:table-cell>
          <table:table-cell office:value-type="string" calcext:value-type="string">
            <text:p>96.667°C</text:p>
          </table:table-cell>
          <table:table-cell office:value-type="string" calcext:value-type="string">
            <text:p>896.279 Ω</text:p>
          </table:table-cell>
        </table:table-row>
        <table:table-row table:style-name="ro1">
          <table:table-cell office:value-type="string" calcext:value-type="string">
            <text:p>-19°F</text:p>
          </table:table-cell>
          <table:table-cell office:value-type="string" calcext:value-type="string">
            <text:p>-28.333°C</text:p>
          </table:table-cell>
          <table:table-cell office:value-type="string" calcext:value-type="string">
            <text:p>123392.627 Ω</text:p>
          </table:table-cell>
          <table:table-cell office:value-type="string" calcext:value-type="string">
            <text:p>94°F</text:p>
          </table:table-cell>
          <table:table-cell office:value-type="string" calcext:value-type="string">
            <text:p>34.444°C</text:p>
          </table:table-cell>
          <table:table-cell office:value-type="string" calcext:value-type="string">
            <text:p>6898.953 Ω</text:p>
          </table:table-cell>
          <table:table-cell office:value-type="string" calcext:value-type="string">
            <text:p>207°F</text:p>
          </table:table-cell>
          <table:table-cell office:value-type="string" calcext:value-type="string">
            <text:p>97.222°C</text:p>
          </table:table-cell>
          <table:table-cell office:value-type="string" calcext:value-type="string">
            <text:p>882.436 Ω</text:p>
          </table:table-cell>
        </table:table-row>
        <table:table-row table:style-name="ro1">
          <table:table-cell office:value-type="string" calcext:value-type="string">
            <text:p>-18°F</text:p>
          </table:table-cell>
          <table:table-cell office:value-type="string" calcext:value-type="string">
            <text:p>-27.778°C</text:p>
          </table:table-cell>
          <table:table-cell office:value-type="string" calcext:value-type="string">
            <text:p>119691.542 Ω</text:p>
          </table:table-cell>
          <table:table-cell office:value-type="string" calcext:value-type="string">
            <text:p>95°F</text:p>
          </table:table-cell>
          <table:table-cell office:value-type="string" calcext:value-type="string">
            <text:p>35.000°C</text:p>
          </table:table-cell>
          <table:table-cell office:value-type="string" calcext:value-type="string">
            <text:p>6753.881 Ω</text:p>
          </table:table-cell>
          <table:table-cell office:value-type="string" calcext:value-type="string">
            <text:p>208°F</text:p>
          </table:table-cell>
          <table:table-cell office:value-type="string" calcext:value-type="string">
            <text:p>97.778°C</text:p>
          </table:table-cell>
          <table:table-cell office:value-type="string" calcext:value-type="string">
            <text:p>868.841 Ω</text:p>
          </table:table-cell>
        </table:table-row>
        <table:table-row table:style-name="ro1">
          <table:table-cell office:value-type="string" calcext:value-type="string">
            <text:p>-17°F</text:p>
          </table:table-cell>
          <table:table-cell office:value-type="string" calcext:value-type="string">
            <text:p>-27.222°C</text:p>
          </table:table-cell>
          <table:table-cell office:value-type="string" calcext:value-type="string">
            <text:p>116113.369 Ω</text:p>
          </table:table-cell>
          <table:table-cell office:value-type="string" calcext:value-type="string">
            <text:p>96°F</text:p>
          </table:table-cell>
          <table:table-cell office:value-type="string" calcext:value-type="string">
            <text:p>35.556°C</text:p>
          </table:table-cell>
          <table:table-cell office:value-type="string" calcext:value-type="string">
            <text:p>6612.277 Ω</text:p>
          </table:table-cell>
          <table:table-cell office:value-type="string" calcext:value-type="string">
            <text:p>209°F</text:p>
          </table:table-cell>
          <table:table-cell office:value-type="string" calcext:value-type="string">
            <text:p>98.333°C</text:p>
          </table:table-cell>
          <table:table-cell office:value-type="string" calcext:value-type="string">
            <text:p>855.490 Ω</text:p>
          </table:table-cell>
        </table:table-row>
        <table:table-row table:style-name="ro1">
          <table:table-cell office:value-type="string" calcext:value-type="string">
            <text:p>-16°F</text:p>
          </table:table-cell>
          <table:table-cell office:value-type="string" calcext:value-type="string">
            <text:p>-26.667°C</text:p>
          </table:table-cell>
          <table:table-cell office:value-type="string" calcext:value-type="string">
            <text:p>112653.662 Ω</text:p>
          </table:table-cell>
          <table:table-cell office:value-type="string" calcext:value-type="string">
            <text:p>97°F</text:p>
          </table:table-cell>
          <table:table-cell office:value-type="string" calcext:value-type="string">
            <text:p>36.111°C</text:p>
          </table:table-cell>
          <table:table-cell office:value-type="string" calcext:value-type="string">
            <text:p>6474.049 Ω</text:p>
          </table:table-cell>
          <table:table-cell office:value-type="string" calcext:value-type="string">
            <text:p>210°F</text:p>
          </table:table-cell>
          <table:table-cell office:value-type="string" calcext:value-type="string">
            <text:p>98.889°C</text:p>
          </table:table-cell>
          <table:table-cell office:value-type="string" calcext:value-type="string">
            <text:p>842.377 Ω</text:p>
          </table:table-cell>
        </table:table-row>
        <table:table-row table:style-name="ro1">
          <table:table-cell office:value-type="string" calcext:value-type="string">
            <text:p>-15°F</text:p>
          </table:table-cell>
          <table:table-cell office:value-type="string" calcext:value-type="string">
            <text:p>-26.111°C</text:p>
          </table:table-cell>
          <table:table-cell office:value-type="string" calcext:value-type="string">
            <text:p>109308.149 Ω</text:p>
          </table:table-cell>
          <table:table-cell office:value-type="string" calcext:value-type="string">
            <text:p>98°F</text:p>
          </table:table-cell>
          <table:table-cell office:value-type="string" calcext:value-type="string">
            <text:p>36.667°C</text:p>
          </table:table-cell>
          <table:table-cell office:value-type="string" calcext:value-type="string">
            <text:p>6339.108 Ω</text:p>
          </table:table-cell>
          <table:table-cell office:value-type="string" calcext:value-type="string">
            <text:p>211°F</text:p>
          </table:table-cell>
          <table:table-cell office:value-type="string" calcext:value-type="string">
            <text:p>99.444°C</text:p>
          </table:table-cell>
          <table:table-cell office:value-type="string" calcext:value-type="string">
            <text:p>829.499 Ω</text:p>
          </table:table-cell>
        </table:table-row>
        <table:table-row table:style-name="ro1">
          <table:table-cell office:value-type="string" calcext:value-type="string">
            <text:p>-14°F</text:p>
          </table:table-cell>
          <table:table-cell office:value-type="string" calcext:value-type="string">
            <text:p>-25.556°C</text:p>
          </table:table-cell>
          <table:table-cell office:value-type="string" calcext:value-type="string">
            <text:p>106072.724 Ω</text:p>
          </table:table-cell>
          <table:table-cell office:value-type="string" calcext:value-type="string">
            <text:p>99°F</text:p>
          </table:table-cell>
          <table:table-cell office:value-type="string" calcext:value-type="string">
            <text:p>37.222°C</text:p>
          </table:table-cell>
          <table:table-cell office:value-type="string" calcext:value-type="string">
            <text:p>6207.366 Ω</text:p>
          </table:table-cell>
          <table:table-cell office:value-type="string" calcext:value-type="string">
            <text:p>212°F</text:p>
          </table:table-cell>
          <table:table-cell office:value-type="string" calcext:value-type="string">
            <text:p>100.000°C</text:p>
          </table:table-cell>
          <table:table-cell office:value-type="string" calcext:value-type="string">
            <text:p>816.850 Ω</text:p>
          </table:table-cell>
        </table:table-row>
        <table:table-row table:style-name="ro1">
          <table:table-cell office:value-type="string" calcext:value-type="string">
            <text:p>-13°F</text:p>
          </table:table-cell>
          <table:table-cell office:value-type="string" calcext:value-type="string">
            <text:p>-25.000°C</text:p>
          </table:table-cell>
          <table:table-cell office:value-type="string" calcext:value-type="string">
            <text:p>102943.440 Ω</text:p>
          </table:table-cell>
          <table:table-cell office:value-type="string" calcext:value-type="string">
            <text:p>100°F</text:p>
          </table:table-cell>
          <table:table-cell office:value-type="string" calcext:value-type="string">
            <text:p>37.778°C</text:p>
          </table:table-cell>
          <table:table-cell office:value-type="string" calcext:value-type="string">
            <text:p>6078.740 Ω</text:p>
          </table:table-cell>
          <table:table-cell office:value-type="string" calcext:value-type="string">
            <text:p>213°F</text:p>
          </table:table-cell>
          <table:table-cell office:value-type="string" calcext:value-type="string">
            <text:p>100.556°C</text:p>
          </table:table-cell>
          <table:table-cell office:value-type="string" calcext:value-type="string">
            <text:p>804.426 Ω</text:p>
          </table:table-cell>
        </table:table-row>
        <table:table-row table:style-name="ro1">
          <table:table-cell office:value-type="string" calcext:value-type="string">
            <text:p>-12°F</text:p>
          </table:table-cell>
          <table:table-cell office:value-type="string" calcext:value-type="string">
            <text:p>-24.444°C</text:p>
          </table:table-cell>
          <table:table-cell office:value-type="string" calcext:value-type="string">
            <text:p>99916.502 Ω</text:p>
          </table:table-cell>
          <table:table-cell office:value-type="string" calcext:value-type="string">
            <text:p>101°F</text:p>
          </table:table-cell>
          <table:table-cell office:value-type="string" calcext:value-type="string">
            <text:p>38.333°C</text:p>
          </table:table-cell>
          <table:table-cell office:value-type="string" calcext:value-type="string">
            <text:p>5953.147 Ω</text:p>
          </table:table-cell>
          <table:table-cell office:value-type="string" calcext:value-type="string">
            <text:p>214°F</text:p>
          </table:table-cell>
          <table:table-cell office:value-type="string" calcext:value-type="string">
            <text:p>101.111°C</text:p>
          </table:table-cell>
          <table:table-cell office:value-type="string" calcext:value-type="string">
            <text:p>792.222 Ω</text:p>
          </table:table-cell>
        </table:table-row>
        <table:table-row table:style-name="ro1">
          <table:table-cell office:value-type="string" calcext:value-type="string">
            <text:p>-11°F</text:p>
          </table:table-cell>
          <table:table-cell office:value-type="string" calcext:value-type="string">
            <text:p>-23.889°C</text:p>
          </table:table-cell>
          <table:table-cell office:value-type="string" calcext:value-type="string">
            <text:p>96988.261 Ω</text:p>
          </table:table-cell>
          <table:table-cell office:value-type="string" calcext:value-type="string">
            <text:p>102°F</text:p>
          </table:table-cell>
          <table:table-cell office:value-type="string" calcext:value-type="string">
            <text:p>38.889°C</text:p>
          </table:table-cell>
          <table:table-cell office:value-type="string" calcext:value-type="string">
            <text:p>5830.508 Ω</text:p>
          </table:table-cell>
          <table:table-cell office:value-type="string" calcext:value-type="string">
            <text:p>215°F</text:p>
          </table:table-cell>
          <table:table-cell office:value-type="string" calcext:value-type="string">
            <text:p>101.667°C</text:p>
          </table:table-cell>
          <table:table-cell office:value-type="string" calcext:value-type="string">
            <text:p>780.234 Ω</text:p>
          </table:table-cell>
        </table:table-row>
        <table:table-row table:style-name="ro1">
          <table:table-cell office:value-type="string" calcext:value-type="string">
            <text:p>-10°F</text:p>
          </table:table-cell>
          <table:table-cell office:value-type="string" calcext:value-type="string">
            <text:p>-23.333°C</text:p>
          </table:table-cell>
          <table:table-cell office:value-type="string" calcext:value-type="string">
            <text:p>94155.208 Ω</text:p>
          </table:table-cell>
          <table:table-cell office:value-type="string" calcext:value-type="string">
            <text:p>103°F</text:p>
          </table:table-cell>
          <table:table-cell office:value-type="string" calcext:value-type="string">
            <text:p>39.444°C</text:p>
          </table:table-cell>
          <table:table-cell office:value-type="string" calcext:value-type="string">
            <text:p>5710.745 Ω</text:p>
          </table:table-cell>
          <table:table-cell office:value-type="string" calcext:value-type="string">
            <text:p>216°F</text:p>
          </table:table-cell>
          <table:table-cell office:value-type="string" calcext:value-type="string">
            <text:p>102.222°C</text:p>
          </table:table-cell>
          <table:table-cell office:value-type="string" calcext:value-type="string">
            <text:p>768.457 Ω</text:p>
          </table:table-cell>
        </table:table-row>
        <table:table-row table:style-name="ro1">
          <table:table-cell office:value-type="string" calcext:value-type="string">
            <text:p>-9°F</text:p>
          </table:table-cell>
          <table:table-cell office:value-type="string" calcext:value-type="string">
            <text:p>-22.778°C</text:p>
          </table:table-cell>
          <table:table-cell office:value-type="string" calcext:value-type="string">
            <text:p>91413.968 Ω</text:p>
          </table:table-cell>
          <table:table-cell office:value-type="string" calcext:value-type="string">
            <text:p>104°F</text:p>
          </table:table-cell>
          <table:table-cell office:value-type="string" calcext:value-type="string">
            <text:p>40.000°C</text:p>
          </table:table-cell>
          <table:table-cell office:value-type="string" calcext:value-type="string">
            <text:p>5593.784 Ω</text:p>
          </table:table-cell>
          <table:table-cell office:value-type="string" calcext:value-type="string">
            <text:p>217°F</text:p>
          </table:table-cell>
          <table:table-cell office:value-type="string" calcext:value-type="string">
            <text:p>102.778°C</text:p>
          </table:table-cell>
          <table:table-cell office:value-type="string" calcext:value-type="string">
            <text:p>756.887 Ω</text:p>
          </table:table-cell>
        </table:table-row>
        <table:table-row table:style-name="ro1">
          <table:table-cell office:value-type="string" calcext:value-type="string">
            <text:p>-8°F</text:p>
          </table:table-cell>
          <table:table-cell office:value-type="string" calcext:value-type="string">
            <text:p>-22.222°C</text:p>
          </table:table-cell>
          <table:table-cell office:value-type="string" calcext:value-type="string">
            <text:p>88761.297 Ω</text:p>
          </table:table-cell>
          <table:table-cell office:value-type="string" calcext:value-type="string">
            <text:p>105°F</text:p>
          </table:table-cell>
          <table:table-cell office:value-type="string" calcext:value-type="string">
            <text:p>40.556°C</text:p>
          </table:table-cell>
          <table:table-cell office:value-type="string" calcext:value-type="string">
            <text:p>5479.552 Ω</text:p>
          </table:table-cell>
          <table:table-cell office:value-type="string" calcext:value-type="string">
            <text:p>218°F</text:p>
          </table:table-cell>
          <table:table-cell office:value-type="string" calcext:value-type="string">
            <text:p>103.333°C</text:p>
          </table:table-cell>
          <table:table-cell office:value-type="string" calcext:value-type="string">
            <text:p>745.521 Ω</text:p>
          </table:table-cell>
        </table:table-row>
        <table:table-row table:style-name="ro1">
          <table:table-cell office:value-type="string" calcext:value-type="string">
            <text:p>-7°F</text:p>
          </table:table-cell>
          <table:table-cell office:value-type="string" calcext:value-type="string">
            <text:p>-21.667°C</text:p>
          </table:table-cell>
          <table:table-cell office:value-type="string" calcext:value-type="string">
            <text:p>86194.072 Ω</text:p>
          </table:table-cell>
          <table:table-cell office:value-type="string" calcext:value-type="string">
            <text:p>106°F</text:p>
          </table:table-cell>
          <table:table-cell office:value-type="string" calcext:value-type="string">
            <text:p>41.111°C</text:p>
          </table:table-cell>
          <table:table-cell office:value-type="string" calcext:value-type="string">
            <text:p>5367.977 Ω</text:p>
          </table:table-cell>
          <table:table-cell office:value-type="string" calcext:value-type="string">
            <text:p>219°F</text:p>
          </table:table-cell>
          <table:table-cell office:value-type="string" calcext:value-type="string">
            <text:p>103.889°C</text:p>
          </table:table-cell>
          <table:table-cell office:value-type="string" calcext:value-type="string">
            <text:p>734.353 Ω</text:p>
          </table:table-cell>
        </table:table-row>
        <table:table-row table:style-name="ro1">
          <table:table-cell office:value-type="string" calcext:value-type="string">
            <text:p>-6°F</text:p>
          </table:table-cell>
          <table:table-cell office:value-type="string" calcext:value-type="string">
            <text:p>-21.111°C</text:p>
          </table:table-cell>
          <table:table-cell office:value-type="string" calcext:value-type="string">
            <text:p>83709.290 Ω</text:p>
          </table:table-cell>
          <table:table-cell office:value-type="string" calcext:value-type="string">
            <text:p>107°F</text:p>
          </table:table-cell>
          <table:table-cell office:value-type="string" calcext:value-type="string">
            <text:p>41.667°C</text:p>
          </table:table-cell>
          <table:table-cell office:value-type="string" calcext:value-type="string">
            <text:p>5258.992 Ω</text:p>
          </table:table-cell>
          <table:table-cell office:value-type="string" calcext:value-type="string">
            <text:p>220°F</text:p>
          </table:table-cell>
          <table:table-cell office:value-type="string" calcext:value-type="string">
            <text:p>104.444°C</text:p>
          </table:table-cell>
          <table:table-cell office:value-type="string" calcext:value-type="string">
            <text:p>723.381 Ω</text:p>
          </table:table-cell>
        </table:table-row>
        <table:table-row table:style-name="ro1">
          <table:table-cell office:value-type="string" calcext:value-type="string">
            <text:p>-5°F</text:p>
          </table:table-cell>
          <table:table-cell office:value-type="string" calcext:value-type="string">
            <text:p>-20.556°C</text:p>
          </table:table-cell>
          <table:table-cell office:value-type="string" calcext:value-type="string">
            <text:p>81304.060 Ω</text:p>
          </table:table-cell>
          <table:table-cell office:value-type="string" calcext:value-type="string">
            <text:p>108°F</text:p>
          </table:table-cell>
          <table:table-cell office:value-type="string" calcext:value-type="string">
            <text:p>42.222°C</text:p>
          </table:table-cell>
          <table:table-cell office:value-type="string" calcext:value-type="string">
            <text:p>5152.528 Ω</text:p>
          </table:table-cell>
          <table:table-cell office:value-type="string" calcext:value-type="string">
            <text:p>221°F</text:p>
          </table:table-cell>
          <table:table-cell office:value-type="string" calcext:value-type="string">
            <text:p>105.000°C</text:p>
          </table:table-cell>
          <table:table-cell office:value-type="string" calcext:value-type="string">
            <text:p>712.600 Ω</text:p>
          </table:table-cell>
        </table:table-row>
        <table:table-row table:style-name="ro1">
          <table:table-cell office:value-type="string" calcext:value-type="string">
            <text:p>-4°F</text:p>
          </table:table-cell>
          <table:table-cell office:value-type="string" calcext:value-type="string">
            <text:p>-20.000°C</text:p>
          </table:table-cell>
          <table:table-cell office:value-type="string" calcext:value-type="string">
            <text:p>78975.604 Ω</text:p>
          </table:table-cell>
          <table:table-cell office:value-type="string" calcext:value-type="string">
            <text:p>109°F</text:p>
          </table:table-cell>
          <table:table-cell office:value-type="string" calcext:value-type="string">
            <text:p>42.778°C</text:p>
          </table:table-cell>
          <table:table-cell office:value-type="string" calcext:value-type="string">
            <text:p>5048.522 Ω</text:p>
          </table:table-cell>
          <table:table-cell office:value-type="string" calcext:value-type="string">
            <text:p>222°F</text:p>
          </table:table-cell>
          <table:table-cell office:value-type="string" calcext:value-type="string">
            <text:p>105.556°C</text:p>
          </table:table-cell>
          <table:table-cell office:value-type="string" calcext:value-type="string">
            <text:p>702.007 Ω</text:p>
          </table:table-cell>
        </table:table-row>
        <table:table-row table:style-name="ro1">
          <table:table-cell office:value-type="string" calcext:value-type="string">
            <text:p>-3°F</text:p>
          </table:table-cell>
          <table:table-cell office:value-type="string" calcext:value-type="string">
            <text:p>-19.444°C</text:p>
          </table:table-cell>
          <table:table-cell office:value-type="string" calcext:value-type="string">
            <text:p>76721.244 Ω</text:p>
          </table:table-cell>
          <table:table-cell office:value-type="string" calcext:value-type="string">
            <text:p>110°F</text:p>
          </table:table-cell>
          <table:table-cell office:value-type="string" calcext:value-type="string">
            <text:p>43.333°C</text:p>
          </table:table-cell>
          <table:table-cell office:value-type="string" calcext:value-type="string">
            <text:p>4946.910 Ω</text:p>
          </table:table-cell>
          <table:table-cell office:value-type="string" calcext:value-type="string">
            <text:p>223°F</text:p>
          </table:table-cell>
          <table:table-cell office:value-type="string" calcext:value-type="string">
            <text:p>106.111°C</text:p>
          </table:table-cell>
          <table:table-cell office:value-type="string" calcext:value-type="string">
            <text:p>691.597 Ω</text:p>
          </table:table-cell>
        </table:table-row>
        <table:table-row table:style-name="ro1">
          <table:table-cell office:value-type="string" calcext:value-type="string">
            <text:p>-2°F</text:p>
          </table:table-cell>
          <table:table-cell office:value-type="string" calcext:value-type="string">
            <text:p>-18.889°C</text:p>
          </table:table-cell>
          <table:table-cell office:value-type="string" calcext:value-type="string">
            <text:p>74538.407 Ω</text:p>
          </table:table-cell>
          <table:table-cell office:value-type="string" calcext:value-type="string">
            <text:p>111°F</text:p>
          </table:table-cell>
          <table:table-cell office:value-type="string" calcext:value-type="string">
            <text:p>43.889°C</text:p>
          </table:table-cell>
          <table:table-cell office:value-type="string" calcext:value-type="string">
            <text:p>4847.630 Ω</text:p>
          </table:table-cell>
          <table:table-cell office:value-type="string" calcext:value-type="string">
            <text:p>224°F</text:p>
          </table:table-cell>
          <table:table-cell office:value-type="string" calcext:value-type="string">
            <text:p>106.667°C</text:p>
          </table:table-cell>
          <table:table-cell office:value-type="string" calcext:value-type="string">
            <text:p>681.367 Ω</text:p>
          </table:table-cell>
        </table:table-row>
        <table:table-row table:style-name="ro1">
          <table:table-cell office:value-type="string" calcext:value-type="string">
            <text:p>-1°F</text:p>
          </table:table-cell>
          <table:table-cell office:value-type="string" calcext:value-type="string">
            <text:p>-18.333°C</text:p>
          </table:table-cell>
          <table:table-cell office:value-type="string" calcext:value-type="string">
            <text:p>72424.612 Ω</text:p>
          </table:table-cell>
          <table:table-cell office:value-type="string" calcext:value-type="string">
            <text:p>112°F</text:p>
          </table:table-cell>
          <table:table-cell office:value-type="string" calcext:value-type="string">
            <text:p>44.444°C</text:p>
          </table:table-cell>
          <table:table-cell office:value-type="string" calcext:value-type="string">
            <text:p>4750.623 Ω</text:p>
          </table:table-cell>
          <table:table-cell office:value-type="string" calcext:value-type="string">
            <text:p>225°F</text:p>
          </table:table-cell>
          <table:table-cell office:value-type="string" calcext:value-type="string">
            <text:p>107.222°C</text:p>
          </table:table-cell>
          <table:table-cell office:value-type="string" calcext:value-type="string">
            <text:p>671.315 Ω</text:p>
          </table:table-cell>
        </table:table-row>
        <table:table-row table:style-name="ro1">
          <table:table-cell office:value-type="string" calcext:value-type="string">
            <text:p>0°F</text:p>
          </table:table-cell>
          <table:table-cell office:value-type="string" calcext:value-type="string">
            <text:p>-17.778°C</text:p>
          </table:table-cell>
          <table:table-cell office:value-type="string" calcext:value-type="string">
            <text:p>70377.475 Ω</text:p>
          </table:table-cell>
          <table:table-cell office:value-type="string" calcext:value-type="string">
            <text:p>113°F</text:p>
          </table:table-cell>
          <table:table-cell office:value-type="string" calcext:value-type="string">
            <text:p>45.000°C</text:p>
          </table:table-cell>
          <table:table-cell office:value-type="string" calcext:value-type="string">
            <text:p>4655.831 Ω</text:p>
          </table:table-cell>
          <table:table-cell office:value-type="string" calcext:value-type="string">
            <text:p>226°F</text:p>
          </table:table-cell>
          <table:table-cell office:value-type="string" calcext:value-type="string">
            <text:p>107.778°C</text:p>
          </table:table-cell>
          <table:table-cell office:value-type="string" calcext:value-type="string">
            <text:p>661.435 Ω</text:p>
          </table:table-cell>
        </table:table-row>
        <table:table-row table:style-name="ro1">
          <table:table-cell office:value-type="string" calcext:value-type="string">
            <text:p>1°F</text:p>
          </table:table-cell>
          <table:table-cell office:value-type="string" calcext:value-type="string">
            <text:p>-17.222°C</text:p>
          </table:table-cell>
          <table:table-cell office:value-type="string" calcext:value-type="string">
            <text:p>68394.698 Ω</text:p>
          </table:table-cell>
          <table:table-cell office:value-type="string" calcext:value-type="string">
            <text:p>114°F</text:p>
          </table:table-cell>
          <table:table-cell office:value-type="string" calcext:value-type="string">
            <text:p>45.556°C</text:p>
          </table:table-cell>
          <table:table-cell office:value-type="string" calcext:value-type="string">
            <text:p>4563.198 Ω</text:p>
          </table:table-cell>
          <table:table-cell office:value-type="string" calcext:value-type="string">
            <text:p>227°F</text:p>
          </table:table-cell>
          <table:table-cell office:value-type="string" calcext:value-type="string">
            <text:p>108.333°C</text:p>
          </table:table-cell>
          <table:table-cell office:value-type="string" calcext:value-type="string">
            <text:p>651.725 Ω</text:p>
          </table:table-cell>
        </table:table-row>
        <table:table-row table:style-name="ro1">
          <table:table-cell office:value-type="string" calcext:value-type="string">
            <text:p>2°F</text:p>
          </table:table-cell>
          <table:table-cell office:value-type="string" calcext:value-type="string">
            <text:p>-16.667°C</text:p>
          </table:table-cell>
          <table:table-cell office:value-type="string" calcext:value-type="string">
            <text:p>66474.070 Ω</text:p>
          </table:table-cell>
          <table:table-cell office:value-type="string" calcext:value-type="string">
            <text:p>115°F</text:p>
          </table:table-cell>
          <table:table-cell office:value-type="string" calcext:value-type="string">
            <text:p>46.111°C</text:p>
          </table:table-cell>
          <table:table-cell office:value-type="string" calcext:value-type="string">
            <text:p>4472.669 Ω</text:p>
          </table:table-cell>
          <table:table-cell office:value-type="string" calcext:value-type="string">
            <text:p>228°F</text:p>
          </table:table-cell>
          <table:table-cell office:value-type="string" calcext:value-type="string">
            <text:p>108.889°C</text:p>
          </table:table-cell>
          <table:table-cell office:value-type="string" calcext:value-type="string">
            <text:p>642.182 Ω</text:p>
          </table:table-cell>
        </table:table-row>
        <table:table-row table:style-name="ro1">
          <table:table-cell office:value-type="string" calcext:value-type="string">
            <text:p>3°F</text:p>
          </table:table-cell>
          <table:table-cell office:value-type="string" calcext:value-type="string">
            <text:p>-16.111°C</text:p>
          </table:table-cell>
          <table:table-cell office:value-type="string" calcext:value-type="string">
            <text:p>64613.462 Ω</text:p>
          </table:table-cell>
          <table:table-cell office:value-type="string" calcext:value-type="string">
            <text:p>116°F</text:p>
          </table:table-cell>
          <table:table-cell office:value-type="string" calcext:value-type="string">
            <text:p>46.667°C</text:p>
          </table:table-cell>
          <table:table-cell office:value-type="string" calcext:value-type="string">
            <text:p>4384.190 Ω</text:p>
          </table:table-cell>
          <table:table-cell office:value-type="string" calcext:value-type="string">
            <text:p>229°F</text:p>
          </table:table-cell>
          <table:table-cell office:value-type="string" calcext:value-type="string">
            <text:p>109.444°C</text:p>
          </table:table-cell>
          <table:table-cell office:value-type="string" calcext:value-type="string">
            <text:p>632.802 Ω</text:p>
          </table:table-cell>
        </table:table-row>
        <table:table-row table:style-name="ro1">
          <table:table-cell office:value-type="string" calcext:value-type="string">
            <text:p>4°F</text:p>
          </table:table-cell>
          <table:table-cell office:value-type="string" calcext:value-type="string">
            <text:p>-15.556°C</text:p>
          </table:table-cell>
          <table:table-cell office:value-type="string" calcext:value-type="string">
            <text:p>62810.821 Ω</text:p>
          </table:table-cell>
          <table:table-cell office:value-type="string" calcext:value-type="string">
            <text:p>117°F</text:p>
          </table:table-cell>
          <table:table-cell office:value-type="string" calcext:value-type="string">
            <text:p>47.222°C</text:p>
          </table:table-cell>
          <table:table-cell office:value-type="string" calcext:value-type="string">
            <text:p>4297.710 Ω</text:p>
          </table:table-cell>
          <table:table-cell office:value-type="string" calcext:value-type="string">
            <text:p>230°F</text:p>
          </table:table-cell>
          <table:table-cell office:value-type="string" calcext:value-type="string">
            <text:p>110.000°C</text:p>
          </table:table-cell>
          <table:table-cell office:value-type="string" calcext:value-type="string">
            <text:p>623.583 Ω</text:p>
          </table:table-cell>
        </table:table-row>
        <table:table-row table:style-name="ro1">
          <table:table-cell office:value-type="string" calcext:value-type="string">
            <text:p>5°F</text:p>
          </table:table-cell>
          <table:table-cell office:value-type="string" calcext:value-type="string">
            <text:p>-15.000°C</text:p>
          </table:table-cell>
          <table:table-cell office:value-type="string" calcext:value-type="string">
            <text:p>61064.175 Ω</text:p>
          </table:table-cell>
          <table:table-cell office:value-type="string" calcext:value-type="string">
            <text:p>118°F</text:p>
          </table:table-cell>
          <table:table-cell office:value-type="string" calcext:value-type="string">
            <text:p>47.778°C</text:p>
          </table:table-cell>
          <table:table-cell office:value-type="string" calcext:value-type="string">
            <text:p>4213.179 Ω</text:p>
          </table:table-cell>
          <table:table-cell office:value-type="string" calcext:value-type="string">
            <text:p>231°F</text:p>
          </table:table-cell>
          <table:table-cell office:value-type="string" calcext:value-type="string">
            <text:p>110.556°C</text:p>
          </table:table-cell>
          <table:table-cell office:value-type="string" calcext:value-type="string">
            <text:p>614.520 Ω</text:p>
          </table:table-cell>
        </table:table-row>
        <table:table-row table:style-name="ro1">
          <table:table-cell office:value-type="string" calcext:value-type="string">
            <text:p>6°F</text:p>
          </table:table-cell>
          <table:table-cell office:value-type="string" calcext:value-type="string">
            <text:p>-14.444°C</text:p>
          </table:table-cell>
          <table:table-cell office:value-type="string" calcext:value-type="string">
            <text:p>59371.619 Ω</text:p>
          </table:table-cell>
          <table:table-cell office:value-type="string" calcext:value-type="string">
            <text:p>119°F</text:p>
          </table:table-cell>
          <table:table-cell office:value-type="string" calcext:value-type="string">
            <text:p>48.333°C</text:p>
          </table:table-cell>
          <table:table-cell office:value-type="string" calcext:value-type="string">
            <text:p>4130.548 Ω</text:p>
          </table:table-cell>
          <table:table-cell office:value-type="string" calcext:value-type="string">
            <text:p>232°F</text:p>
          </table:table-cell>
          <table:table-cell office:value-type="string" calcext:value-type="string">
            <text:p>111.111°C</text:p>
          </table:table-cell>
          <table:table-cell office:value-type="string" calcext:value-type="string">
            <text:p>605.611 Ω</text:p>
          </table:table-cell>
        </table:table-row>
        <table:table-row table:style-name="ro1">
          <table:table-cell office:value-type="string" calcext:value-type="string">
            <text:p>7°F</text:p>
          </table:table-cell>
          <table:table-cell office:value-type="string" calcext:value-type="string">
            <text:p>-13.889°C</text:p>
          </table:table-cell>
          <table:table-cell office:value-type="string" calcext:value-type="string">
            <text:p>57731.321 Ω</text:p>
          </table:table-cell>
          <table:table-cell office:value-type="string" calcext:value-type="string">
            <text:p>120°F</text:p>
          </table:table-cell>
          <table:table-cell office:value-type="string" calcext:value-type="string">
            <text:p>48.889°C</text:p>
          </table:table-cell>
          <table:table-cell office:value-type="string" calcext:value-type="string">
            <text:p>4049.768 Ω</text:p>
          </table:table-cell>
          <table:table-cell office:value-type="string" calcext:value-type="string">
            <text:p>233°F</text:p>
          </table:table-cell>
          <table:table-cell office:value-type="string" calcext:value-type="string">
            <text:p>111.667°C</text:p>
          </table:table-cell>
          <table:table-cell office:value-type="string" calcext:value-type="string">
            <text:p>596.854 Ω</text:p>
          </table:table-cell>
        </table:table-row>
        <table:table-row table:style-name="ro1">
          <table:table-cell office:value-type="string" calcext:value-type="string">
            <text:p>8°F</text:p>
          </table:table-cell>
          <table:table-cell office:value-type="string" calcext:value-type="string">
            <text:p>-13.333°C</text:p>
          </table:table-cell>
          <table:table-cell office:value-type="string" calcext:value-type="string">
            <text:p>56141.516 Ω</text:p>
          </table:table-cell>
          <table:table-cell office:value-type="string" calcext:value-type="string">
            <text:p>121°F</text:p>
          </table:table-cell>
          <table:table-cell office:value-type="string" calcext:value-type="string">
            <text:p>49.444°C</text:p>
          </table:table-cell>
          <table:table-cell office:value-type="string" calcext:value-type="string">
            <text:p>3970.794 Ω</text:p>
          </table:table-cell>
          <table:table-cell office:value-type="string" calcext:value-type="string">
            <text:p>234°F</text:p>
          </table:table-cell>
          <table:table-cell office:value-type="string" calcext:value-type="string">
            <text:p>112.222°C</text:p>
          </table:table-cell>
          <table:table-cell office:value-type="string" calcext:value-type="string">
            <text:p>588.244 Ω</text:p>
          </table:table-cell>
        </table:table-row>
        <table:table-row table:style-name="ro1">
          <table:table-cell office:value-type="string" calcext:value-type="string">
            <text:p>9°F</text:p>
          </table:table-cell>
          <table:table-cell office:value-type="string" calcext:value-type="string">
            <text:p>-12.778°C</text:p>
          </table:table-cell>
          <table:table-cell office:value-type="string" calcext:value-type="string">
            <text:p>54600.502 Ω</text:p>
          </table:table-cell>
          <table:table-cell office:value-type="string" calcext:value-type="string">
            <text:p>122°F</text:p>
          </table:table-cell>
          <table:table-cell office:value-type="string" calcext:value-type="string">
            <text:p>50.000°C</text:p>
          </table:table-cell>
          <table:table-cell office:value-type="string" calcext:value-type="string">
            <text:p>3893.580 Ω</text:p>
          </table:table-cell>
          <table:table-cell office:value-type="string" calcext:value-type="string">
            <text:p>235°F</text:p>
          </table:table-cell>
          <table:table-cell office:value-type="string" calcext:value-type="string">
            <text:p>112.778°C</text:p>
          </table:table-cell>
          <table:table-cell office:value-type="string" calcext:value-type="string">
            <text:p>579.780 Ω</text:p>
          </table:table-cell>
        </table:table-row>
        <table:table-row table:style-name="ro1">
          <table:table-cell office:value-type="string" calcext:value-type="string">
            <text:p>10°F</text:p>
          </table:table-cell>
          <table:table-cell office:value-type="string" calcext:value-type="string">
            <text:p>-12.222°C</text:p>
          </table:table-cell>
          <table:table-cell office:value-type="string" calcext:value-type="string">
            <text:p>53106.641 Ω</text:p>
          </table:table-cell>
          <table:table-cell office:value-type="string" calcext:value-type="string">
            <text:p>123°F</text:p>
          </table:table-cell>
          <table:table-cell office:value-type="string" calcext:value-type="string">
            <text:p>50.556°C</text:p>
          </table:table-cell>
          <table:table-cell office:value-type="string" calcext:value-type="string">
            <text:p>3818.084 Ω</text:p>
          </table:table-cell>
          <table:table-cell office:value-type="string" calcext:value-type="string">
            <text:p>236°F</text:p>
          </table:table-cell>
          <table:table-cell office:value-type="string" calcext:value-type="string">
            <text:p>113.333°C</text:p>
          </table:table-cell>
          <table:table-cell office:value-type="string" calcext:value-type="string">
            <text:p>571.459 Ω</text:p>
          </table:table-cell>
        </table:table-row>
        <table:table-row table:style-name="ro1">
          <table:table-cell office:value-type="string" calcext:value-type="string">
            <text:p>11°F</text:p>
          </table:table-cell>
          <table:table-cell office:value-type="string" calcext:value-type="string">
            <text:p>-11.667°C</text:p>
          </table:table-cell>
          <table:table-cell office:value-type="string" calcext:value-type="string">
            <text:p>51658.352 Ω</text:p>
          </table:table-cell>
          <table:table-cell office:value-type="string" calcext:value-type="string">
            <text:p>124°F</text:p>
          </table:table-cell>
          <table:table-cell office:value-type="string" calcext:value-type="string">
            <text:p>51.111°C</text:p>
          </table:table-cell>
          <table:table-cell office:value-type="string" calcext:value-type="string">
            <text:p>3744.262 Ω</text:p>
          </table:table-cell>
          <table:table-cell office:value-type="string" calcext:value-type="string">
            <text:p>237°F</text:p>
          </table:table-cell>
          <table:table-cell office:value-type="string" calcext:value-type="string">
            <text:p>113.889°C</text:p>
          </table:table-cell>
          <table:table-cell office:value-type="string" calcext:value-type="string">
            <text:p>563.277 Ω</text:p>
          </table:table-cell>
        </table:table-row>
        <table:table-row table:style-name="ro1">
          <table:table-cell office:value-type="string" calcext:value-type="string">
            <text:p>12°F</text:p>
          </table:table-cell>
          <table:table-cell office:value-type="string" calcext:value-type="string">
            <text:p>-11.111°C</text:p>
          </table:table-cell>
          <table:table-cell office:value-type="string" calcext:value-type="string">
            <text:p>50254.113 Ω</text:p>
          </table:table-cell>
          <table:table-cell office:value-type="string" calcext:value-type="string">
            <text:p>125°F</text:p>
          </table:table-cell>
          <table:table-cell office:value-type="string" calcext:value-type="string">
            <text:p>51.667°C</text:p>
          </table:table-cell>
          <table:table-cell office:value-type="string" calcext:value-type="string">
            <text:p>3672.072 Ω</text:p>
          </table:table-cell>
          <table:table-cell office:value-type="string" calcext:value-type="string">
            <text:p>238°F</text:p>
          </table:table-cell>
          <table:table-cell office:value-type="string" calcext:value-type="string">
            <text:p>114.444°C</text:p>
          </table:table-cell>
          <table:table-cell office:value-type="string" calcext:value-type="string">
            <text:p>555.232 Ω</text:p>
          </table:table-cell>
        </table:table-row>
        <table:table-row table:style-name="ro1">
          <table:table-cell office:value-type="string" calcext:value-type="string">
            <text:p>13°F</text:p>
          </table:table-cell>
          <table:table-cell office:value-type="string" calcext:value-type="string">
            <text:p>-10.556°C</text:p>
          </table:table-cell>
          <table:table-cell office:value-type="string" calcext:value-type="string">
            <text:p>48892.457 Ω</text:p>
          </table:table-cell>
          <table:table-cell office:value-type="string" calcext:value-type="string">
            <text:p>126°F</text:p>
          </table:table-cell>
          <table:table-cell office:value-type="string" calcext:value-type="string">
            <text:p>52.222°C</text:p>
          </table:table-cell>
          <table:table-cell office:value-type="string" calcext:value-type="string">
            <text:p>3601.475 Ω</text:p>
          </table:table-cell>
          <table:table-cell office:value-type="string" calcext:value-type="string">
            <text:p>239°F</text:p>
          </table:table-cell>
          <table:table-cell office:value-type="string" calcext:value-type="string">
            <text:p>115.000°C</text:p>
          </table:table-cell>
          <table:table-cell office:value-type="string" calcext:value-type="string">
            <text:p>547.322 Ω</text:p>
          </table:table-cell>
        </table:table-row>
        <table:table-row table:style-name="ro1">
          <table:table-cell office:value-type="string" calcext:value-type="string">
            <text:p>14°F</text:p>
          </table:table-cell>
          <table:table-cell office:value-type="string" calcext:value-type="string">
            <text:p>-10.000°C</text:p>
          </table:table-cell>
          <table:table-cell office:value-type="string" calcext:value-type="string">
            <text:p>47571.969 Ω</text:p>
          </table:table-cell>
          <table:table-cell office:value-type="string" calcext:value-type="string">
            <text:p>127°F</text:p>
          </table:table-cell>
          <table:table-cell office:value-type="string" calcext:value-type="string">
            <text:p>52.778°C</text:p>
          </table:table-cell>
          <table:table-cell office:value-type="string" calcext:value-type="string">
            <text:p>3532.431 Ω</text:p>
          </table:table-cell>
          <table:table-cell office:value-type="string" calcext:value-type="string">
            <text:p>240°F</text:p>
          </table:table-cell>
          <table:table-cell office:value-type="string" calcext:value-type="string">
            <text:p>115.556°C</text:p>
          </table:table-cell>
          <table:table-cell office:value-type="string" calcext:value-type="string">
            <text:p>539.544 Ω</text:p>
          </table:table-cell>
        </table:table-row>
        <table:table-row table:style-name="ro1">
          <table:table-cell office:value-type="string" calcext:value-type="string">
            <text:p>15°F</text:p>
          </table:table-cell>
          <table:table-cell office:value-type="string" calcext:value-type="string">
            <text:p>-9.444°C</text:p>
          </table:table-cell>
          <table:table-cell office:value-type="string" calcext:value-type="string">
            <text:p>46291.285 Ω</text:p>
          </table:table-cell>
          <table:table-cell office:value-type="string" calcext:value-type="string">
            <text:p>128°F</text:p>
          </table:table-cell>
          <table:table-cell office:value-type="string" calcext:value-type="string">
            <text:p>53.333°C</text:p>
          </table:table-cell>
          <table:table-cell office:value-type="string" calcext:value-type="string">
            <text:p>3464.903 Ω</text:p>
          </table:table-cell>
          <table:table-cell office:value-type="string" calcext:value-type="string">
            <text:p>241°F</text:p>
          </table:table-cell>
          <table:table-cell office:value-type="string" calcext:value-type="string">
            <text:p>116.111°C</text:p>
          </table:table-cell>
          <table:table-cell office:value-type="string" calcext:value-type="string">
            <text:p>531.895 Ω</text:p>
          </table:table-cell>
        </table:table-row>
        <table:table-row table:style-name="ro1">
          <table:table-cell office:value-type="string" calcext:value-type="string">
            <text:p>16°F</text:p>
          </table:table-cell>
          <table:table-cell office:value-type="string" calcext:value-type="string">
            <text:p>-8.889°C</text:p>
          </table:table-cell>
          <table:table-cell office:value-type="string" calcext:value-type="string">
            <text:p>45049.091 Ω</text:p>
          </table:table-cell>
          <table:table-cell office:value-type="string" calcext:value-type="string">
            <text:p>129°F</text:p>
          </table:table-cell>
          <table:table-cell office:value-type="string" calcext:value-type="string">
            <text:p>53.889°C</text:p>
          </table:table-cell>
          <table:table-cell office:value-type="string" calcext:value-type="string">
            <text:p>3398.852 Ω</text:p>
          </table:table-cell>
          <table:table-cell office:value-type="string" calcext:value-type="string">
            <text:p>242°F</text:p>
          </table:table-cell>
          <table:table-cell office:value-type="string" calcext:value-type="string">
            <text:p>116.667°C</text:p>
          </table:table-cell>
          <table:table-cell office:value-type="string" calcext:value-type="string">
            <text:p>524.374 Ω</text:p>
          </table:table-cell>
        </table:table-row>
        <table:table-row table:style-name="ro1">
          <table:table-cell office:value-type="string" calcext:value-type="string">
            <text:p>17°F</text:p>
          </table:table-cell>
          <table:table-cell office:value-type="string" calcext:value-type="string">
            <text:p>-8.333°C</text:p>
          </table:table-cell>
          <table:table-cell office:value-type="string" calcext:value-type="string">
            <text:p>43844.117 Ω</text:p>
          </table:table-cell>
          <table:table-cell office:value-type="string" calcext:value-type="string">
            <text:p>130°F</text:p>
          </table:table-cell>
          <table:table-cell office:value-type="string" calcext:value-type="string">
            <text:p>54.444°C</text:p>
          </table:table-cell>
          <table:table-cell office:value-type="string" calcext:value-type="string">
            <text:p>3334.244 Ω</text:p>
          </table:table-cell>
          <table:table-cell office:value-type="string" calcext:value-type="string">
            <text:p>243°F</text:p>
          </table:table-cell>
          <table:table-cell office:value-type="string" calcext:value-type="string">
            <text:p>117.222°C</text:p>
          </table:table-cell>
          <table:table-cell office:value-type="string" calcext:value-type="string">
            <text:p>516.977 Ω</text:p>
          </table:table-cell>
        </table:table-row>
        <table:table-row table:style-name="ro1">
          <table:table-cell office:value-type="string" calcext:value-type="string">
            <text:p>18°F</text:p>
          </table:table-cell>
          <table:table-cell office:value-type="string" calcext:value-type="string">
            <text:p>-7.778°C</text:p>
          </table:table-cell>
          <table:table-cell office:value-type="string" calcext:value-type="string">
            <text:p>42675.143 Ω</text:p>
          </table:table-cell>
          <table:table-cell office:value-type="string" calcext:value-type="string">
            <text:p>131°F</text:p>
          </table:table-cell>
          <table:table-cell office:value-type="string" calcext:value-type="string">
            <text:p>55.000°C</text:p>
          </table:table-cell>
          <table:table-cell office:value-type="string" calcext:value-type="string">
            <text:p>3271.042 Ω</text:p>
          </table:table-cell>
          <table:table-cell office:value-type="string" calcext:value-type="string">
            <text:p>244°F</text:p>
          </table:table-cell>
          <table:table-cell office:value-type="string" calcext:value-type="string">
            <text:p>117.778°C</text:p>
          </table:table-cell>
          <table:table-cell office:value-type="string" calcext:value-type="string">
            <text:p>509.702 Ω</text:p>
          </table:table-cell>
        </table:table-row>
        <table:table-row table:style-name="ro1">
          <table:table-cell office:value-type="string" calcext:value-type="string">
            <text:p>19°F</text:p>
          </table:table-cell>
          <table:table-cell office:value-type="string" calcext:value-type="string">
            <text:p>-7.222°C</text:p>
          </table:table-cell>
          <table:table-cell office:value-type="string" calcext:value-type="string">
            <text:p>41540.987 Ω</text:p>
          </table:table-cell>
          <table:table-cell office:value-type="string" calcext:value-type="string">
            <text:p>132°F</text:p>
          </table:table-cell>
          <table:table-cell office:value-type="string" calcext:value-type="string">
            <text:p>55.556°C</text:p>
          </table:table-cell>
          <table:table-cell office:value-type="string" calcext:value-type="string">
            <text:p>3209.213 Ω</text:p>
          </table:table-cell>
          <table:table-cell office:value-type="string" calcext:value-type="string">
            <text:p>245°F</text:p>
          </table:table-cell>
          <table:table-cell office:value-type="string" calcext:value-type="string">
            <text:p>118.333°C</text:p>
          </table:table-cell>
          <table:table-cell office:value-type="string" calcext:value-type="string">
            <text:p>502.547 Ω</text:p>
          </table:table-cell>
        </table:table-row>
        <table:table-row table:style-name="ro1">
          <table:table-cell office:value-type="string" calcext:value-type="string">
            <text:p>20°F</text:p>
          </table:table-cell>
          <table:table-cell office:value-type="string" calcext:value-type="string">
            <text:p>-6.667°C</text:p>
          </table:table-cell>
          <table:table-cell office:value-type="string" calcext:value-type="string">
            <text:p>40440.513 Ω</text:p>
          </table:table-cell>
          <table:table-cell office:value-type="string" calcext:value-type="string">
            <text:p>133°F</text:p>
          </table:table-cell>
          <table:table-cell office:value-type="string" calcext:value-type="string">
            <text:p>56.111°C</text:p>
          </table:table-cell>
          <table:table-cell office:value-type="string" calcext:value-type="string">
            <text:p>3148.722 Ω</text:p>
          </table:table-cell>
          <table:table-cell office:value-type="string" calcext:value-type="string">
            <text:p>246°F</text:p>
          </table:table-cell>
          <table:table-cell office:value-type="string" calcext:value-type="string">
            <text:p>118.889°C</text:p>
          </table:table-cell>
          <table:table-cell office:value-type="string" calcext:value-type="string">
            <text:p>495.511 Ω</text:p>
          </table:table-cell>
        </table:table-row>
        <table:table-row table:style-name="ro1">
          <table:table-cell office:value-type="string" calcext:value-type="string">
            <text:p>21°F</text:p>
          </table:table-cell>
          <table:table-cell office:value-type="string" calcext:value-type="string">
            <text:p>-6.111°C</text:p>
          </table:table-cell>
          <table:table-cell office:value-type="string" calcext:value-type="string">
            <text:p>39372.624 Ω</text:p>
          </table:table-cell>
          <table:table-cell office:value-type="string" calcext:value-type="string">
            <text:p>134°F</text:p>
          </table:table-cell>
          <table:table-cell office:value-type="string" calcext:value-type="string">
            <text:p>56.667°C</text:p>
          </table:table-cell>
          <table:table-cell office:value-type="string" calcext:value-type="string">
            <text:p>3089.539 Ω</text:p>
          </table:table-cell>
          <table:table-cell office:value-type="string" calcext:value-type="string">
            <text:p>247°F</text:p>
          </table:table-cell>
          <table:table-cell office:value-type="string" calcext:value-type="string">
            <text:p>119.444°C</text:p>
          </table:table-cell>
          <table:table-cell office:value-type="string" calcext:value-type="string">
            <text:p>488.589 Ω</text:p>
          </table:table-cell>
        </table:table-row>
        <table:table-row table:style-name="ro1">
          <table:table-cell office:value-type="string" calcext:value-type="string">
            <text:p>22°F</text:p>
          </table:table-cell>
          <table:table-cell office:value-type="string" calcext:value-type="string">
            <text:p>-5.556°C</text:p>
          </table:table-cell>
          <table:table-cell office:value-type="string" calcext:value-type="string">
            <text:p>38336.260 Ω</text:p>
          </table:table-cell>
          <table:table-cell office:value-type="string" calcext:value-type="string">
            <text:p>135°F</text:p>
          </table:table-cell>
          <table:table-cell office:value-type="string" calcext:value-type="string">
            <text:p>57.222°C</text:p>
          </table:table-cell>
          <table:table-cell office:value-type="string" calcext:value-type="string">
            <text:p>3031.631 Ω</text:p>
          </table:table-cell>
          <table:table-cell office:value-type="string" calcext:value-type="string">
            <text:p>248°F</text:p>
          </table:table-cell>
          <table:table-cell office:value-type="string" calcext:value-type="string">
            <text:p>120.000°C</text:p>
          </table:table-cell>
          <table:table-cell office:value-type="string" calcext:value-type="string">
            <text:p>481.781 Ω</text:p>
          </table:table-cell>
        </table:table-row>
        <table:table-row table:style-name="ro1">
          <table:table-cell office:value-type="string" calcext:value-type="string">
            <text:p>23°F</text:p>
          </table:table-cell>
          <table:table-cell office:value-type="string" calcext:value-type="string">
            <text:p>-5.000°C</text:p>
          </table:table-cell>
          <table:table-cell office:value-type="string" calcext:value-type="string">
            <text:p>37330.401 Ω</text:p>
          </table:table-cell>
          <table:table-cell office:value-type="string" calcext:value-type="string">
            <text:p>136°F</text:p>
          </table:table-cell>
          <table:table-cell office:value-type="string" calcext:value-type="string">
            <text:p>57.778°C</text:p>
          </table:table-cell>
          <table:table-cell office:value-type="string" calcext:value-type="string">
            <text:p>2974.967 Ω</text:p>
          </table:table-cell>
          <table:table-cell office:value-type="string" calcext:value-type="string">
            <text:p>249°F</text:p>
          </table:table-cell>
          <table:table-cell office:value-type="string" calcext:value-type="string">
            <text:p>120.556°C</text:p>
          </table:table-cell>
          <table:table-cell office:value-type="string" calcext:value-type="string">
            <text:p>475.085 Ω</text:p>
          </table:table-cell>
        </table:table-row>
        <table:table-row table:style-name="ro1">
          <table:table-cell office:value-type="string" calcext:value-type="string">
            <text:p>24°F</text:p>
          </table:table-cell>
          <table:table-cell office:value-type="string" calcext:value-type="string">
            <text:p>-4.444°C</text:p>
          </table:table-cell>
          <table:table-cell office:value-type="string" calcext:value-type="string">
            <text:p>36354.061 Ω</text:p>
          </table:table-cell>
          <table:table-cell office:value-type="string" calcext:value-type="string">
            <text:p>137°F</text:p>
          </table:table-cell>
          <table:table-cell office:value-type="string" calcext:value-type="string">
            <text:p>58.333°C</text:p>
          </table:table-cell>
          <table:table-cell office:value-type="string" calcext:value-type="string">
            <text:p>2919.518 Ω</text:p>
          </table:table-cell>
          <table:table-cell office:value-type="string" calcext:value-type="string">
            <text:p>250°F</text:p>
          </table:table-cell>
          <table:table-cell office:value-type="string" calcext:value-type="string">
            <text:p>121.111°C</text:p>
          </table:table-cell>
          <table:table-cell office:value-type="string" calcext:value-type="string">
            <text:p>468.497 Ω</text:p>
          </table:table-cell>
        </table:table-row>
        <table:table-row table:style-name="ro1">
          <table:table-cell office:value-type="string" calcext:value-type="string">
            <text:p>25°F</text:p>
          </table:table-cell>
          <table:table-cell office:value-type="string" calcext:value-type="string">
            <text:p>-3.889°C</text:p>
          </table:table-cell>
          <table:table-cell office:value-type="string" calcext:value-type="string">
            <text:p>35406.290 Ω</text:p>
          </table:table-cell>
          <table:table-cell office:value-type="string" calcext:value-type="string">
            <text:p>138°F</text:p>
          </table:table-cell>
          <table:table-cell office:value-type="string" calcext:value-type="string">
            <text:p>58.889°C</text:p>
          </table:table-cell>
          <table:table-cell office:value-type="string" calcext:value-type="string">
            <text:p>2865.255 Ω</text:p>
          </table:table-cell>
          <table:table-cell office:value-type="string" calcext:value-type="string">
            <text:p>251°F</text:p>
          </table:table-cell>
          <table:table-cell office:value-type="string" calcext:value-type="string">
            <text:p>121.667°C</text:p>
          </table:table-cell>
          <table:table-cell office:value-type="string" calcext:value-type="string">
            <text:p>462.017 Ω</text:p>
          </table:table-cell>
        </table:table-row>
        <table:table-row table:style-name="ro1">
          <table:table-cell office:value-type="string" calcext:value-type="string">
            <text:p>26°F</text:p>
          </table:table-cell>
          <table:table-cell office:value-type="string" calcext:value-type="string">
            <text:p>-3.333°C</text:p>
          </table:table-cell>
          <table:table-cell office:value-type="string" calcext:value-type="string">
            <text:p>34486.168 Ω</text:p>
          </table:table-cell>
          <table:table-cell office:value-type="string" calcext:value-type="string">
            <text:p>139°F</text:p>
          </table:table-cell>
          <table:table-cell office:value-type="string" calcext:value-type="string">
            <text:p>59.444°C</text:p>
          </table:table-cell>
          <table:table-cell office:value-type="string" calcext:value-type="string">
            <text:p>2812.148 Ω</text:p>
          </table:table-cell>
          <table:table-cell office:value-type="string" calcext:value-type="string">
            <text:p>252°F</text:p>
          </table:table-cell>
          <table:table-cell office:value-type="string" calcext:value-type="string">
            <text:p>122.222°C</text:p>
          </table:table-cell>
          <table:table-cell office:value-type="string" calcext:value-type="string">
            <text:p>455.642 Ω</text:p>
          </table:table-cell>
        </table:table-row>
        <table:table-row table:style-name="ro1">
          <table:table-cell office:value-type="string" calcext:value-type="string">
            <text:p>27°F</text:p>
          </table:table-cell>
          <table:table-cell office:value-type="string" calcext:value-type="string">
            <text:p>-2.778°C</text:p>
          </table:table-cell>
          <table:table-cell office:value-type="string" calcext:value-type="string">
            <text:p>33592.811 Ω</text:p>
          </table:table-cell>
          <table:table-cell office:value-type="string" calcext:value-type="string">
            <text:p>140°F</text:p>
          </table:table-cell>
          <table:table-cell office:value-type="string" calcext:value-type="string">
            <text:p>60.000°C</text:p>
          </table:table-cell>
          <table:table-cell office:value-type="string" calcext:value-type="string">
            <text:p>2760.172 Ω</text:p>
          </table:table-cell>
          <table:table-cell office:value-type="string" calcext:value-type="string">
            <text:p>253°F</text:p>
          </table:table-cell>
          <table:table-cell office:value-type="string" calcext:value-type="string">
            <text:p>122.778°C</text:p>
          </table:table-cell>
          <table:table-cell office:value-type="string" calcext:value-type="string">
            <text:p>449.371 Ω</text:p>
          </table:table-cell>
        </table:table-row>
        <table:table-row table:style-name="ro1">
          <table:table-cell office:value-type="string" calcext:value-type="string">
            <text:p>28°F</text:p>
          </table:table-cell>
          <table:table-cell office:value-type="string" calcext:value-type="string">
            <text:p>-2.222°C</text:p>
          </table:table-cell>
          <table:table-cell office:value-type="string" calcext:value-type="string">
            <text:p>32725.363 Ω</text:p>
          </table:table-cell>
          <table:table-cell office:value-type="string" calcext:value-type="string">
            <text:p>141°F</text:p>
          </table:table-cell>
          <table:table-cell office:value-type="string" calcext:value-type="string">
            <text:p>60.556°C</text:p>
          </table:table-cell>
          <table:table-cell office:value-type="string" calcext:value-type="string">
            <text:p>2709.298 Ω</text:p>
          </table:table-cell>
          <table:table-cell office:value-type="string" calcext:value-type="string">
            <text:p>254°F</text:p>
          </table:table-cell>
          <table:table-cell office:value-type="string" calcext:value-type="string">
            <text:p>123.333°C</text:p>
          </table:table-cell>
          <table:table-cell office:value-type="string" calcext:value-type="string">
            <text:p>443.200 Ω</text:p>
          </table:table-cell>
        </table:table-row>
        <table:table-row table:style-name="ro1">
          <table:table-cell office:value-type="string" calcext:value-type="string">
            <text:p>29°F</text:p>
          </table:table-cell>
          <table:table-cell office:value-type="string" calcext:value-type="string">
            <text:p>-1.667°C</text:p>
          </table:table-cell>
          <table:table-cell office:value-type="string" calcext:value-type="string">
            <text:p>31882.999 Ω</text:p>
          </table:table-cell>
          <table:table-cell office:value-type="string" calcext:value-type="string">
            <text:p>142°F</text:p>
          </table:table-cell>
          <table:table-cell office:value-type="string" calcext:value-type="string">
            <text:p>61.111°C</text:p>
          </table:table-cell>
          <table:table-cell office:value-type="string" calcext:value-type="string">
            <text:p>2659.500 Ω</text:p>
          </table:table-cell>
          <table:table-cell office:value-type="string" calcext:value-type="string">
            <text:p>255°F</text:p>
          </table:table-cell>
          <table:table-cell office:value-type="string" calcext:value-type="string">
            <text:p>123.889°C</text:p>
          </table:table-cell>
          <table:table-cell office:value-type="string" calcext:value-type="string">
            <text:p>437.130 Ω</text:p>
          </table:table-cell>
        </table:table-row>
        <table:table-row table:style-name="ro1">
          <table:table-cell office:value-type="string" calcext:value-type="string">
            <text:p>30°F</text:p>
          </table:table-cell>
          <table:table-cell office:value-type="string" calcext:value-type="string">
            <text:p>-1.111°C</text:p>
          </table:table-cell>
          <table:table-cell office:value-type="string" calcext:value-type="string">
            <text:p>31064.922 Ω</text:p>
          </table:table-cell>
          <table:table-cell office:value-type="string" calcext:value-type="string">
            <text:p>143°F</text:p>
          </table:table-cell>
          <table:table-cell office:value-type="string" calcext:value-type="string">
            <text:p>61.667°C</text:p>
          </table:table-cell>
          <table:table-cell office:value-type="string" calcext:value-type="string">
            <text:p>2610.754 Ω</text:p>
          </table:table-cell>
          <table:table-cell office:value-type="string" calcext:value-type="string">
            <text:p>256°F</text:p>
          </table:table-cell>
          <table:table-cell office:value-type="string" calcext:value-type="string">
            <text:p>124.444°C</text:p>
          </table:table-cell>
          <table:table-cell office:value-type="string" calcext:value-type="string">
            <text:p>431.157 Ω</text:p>
          </table:table-cell>
        </table:table-row>
        <table:table-row table:style-name="ro1">
          <table:table-cell office:value-type="string" calcext:value-type="string">
            <text:p>31°F</text:p>
          </table:table-cell>
          <table:table-cell office:value-type="string" calcext:value-type="string">
            <text:p>-0.556°C</text:p>
          </table:table-cell>
          <table:table-cell office:value-type="string" calcext:value-type="string">
            <text:p>30270.362 Ω</text:p>
          </table:table-cell>
          <table:table-cell office:value-type="string" calcext:value-type="string">
            <text:p>144°F</text:p>
          </table:table-cell>
          <table:table-cell office:value-type="string" calcext:value-type="string">
            <text:p>62.222°C</text:p>
          </table:table-cell>
          <table:table-cell office:value-type="string" calcext:value-type="string">
            <text:p>2563.033 Ω</text:p>
          </table:table-cell>
          <table:table-cell office:value-type="string" calcext:value-type="string">
            <text:p>257°F</text:p>
          </table:table-cell>
          <table:table-cell office:value-type="string" calcext:value-type="string">
            <text:p>125.000°C</text:p>
          </table:table-cell>
          <table:table-cell office:value-type="string" calcext:value-type="string">
            <text:p>425.279 Ω</text:p>
          </table:table-cell>
        </table:table-row>
        <table:table-row table:style-name="ro1">
          <table:table-cell office:value-type="string" calcext:value-type="string">
            <text:p>32°F</text:p>
          </table:table-cell>
          <table:table-cell office:value-type="string" calcext:value-type="string">
            <text:p>0.000°C</text:p>
          </table:table-cell>
          <table:table-cell office:value-type="string" calcext:value-type="string">
            <text:p>29498.576 Ω</text:p>
          </table:table-cell>
          <table:table-cell office:value-type="string" calcext:value-type="string">
            <text:p>145°F</text:p>
          </table:table-cell>
          <table:table-cell office:value-type="string" calcext:value-type="string">
            <text:p>62.778°C</text:p>
          </table:table-cell>
          <table:table-cell office:value-type="string" calcext:value-type="string">
            <text:p>2516.315 Ω</text:p>
          </table:table-cell>
          <table:table-cell office:value-type="string" calcext:value-type="string">
            <text:p>258°F</text:p>
          </table:table-cell>
          <table:table-cell office:value-type="string" calcext:value-type="string">
            <text:p>125.556°C</text:p>
          </table:table-cell>
          <table:table-cell office:value-type="string" calcext:value-type="string">
            <text:p>419.496 Ω</text:p>
          </table:table-cell>
        </table:table-row>
        <table:table-row table:style-name="ro1">
          <table:table-cell office:value-type="string" calcext:value-type="string">
            <text:p>33°F</text:p>
          </table:table-cell>
          <table:table-cell office:value-type="string" calcext:value-type="string">
            <text:p>0.556°C</text:p>
          </table:table-cell>
          <table:table-cell office:value-type="string" calcext:value-type="string">
            <text:p>28748.847 Ω</text:p>
          </table:table-cell>
          <table:table-cell office:value-type="string" calcext:value-type="string">
            <text:p>146°F</text:p>
          </table:table-cell>
          <table:table-cell office:value-type="string" calcext:value-type="string">
            <text:p>63.333°C</text:p>
          </table:table-cell>
          <table:table-cell office:value-type="string" calcext:value-type="string">
            <text:p>2470.575 Ω</text:p>
          </table:table-cell>
          <table:table-cell office:value-type="string" calcext:value-type="string">
            <text:p>259°F</text:p>
          </table:table-cell>
          <table:table-cell office:value-type="string" calcext:value-type="string">
            <text:p>126.111°C</text:p>
          </table:table-cell>
          <table:table-cell office:value-type="string" calcext:value-type="string">
            <text:p>413.806 Ω</text:p>
          </table:table-cell>
        </table:table-row>
        <table:table-row table:style-name="ro1">
          <table:table-cell office:value-type="string" calcext:value-type="string">
            <text:p>34°F</text:p>
          </table:table-cell>
          <table:table-cell office:value-type="string" calcext:value-type="string">
            <text:p>1.111°C</text:p>
          </table:table-cell>
          <table:table-cell office:value-type="string" calcext:value-type="string">
            <text:p>28020.481 Ω</text:p>
          </table:table-cell>
          <table:table-cell office:value-type="string" calcext:value-type="string">
            <text:p>147°F</text:p>
          </table:table-cell>
          <table:table-cell office:value-type="string" calcext:value-type="string">
            <text:p>63.889°C</text:p>
          </table:table-cell>
          <table:table-cell office:value-type="string" calcext:value-type="string">
            <text:p>2425.791 Ω</text:p>
          </table:table-cell>
          <table:table-cell office:value-type="string" calcext:value-type="string">
            <text:p>260°F</text:p>
          </table:table-cell>
          <table:table-cell office:value-type="string" calcext:value-type="string">
            <text:p>126.667°C</text:p>
          </table:table-cell>
          <table:table-cell office:value-type="string" calcext:value-type="string">
            <text:p>408.206 Ω</text:p>
          </table:table-cell>
        </table:table-row>
        <table:table-row table:style-name="ro1">
          <table:table-cell office:value-type="string" calcext:value-type="string">
            <text:p>35°F</text:p>
          </table:table-cell>
          <table:table-cell office:value-type="string" calcext:value-type="string">
            <text:p>1.667°C</text:p>
          </table:table-cell>
          <table:table-cell office:value-type="string" calcext:value-type="string">
            <text:p>27312.809 Ω</text:p>
          </table:table-cell>
          <table:table-cell office:value-type="string" calcext:value-type="string">
            <text:p>148°F</text:p>
          </table:table-cell>
          <table:table-cell office:value-type="string" calcext:value-type="string">
            <text:p>64.444°C</text:p>
          </table:table-cell>
          <table:table-cell office:value-type="string" calcext:value-type="string">
            <text:p>2381.940 Ω</text:p>
          </table:table-cell>
          <table:table-cell office:value-type="string" calcext:value-type="string">
            <text:p>261°F</text:p>
          </table:table-cell>
          <table:table-cell office:value-type="string" calcext:value-type="string">
            <text:p>127.222°C</text:p>
          </table:table-cell>
          <table:table-cell office:value-type="string" calcext:value-type="string">
            <text:p>402.696 Ω</text:p>
          </table:table-cell>
        </table:table-row>
        <table:table-row table:style-name="ro1">
          <table:table-cell office:value-type="string" calcext:value-type="string">
            <text:p>36°F</text:p>
          </table:table-cell>
          <table:table-cell office:value-type="string" calcext:value-type="string">
            <text:p>2.222°C</text:p>
          </table:table-cell>
          <table:table-cell office:value-type="string" calcext:value-type="string">
            <text:p>26625.184 Ω</text:p>
          </table:table-cell>
          <table:table-cell office:value-type="string" calcext:value-type="string">
            <text:p>149°F</text:p>
          </table:table-cell>
          <table:table-cell office:value-type="string" calcext:value-type="string">
            <text:p>65.000°C</text:p>
          </table:table-cell>
          <table:table-cell office:value-type="string" calcext:value-type="string">
            <text:p>2339.000 Ω</text:p>
          </table:table-cell>
          <table:table-cell office:value-type="string" calcext:value-type="string">
            <text:p>262°F</text:p>
          </table:table-cell>
          <table:table-cell office:value-type="string" calcext:value-type="string">
            <text:p>127.778°C</text:p>
          </table:table-cell>
          <table:table-cell office:value-type="string" calcext:value-type="string">
            <text:p>397.273 Ω</text:p>
          </table:table-cell>
        </table:table-row>
        <table:table-row table:style-name="ro1">
          <table:table-cell office:value-type="string" calcext:value-type="string">
            <text:p>37°F</text:p>
          </table:table-cell>
          <table:table-cell office:value-type="string" calcext:value-type="string">
            <text:p>2.778°C</text:p>
          </table:table-cell>
          <table:table-cell office:value-type="string" calcext:value-type="string">
            <text:p>25956.981 Ω</text:p>
          </table:table-cell>
          <table:table-cell office:value-type="string" calcext:value-type="string">
            <text:p>150°F</text:p>
          </table:table-cell>
          <table:table-cell office:value-type="string" calcext:value-type="string">
            <text:p>65.556°C</text:p>
          </table:table-cell>
          <table:table-cell office:value-type="string" calcext:value-type="string">
            <text:p>2296.950 Ω</text:p>
          </table:table-cell>
          <table:table-cell office:value-type="string" calcext:value-type="string">
            <text:p>263°F</text:p>
          </table:table-cell>
          <table:table-cell office:value-type="string" calcext:value-type="string">
            <text:p>128.333°C</text:p>
          </table:table-cell>
          <table:table-cell office:value-type="string" calcext:value-type="string">
            <text:p>391.935 Ω</text:p>
          </table:table-cell>
        </table:table-row>
        <table:table-row table:style-name="ro1">
          <table:table-cell office:value-type="string" calcext:value-type="string">
            <text:p>38°F</text:p>
          </table:table-cell>
          <table:table-cell office:value-type="string" calcext:value-type="string">
            <text:p>3.333°C</text:p>
          </table:table-cell>
          <table:table-cell office:value-type="string" calcext:value-type="string">
            <text:p>25307.598 Ω</text:p>
          </table:table-cell>
          <table:table-cell office:value-type="string" calcext:value-type="string">
            <text:p>151°F</text:p>
          </table:table-cell>
          <table:table-cell office:value-type="string" calcext:value-type="string">
            <text:p>66.111°C</text:p>
          </table:table-cell>
          <table:table-cell office:value-type="string" calcext:value-type="string">
            <text:p>2255.770 Ω</text:p>
          </table:table-cell>
          <table:table-cell office:value-type="string" calcext:value-type="string">
            <text:p>264°F</text:p>
          </table:table-cell>
          <table:table-cell office:value-type="string" calcext:value-type="string">
            <text:p>128.889°C</text:p>
          </table:table-cell>
          <table:table-cell office:value-type="string" calcext:value-type="string">
            <text:p>386.683 Ω</text:p>
          </table:table-cell>
        </table:table-row>
        <table:table-row table:style-name="ro1">
          <table:table-cell office:value-type="string" calcext:value-type="string">
            <text:p>39°F</text:p>
          </table:table-cell>
          <table:table-cell office:value-type="string" calcext:value-type="string">
            <text:p>3.889°C</text:p>
          </table:table-cell>
          <table:table-cell office:value-type="string" calcext:value-type="string">
            <text:p>24676.449 Ω</text:p>
          </table:table-cell>
          <table:table-cell office:value-type="string" calcext:value-type="string">
            <text:p>152°F</text:p>
          </table:table-cell>
          <table:table-cell office:value-type="string" calcext:value-type="string">
            <text:p>66.667°C</text:p>
          </table:table-cell>
          <table:table-cell office:value-type="string" calcext:value-type="string">
            <text:p>2215.440 Ω</text:p>
          </table:table-cell>
          <table:table-cell office:value-type="string" calcext:value-type="string">
            <text:p>265°F</text:p>
          </table:table-cell>
          <table:table-cell office:value-type="string" calcext:value-type="string">
            <text:p>129.444°C</text:p>
          </table:table-cell>
          <table:table-cell office:value-type="string" calcext:value-type="string">
            <text:p>381.513 Ω</text:p>
          </table:table-cell>
        </table:table-row>
        <table:table-row table:style-name="ro1">
          <table:table-cell office:value-type="string" calcext:value-type="string">
            <text:p>40°F</text:p>
          </table:table-cell>
          <table:table-cell office:value-type="string" calcext:value-type="string">
            <text:p>4.444°C</text:p>
          </table:table-cell>
          <table:table-cell office:value-type="string" calcext:value-type="string">
            <text:p>24062.973 Ω</text:p>
          </table:table-cell>
          <table:table-cell office:value-type="string" calcext:value-type="string">
            <text:p>153°F</text:p>
          </table:table-cell>
          <table:table-cell office:value-type="string" calcext:value-type="string">
            <text:p>67.222°C</text:p>
          </table:table-cell>
          <table:table-cell office:value-type="string" calcext:value-type="string">
            <text:p>2175.939 Ω</text:p>
          </table:table-cell>
          <table:table-cell office:value-type="string" calcext:value-type="string">
            <text:p>266°F</text:p>
          </table:table-cell>
          <table:table-cell office:value-type="string" calcext:value-type="string">
            <text:p>130.000°C</text:p>
          </table:table-cell>
          <table:table-cell office:value-type="string" calcext:value-type="string">
            <text:p>376.424 Ω</text:p>
          </table:table-cell>
        </table:table-row>
        <table:table-row table:style-name="ro1">
          <table:table-cell office:value-type="string" calcext:value-type="string">
            <text:p>41°F</text:p>
          </table:table-cell>
          <table:table-cell office:value-type="string" calcext:value-type="string">
            <text:p>5.000°C</text:p>
          </table:table-cell>
          <table:table-cell office:value-type="string" calcext:value-type="string">
            <text:p>23466.624 Ω</text:p>
          </table:table-cell>
          <table:table-cell office:value-type="string" calcext:value-type="string">
            <text:p>154°F</text:p>
          </table:table-cell>
          <table:table-cell office:value-type="string" calcext:value-type="string">
            <text:p>67.778°C</text:p>
          </table:table-cell>
          <table:table-cell office:value-type="string" calcext:value-type="string">
            <text:p>2137.248 Ω</text:p>
          </table:table-cell>
          <table:table-cell office:value-type="string" calcext:value-type="string">
            <text:p>267°F</text:p>
          </table:table-cell>
          <table:table-cell office:value-type="string" calcext:value-type="string">
            <text:p>130.556°C</text:p>
          </table:table-cell>
          <table:table-cell office:value-type="string" calcext:value-type="string">
            <text:p>371.415 Ω</text:p>
          </table:table-cell>
        </table:table-row>
        <table:table-row table:style-name="ro1">
          <table:table-cell office:value-type="string" calcext:value-type="string">
            <text:p>42°F</text:p>
          </table:table-cell>
          <table:table-cell office:value-type="string" calcext:value-type="string">
            <text:p>5.556°C</text:p>
          </table:table-cell>
          <table:table-cell office:value-type="string" calcext:value-type="string">
            <text:p>22886.875 Ω</text:p>
          </table:table-cell>
          <table:table-cell office:value-type="string" calcext:value-type="string">
            <text:p>155°F</text:p>
          </table:table-cell>
          <table:table-cell office:value-type="string" calcext:value-type="string">
            <text:p>68.333°C</text:p>
          </table:table-cell>
          <table:table-cell office:value-type="string" calcext:value-type="string">
            <text:p>2099.350 Ω</text:p>
          </table:table-cell>
          <table:table-cell office:value-type="string" calcext:value-type="string">
            <text:p>268°F</text:p>
          </table:table-cell>
          <table:table-cell office:value-type="string" calcext:value-type="string">
            <text:p>131.111°C</text:p>
          </table:table-cell>
          <table:table-cell office:value-type="string" calcext:value-type="string">
            <text:p>366.485 Ω</text:p>
          </table:table-cell>
        </table:table-row>
        <table:table-row table:style-name="ro1">
          <table:table-cell office:value-type="string" calcext:value-type="string">
            <text:p>43°F</text:p>
          </table:table-cell>
          <table:table-cell office:value-type="string" calcext:value-type="string">
            <text:p>6.111°C</text:p>
          </table:table-cell>
          <table:table-cell office:value-type="string" calcext:value-type="string">
            <text:p>22323.218 Ω</text:p>
          </table:table-cell>
          <table:table-cell office:value-type="string" calcext:value-type="string">
            <text:p>156°F</text:p>
          </table:table-cell>
          <table:table-cell office:value-type="string" calcext:value-type="string">
            <text:p>68.889°C</text:p>
          </table:table-cell>
          <table:table-cell office:value-type="string" calcext:value-type="string">
            <text:p>2062.226 Ω</text:p>
          </table:table-cell>
          <table:table-cell office:value-type="string" calcext:value-type="string">
            <text:p>269°F</text:p>
          </table:table-cell>
          <table:table-cell office:value-type="string" calcext:value-type="string">
            <text:p>131.667°C</text:p>
          </table:table-cell>
          <table:table-cell office:value-type="string" calcext:value-type="string">
            <text:p>361.632 Ω</text:p>
          </table:table-cell>
        </table:table-row>
        <table:table-row table:style-name="ro1">
          <table:table-cell office:value-type="string" calcext:value-type="string">
            <text:p>44°F</text:p>
          </table:table-cell>
          <table:table-cell office:value-type="string" calcext:value-type="string">
            <text:p>6.667°C</text:p>
          </table:table-cell>
          <table:table-cell office:value-type="string" calcext:value-type="string">
            <text:p>21775.160 Ω</text:p>
          </table:table-cell>
          <table:table-cell office:value-type="string" calcext:value-type="string">
            <text:p>157°F</text:p>
          </table:table-cell>
          <table:table-cell office:value-type="string" calcext:value-type="string">
            <text:p>69.444°C</text:p>
          </table:table-cell>
          <table:table-cell office:value-type="string" calcext:value-type="string">
            <text:p>2025.857 Ω</text:p>
          </table:table-cell>
          <table:table-cell office:value-type="string" calcext:value-type="string">
            <text:p>270°F</text:p>
          </table:table-cell>
          <table:table-cell office:value-type="string" calcext:value-type="string">
            <text:p>132.222°C</text:p>
          </table:table-cell>
          <table:table-cell office:value-type="string" calcext:value-type="string">
            <text:p>356.855 Ω</text:p>
          </table:table-cell>
        </table:table-row>
        <table:table-row table:style-name="ro1">
          <table:table-cell office:value-type="string" calcext:value-type="string">
            <text:p>45°F</text:p>
          </table:table-cell>
          <table:table-cell office:value-type="string" calcext:value-type="string">
            <text:p>7.222°C</text:p>
          </table:table-cell>
          <table:table-cell office:value-type="string" calcext:value-type="string">
            <text:p>21242.227 Ω</text:p>
          </table:table-cell>
          <table:table-cell office:value-type="string" calcext:value-type="string">
            <text:p>158°F</text:p>
          </table:table-cell>
          <table:table-cell office:value-type="string" calcext:value-type="string">
            <text:p>70.000°C</text:p>
          </table:table-cell>
          <table:table-cell office:value-type="string" calcext:value-type="string">
            <text:p>1990.227 Ω</text:p>
          </table:table-cell>
          <table:table-cell office:value-type="string" calcext:value-type="string">
            <text:p>271°F</text:p>
          </table:table-cell>
          <table:table-cell office:value-type="string" calcext:value-type="string">
            <text:p>132.778°C</text:p>
          </table:table-cell>
          <table:table-cell office:value-type="string" calcext:value-type="string">
            <text:p>352.152 Ω</text:p>
          </table:table-cell>
        </table:table-row>
        <table:table-row table:style-name="ro1">
          <table:table-cell office:value-type="string" calcext:value-type="string">
            <text:p>46°F</text:p>
          </table:table-cell>
          <table:table-cell office:value-type="string" calcext:value-type="string">
            <text:p>7.778°C</text:p>
          </table:table-cell>
          <table:table-cell office:value-type="string" calcext:value-type="string">
            <text:p>20723.957 Ω</text:p>
          </table:table-cell>
          <table:table-cell office:value-type="string" calcext:value-type="string">
            <text:p>159°F</text:p>
          </table:table-cell>
          <table:table-cell office:value-type="string" calcext:value-type="string">
            <text:p>70.556°C</text:p>
          </table:table-cell>
          <table:table-cell office:value-type="string" calcext:value-type="string">
            <text:p>1955.319 Ω</text:p>
          </table:table-cell>
          <table:table-cell office:value-type="string" calcext:value-type="string">
            <text:p>272°F</text:p>
          </table:table-cell>
          <table:table-cell office:value-type="string" calcext:value-type="string">
            <text:p>133.333°C</text:p>
          </table:table-cell>
          <table:table-cell office:value-type="string" calcext:value-type="string">
            <text:p>347.522 Ω</text:p>
          </table:table-cell>
        </table:table-row>
        <table:table-row table:style-name="ro1">
          <table:table-cell office:value-type="string" calcext:value-type="string">
            <text:p>47°F</text:p>
          </table:table-cell>
          <table:table-cell office:value-type="string" calcext:value-type="string">
            <text:p>8.333°C</text:p>
          </table:table-cell>
          <table:table-cell office:value-type="string" calcext:value-type="string">
            <text:p>20219.907 Ω</text:p>
          </table:table-cell>
          <table:table-cell office:value-type="string" calcext:value-type="string">
            <text:p>160°F</text:p>
          </table:table-cell>
          <table:table-cell office:value-type="string" calcext:value-type="string">
            <text:p>71.111°C</text:p>
          </table:table-cell>
          <table:table-cell office:value-type="string" calcext:value-type="string">
            <text:p>1921.117 Ω</text:p>
          </table:table-cell>
          <table:table-cell office:value-type="string" calcext:value-type="string">
            <text:p>273°F</text:p>
          </table:table-cell>
          <table:table-cell office:value-type="string" calcext:value-type="string">
            <text:p>133.889°C</text:p>
          </table:table-cell>
          <table:table-cell office:value-type="string" calcext:value-type="string">
            <text:p>342.964 Ω</text:p>
          </table:table-cell>
        </table:table-row>
        <table:table-row table:style-name="ro1">
          <table:table-cell office:value-type="string" calcext:value-type="string">
            <text:p>48°F</text:p>
          </table:table-cell>
          <table:table-cell office:value-type="string" calcext:value-type="string">
            <text:p>8.889°C</text:p>
          </table:table-cell>
          <table:table-cell office:value-type="string" calcext:value-type="string">
            <text:p>19729.646 Ω</text:p>
          </table:table-cell>
          <table:table-cell office:value-type="string" calcext:value-type="string">
            <text:p>161°F</text:p>
          </table:table-cell>
          <table:table-cell office:value-type="string" calcext:value-type="string">
            <text:p>71.667°C</text:p>
          </table:table-cell>
          <table:table-cell office:value-type="string" calcext:value-type="string">
            <text:p>1887.605 Ω</text:p>
          </table:table-cell>
          <table:table-cell office:value-type="string" calcext:value-type="string">
            <text:p>274°F</text:p>
          </table:table-cell>
          <table:table-cell office:value-type="string" calcext:value-type="string">
            <text:p>134.444°C</text:p>
          </table:table-cell>
          <table:table-cell office:value-type="string" calcext:value-type="string">
            <text:p>338.476 Ω</text:p>
          </table:table-cell>
        </table:table-row>
        <table:table-row table:style-name="ro1">
          <table:table-cell office:value-type="string" calcext:value-type="string">
            <text:p>49°F</text:p>
          </table:table-cell>
          <table:table-cell office:value-type="string" calcext:value-type="string">
            <text:p>9.444°C</text:p>
          </table:table-cell>
          <table:table-cell office:value-type="string" calcext:value-type="string">
            <text:p>19252.759 Ω</text:p>
          </table:table-cell>
          <table:table-cell office:value-type="string" calcext:value-type="string">
            <text:p>162°F</text:p>
          </table:table-cell>
          <table:table-cell office:value-type="string" calcext:value-type="string">
            <text:p>72.222°C</text:p>
          </table:table-cell>
          <table:table-cell office:value-type="string" calcext:value-type="string">
            <text:p>1854.766 Ω</text:p>
          </table:table-cell>
          <table:table-cell office:value-type="string" calcext:value-type="string">
            <text:p>275°F</text:p>
          </table:table-cell>
          <table:table-cell office:value-type="string" calcext:value-type="string">
            <text:p>135.000°C</text:p>
          </table:table-cell>
          <table:table-cell office:value-type="string" calcext:value-type="string">
            <text:p>334.058 Ω</text:p>
          </table:table-cell>
        </table:table-row>
        <table:table-row table:style-name="ro1">
          <table:table-cell office:value-type="string" calcext:value-type="string">
            <text:p>50°F</text:p>
          </table:table-cell>
          <table:table-cell office:value-type="string" calcext:value-type="string">
            <text:p>10.000°C</text:p>
          </table:table-cell>
          <table:table-cell office:value-type="string" calcext:value-type="string">
            <text:p>18788.843 Ω</text:p>
          </table:table-cell>
          <table:table-cell office:value-type="string" calcext:value-type="string">
            <text:p>163°F</text:p>
          </table:table-cell>
          <table:table-cell office:value-type="string" calcext:value-type="string">
            <text:p>72.778°C</text:p>
          </table:table-cell>
          <table:table-cell office:value-type="string" calcext:value-type="string">
            <text:p>1822.586 Ω</text:p>
          </table:table-cell>
          <table:table-cell office:value-type="string" calcext:value-type="string">
            <text:p>276°F</text:p>
          </table:table-cell>
          <table:table-cell office:value-type="string" calcext:value-type="string">
            <text:p>135.556°C</text:p>
          </table:table-cell>
          <table:table-cell office:value-type="string" calcext:value-type="string">
            <text:p>329.707 Ω</text:p>
          </table:table-cell>
        </table:table-row>
        <table:table-row table:style-name="ro1">
          <table:table-cell office:value-type="string" calcext:value-type="string">
            <text:p>51°F</text:p>
          </table:table-cell>
          <table:table-cell office:value-type="string" calcext:value-type="string">
            <text:p>10.556°C</text:p>
          </table:table-cell>
          <table:table-cell office:value-type="string" calcext:value-type="string">
            <text:p>18337.509 Ω</text:p>
          </table:table-cell>
          <table:table-cell office:value-type="string" calcext:value-type="string">
            <text:p>164°F</text:p>
          </table:table-cell>
          <table:table-cell office:value-type="string" calcext:value-type="string">
            <text:p>73.333°C</text:p>
          </table:table-cell>
          <table:table-cell office:value-type="string" calcext:value-type="string">
            <text:p>1791.050 Ω</text:p>
          </table:table-cell>
          <table:table-cell office:value-type="string" calcext:value-type="string">
            <text:p>277°F</text:p>
          </table:table-cell>
          <table:table-cell office:value-type="string" calcext:value-type="string">
            <text:p>136.111°C</text:p>
          </table:table-cell>
          <table:table-cell office:value-type="string" calcext:value-type="string">
            <text:p>325.424 Ω</text:p>
          </table:table-cell>
        </table:table-row>
        <table:table-row table:style-name="ro1">
          <table:table-cell office:value-type="string" calcext:value-type="string">
            <text:p>52°F</text:p>
          </table:table-cell>
          <table:table-cell office:value-type="string" calcext:value-type="string">
            <text:p>11.111°C</text:p>
          </table:table-cell>
          <table:table-cell office:value-type="string" calcext:value-type="string">
            <text:p>17898.380 Ω</text:p>
          </table:table-cell>
          <table:table-cell office:value-type="string" calcext:value-type="string">
            <text:p>165°F</text:p>
          </table:table-cell>
          <table:table-cell office:value-type="string" calcext:value-type="string">
            <text:p>73.889°C</text:p>
          </table:table-cell>
          <table:table-cell office:value-type="string" calcext:value-type="string">
            <text:p>1760.143 Ω</text:p>
          </table:table-cell>
          <table:table-cell office:value-type="string" calcext:value-type="string">
            <text:p>278°F</text:p>
          </table:table-cell>
          <table:table-cell office:value-type="string" calcext:value-type="string">
            <text:p>136.667°C</text:p>
          </table:table-cell>
          <table:table-cell office:value-type="string" calcext:value-type="string">
            <text:p>321.206 Ω</text:p>
          </table:table-cell>
        </table:table-row>
        <table:table-row table:style-name="ro1">
          <table:table-cell office:value-type="string" calcext:value-type="string">
            <text:p>53°F</text:p>
          </table:table-cell>
          <table:table-cell office:value-type="string" calcext:value-type="string">
            <text:p>11.667°C</text:p>
          </table:table-cell>
          <table:table-cell office:value-type="string" calcext:value-type="string">
            <text:p>17471.094 Ω</text:p>
          </table:table-cell>
          <table:table-cell office:value-type="string" calcext:value-type="string">
            <text:p>166°F</text:p>
          </table:table-cell>
          <table:table-cell office:value-type="string" calcext:value-type="string">
            <text:p>74.444°C</text:p>
          </table:table-cell>
          <table:table-cell office:value-type="string" calcext:value-type="string">
            <text:p>1729.852 Ω</text:p>
          </table:table-cell>
          <table:table-cell office:value-type="string" calcext:value-type="string">
            <text:p>279°F</text:p>
          </table:table-cell>
          <table:table-cell office:value-type="string" calcext:value-type="string">
            <text:p>137.222°C</text:p>
          </table:table-cell>
          <table:table-cell office:value-type="string" calcext:value-type="string">
            <text:p>317.052 Ω</text:p>
          </table:table-cell>
        </table:table-row>
        <table:table-row table:style-name="ro1">
          <table:table-cell office:value-type="string" calcext:value-type="string">
            <text:p>54°F</text:p>
          </table:table-cell>
          <table:table-cell office:value-type="string" calcext:value-type="string">
            <text:p>12.222°C</text:p>
          </table:table-cell>
          <table:table-cell office:value-type="string" calcext:value-type="string">
            <text:p>17055.296 Ω</text:p>
          </table:table-cell>
          <table:table-cell office:value-type="string" calcext:value-type="string">
            <text:p>167°F</text:p>
          </table:table-cell>
          <table:table-cell office:value-type="string" calcext:value-type="string">
            <text:p>75.000°C</text:p>
          </table:table-cell>
          <table:table-cell office:value-type="string" calcext:value-type="string">
            <text:p>1700.163 Ω</text:p>
          </table:table-cell>
          <table:table-cell office:value-type="string" calcext:value-type="string">
            <text:p>280°F</text:p>
          </table:table-cell>
          <table:table-cell office:value-type="string" calcext:value-type="string">
            <text:p>137.778°C</text:p>
          </table:table-cell>
          <table:table-cell office:value-type="string" calcext:value-type="string">
            <text:p>312.962 Ω</text:p>
          </table:table-cell>
        </table:table-row>
        <table:table-row table:style-name="ro1">
          <table:table-cell office:value-type="string" calcext:value-type="string">
            <text:p>55°F</text:p>
          </table:table-cell>
          <table:table-cell office:value-type="string" calcext:value-type="string">
            <text:p>12.778°C</text:p>
          </table:table-cell>
          <table:table-cell office:value-type="string" calcext:value-type="string">
            <text:p>16650.647 Ω</text:p>
          </table:table-cell>
          <table:table-cell office:value-type="string" calcext:value-type="string">
            <text:p>168°F</text:p>
          </table:table-cell>
          <table:table-cell office:value-type="string" calcext:value-type="string">
            <text:p>75.556°C</text:p>
          </table:table-cell>
          <table:table-cell office:value-type="string" calcext:value-type="string">
            <text:p>1671.061 Ω</text:p>
          </table:table-cell>
          <table:table-cell office:value-type="string" calcext:value-type="string">
            <text:p>281°F</text:p>
          </table:table-cell>
          <table:table-cell office:value-type="string" calcext:value-type="string">
            <text:p>138.333°C</text:p>
          </table:table-cell>
          <table:table-cell office:value-type="string" calcext:value-type="string">
            <text:p>308.935 Ω</text:p>
          </table:table-cell>
        </table:table-row>
        <table:table-row table:style-name="ro1">
          <table:table-cell office:value-type="string" calcext:value-type="string">
            <text:p>56°F</text:p>
          </table:table-cell>
          <table:table-cell office:value-type="string" calcext:value-type="string">
            <text:p>13.333°C</text:p>
          </table:table-cell>
          <table:table-cell office:value-type="string" calcext:value-type="string">
            <text:p>16256.816 Ω</text:p>
          </table:table-cell>
          <table:table-cell office:value-type="string" calcext:value-type="string">
            <text:p>169°F</text:p>
          </table:table-cell>
          <table:table-cell office:value-type="string" calcext:value-type="string">
            <text:p>76.111°C</text:p>
          </table:table-cell>
          <table:table-cell office:value-type="string" calcext:value-type="string">
            <text:p>1642.535 Ω</text:p>
          </table:table-cell>
          <table:table-cell office:value-type="string" calcext:value-type="string">
            <text:p>282°F</text:p>
          </table:table-cell>
          <table:table-cell office:value-type="string" calcext:value-type="string">
            <text:p>138.889°C</text:p>
          </table:table-cell>
          <table:table-cell office:value-type="string" calcext:value-type="string">
            <text:p>304.968 Ω</text:p>
          </table:table-cell>
        </table:table-row>
        <table:table-row table:style-name="ro1">
          <table:table-cell office:value-type="string" calcext:value-type="string">
            <text:p>57°F</text:p>
          </table:table-cell>
          <table:table-cell office:value-type="string" calcext:value-type="string">
            <text:p>13.889°C</text:p>
          </table:table-cell>
          <table:table-cell office:value-type="string" calcext:value-type="string">
            <text:p>15873.484 Ω</text:p>
          </table:table-cell>
          <table:table-cell office:value-type="string" calcext:value-type="string">
            <text:p>170°F</text:p>
          </table:table-cell>
          <table:table-cell office:value-type="string" calcext:value-type="string">
            <text:p>76.667°C</text:p>
          </table:table-cell>
          <table:table-cell office:value-type="string" calcext:value-type="string">
            <text:p>1614.571 Ω</text:p>
          </table:table-cell>
          <table:table-cell office:value-type="string" calcext:value-type="string">
            <text:p>283°F</text:p>
          </table:table-cell>
          <table:table-cell office:value-type="string" calcext:value-type="string">
            <text:p>139.444°C</text:p>
          </table:table-cell>
          <table:table-cell office:value-type="string" calcext:value-type="string">
            <text:p>301.062 Ω</text:p>
          </table:table-cell>
        </table:table-row>
        <table:table-row table:style-name="ro1">
          <table:table-cell office:value-type="string" calcext:value-type="string">
            <text:p>58°F</text:p>
          </table:table-cell>
          <table:table-cell office:value-type="string" calcext:value-type="string">
            <text:p>14.444°C</text:p>
          </table:table-cell>
          <table:table-cell office:value-type="string" calcext:value-type="string">
            <text:p>15500.342 Ω</text:p>
          </table:table-cell>
          <table:table-cell office:value-type="string" calcext:value-type="string">
            <text:p>171°F</text:p>
          </table:table-cell>
          <table:table-cell office:value-type="string" calcext:value-type="string">
            <text:p>77.222°C</text:p>
          </table:table-cell>
          <table:table-cell office:value-type="string" calcext:value-type="string">
            <text:p>1587.157 Ω</text:p>
          </table:table-cell>
          <table:table-cell office:value-type="string" calcext:value-type="string">
            <text:p>284°F</text:p>
          </table:table-cell>
          <table:table-cell office:value-type="string" calcext:value-type="string">
            <text:p>140.000°C</text:p>
          </table:table-cell>
          <table:table-cell office:value-type="string" calcext:value-type="string">
            <text:p>297.215 Ω</text:p>
          </table:table-cell>
        </table:table-row>
        <table:table-row table:style-name="ro1">
          <table:table-cell office:value-type="string" calcext:value-type="string">
            <text:p>59°F</text:p>
          </table:table-cell>
          <table:table-cell office:value-type="string" calcext:value-type="string">
            <text:p>15.000°C</text:p>
          </table:table-cell>
          <table:table-cell office:value-type="string" calcext:value-type="string">
            <text:p>15137.090 Ω</text:p>
          </table:table-cell>
          <table:table-cell office:value-type="string" calcext:value-type="string">
            <text:p>172°F</text:p>
          </table:table-cell>
          <table:table-cell office:value-type="string" calcext:value-type="string">
            <text:p>77.778°C</text:p>
          </table:table-cell>
          <table:table-cell office:value-type="string" calcext:value-type="string">
            <text:p>1560.280 Ω</text:p>
          </table:table-cell>
          <table:table-cell office:value-type="string" calcext:value-type="string">
            <text:p>285°F</text:p>
          </table:table-cell>
          <table:table-cell office:value-type="string" calcext:value-type="string">
            <text:p>140.556°C</text:p>
          </table:table-cell>
          <table:table-cell office:value-type="string" calcext:value-type="string">
            <text:p>293.426 Ω</text:p>
          </table:table-cell>
        </table:table-row>
        <table:table-row table:style-name="ro1">
          <table:table-cell office:value-type="string" calcext:value-type="string">
            <text:p>60°F</text:p>
          </table:table-cell>
          <table:table-cell office:value-type="string" calcext:value-type="string">
            <text:p>15.556°C</text:p>
          </table:table-cell>
          <table:table-cell office:value-type="string" calcext:value-type="string">
            <text:p>14783.440 Ω</text:p>
          </table:table-cell>
          <table:table-cell office:value-type="string" calcext:value-type="string">
            <text:p>173°F</text:p>
          </table:table-cell>
          <table:table-cell office:value-type="string" calcext:value-type="string">
            <text:p>78.333°C</text:p>
          </table:table-cell>
          <table:table-cell office:value-type="string" calcext:value-type="string">
            <text:p>1533.930 Ω</text:p>
          </table:table-cell>
          <table:table-cell office:value-type="string" calcext:value-type="string">
            <text:p>286°F</text:p>
          </table:table-cell>
          <table:table-cell office:value-type="string" calcext:value-type="string">
            <text:p>141.111°C</text:p>
          </table:table-cell>
          <table:table-cell office:value-type="string" calcext:value-type="string">
            <text:p>289.694 Ω</text:p>
          </table:table-cell>
        </table:table-row>
        <table:table-row table:style-name="ro1">
          <table:table-cell office:value-type="string" calcext:value-type="string">
            <text:p>61°F</text:p>
          </table:table-cell>
          <table:table-cell office:value-type="string" calcext:value-type="string">
            <text:p>16.111°C</text:p>
          </table:table-cell>
          <table:table-cell office:value-type="string" calcext:value-type="string">
            <text:p>14439.111 Ω</text:p>
          </table:table-cell>
          <table:table-cell office:value-type="string" calcext:value-type="string">
            <text:p>174°F</text:p>
          </table:table-cell>
          <table:table-cell office:value-type="string" calcext:value-type="string">
            <text:p>78.889°C</text:p>
          </table:table-cell>
          <table:table-cell office:value-type="string" calcext:value-type="string">
            <text:p>1508.094 Ω</text:p>
          </table:table-cell>
          <table:table-cell office:value-type="string" calcext:value-type="string">
            <text:p>287°F</text:p>
          </table:table-cell>
          <table:table-cell office:value-type="string" calcext:value-type="string">
            <text:p>141.667°C</text:p>
          </table:table-cell>
          <table:table-cell office:value-type="string" calcext:value-type="string">
            <text:p>286.018 Ω</text:p>
          </table:table-cell>
        </table:table-row>
        <table:table-row table:style-name="ro1">
          <table:table-cell office:value-type="string" calcext:value-type="string">
            <text:p>62°F</text:p>
          </table:table-cell>
          <table:table-cell office:value-type="string" calcext:value-type="string">
            <text:p>16.667°C</text:p>
          </table:table-cell>
          <table:table-cell office:value-type="string" calcext:value-type="string">
            <text:p>14103.831 Ω</text:p>
          </table:table-cell>
          <table:table-cell office:value-type="string" calcext:value-type="string">
            <text:p>175°F</text:p>
          </table:table-cell>
          <table:table-cell office:value-type="string" calcext:value-type="string">
            <text:p>79.444°C</text:p>
          </table:table-cell>
          <table:table-cell office:value-type="string" calcext:value-type="string">
            <text:p>1482.760 Ω</text:p>
          </table:table-cell>
          <table:table-cell office:value-type="string" calcext:value-type="string">
            <text:p>288°F</text:p>
          </table:table-cell>
          <table:table-cell office:value-type="string" calcext:value-type="string">
            <text:p>142.222°C</text:p>
          </table:table-cell>
          <table:table-cell office:value-type="string" calcext:value-type="string">
            <text:p>282.397 Ω</text:p>
          </table:table-cell>
        </table:table-row>
        <table:table-row table:style-name="ro1">
          <table:table-cell office:value-type="string" calcext:value-type="string">
            <text:p>63°F</text:p>
          </table:table-cell>
          <table:table-cell office:value-type="string" calcext:value-type="string">
            <text:p>17.222°C</text:p>
          </table:table-cell>
          <table:table-cell office:value-type="string" calcext:value-type="string">
            <text:p>13777.338 Ω</text:p>
          </table:table-cell>
          <table:table-cell office:value-type="string" calcext:value-type="string">
            <text:p>176°F</text:p>
          </table:table-cell>
          <table:table-cell office:value-type="string" calcext:value-type="string">
            <text:p>80.000°C</text:p>
          </table:table-cell>
          <table:table-cell office:value-type="string" calcext:value-type="string">
            <text:p>1457.919 Ω</text:p>
          </table:table-cell>
          <table:table-cell office:value-type="string" calcext:value-type="string">
            <text:p>289°F</text:p>
          </table:table-cell>
          <table:table-cell office:value-type="string" calcext:value-type="string">
            <text:p>142.778°C</text:p>
          </table:table-cell>
          <table:table-cell office:value-type="string" calcext:value-type="string">
            <text:p>278.831 Ω</text:p>
          </table:table-cell>
        </table:table-row>
        <table:table-row table:style-name="ro1">
          <table:table-cell office:value-type="string" calcext:value-type="string">
            <text:p>64°F</text:p>
          </table:table-cell>
          <table:table-cell office:value-type="string" calcext:value-type="string">
            <text:p>17.778°C</text:p>
          </table:table-cell>
          <table:table-cell office:value-type="string" calcext:value-type="string">
            <text:p>13459.377 Ω</text:p>
          </table:table-cell>
          <table:table-cell office:value-type="string" calcext:value-type="string">
            <text:p>177°F</text:p>
          </table:table-cell>
          <table:table-cell office:value-type="string" calcext:value-type="string">
            <text:p>80.556°C</text:p>
          </table:table-cell>
          <table:table-cell office:value-type="string" calcext:value-type="string">
            <text:p>1433.559 Ω</text:p>
          </table:table-cell>
          <table:table-cell office:value-type="string" calcext:value-type="string">
            <text:p>290°F</text:p>
          </table:table-cell>
          <table:table-cell office:value-type="string" calcext:value-type="string">
            <text:p>143.333°C</text:p>
          </table:table-cell>
          <table:table-cell office:value-type="string" calcext:value-type="string">
            <text:p>275.317 Ω</text:p>
          </table:table-cell>
        </table:table-row>
        <table:table-row table:style-name="ro1">
          <table:table-cell office:value-type="string" calcext:value-type="string">
            <text:p>65°F</text:p>
          </table:table-cell>
          <table:table-cell office:value-type="string" calcext:value-type="string">
            <text:p>18.333°C</text:p>
          </table:table-cell>
          <table:table-cell office:value-type="string" calcext:value-type="string">
            <text:p>13149.702 Ω</text:p>
          </table:table-cell>
          <table:table-cell office:value-type="string" calcext:value-type="string">
            <text:p>178°F</text:p>
          </table:table-cell>
          <table:table-cell office:value-type="string" calcext:value-type="string">
            <text:p>81.111°C</text:p>
          </table:table-cell>
          <table:table-cell office:value-type="string" calcext:value-type="string">
            <text:p>1409.670 Ω</text:p>
          </table:table-cell>
          <table:table-cell office:value-type="string" calcext:value-type="string">
            <text:p>291°F</text:p>
          </table:table-cell>
          <table:table-cell office:value-type="string" calcext:value-type="string">
            <text:p>143.889°C</text:p>
          </table:table-cell>
          <table:table-cell office:value-type="string" calcext:value-type="string">
            <text:p>271.857 Ω</text:p>
          </table:table-cell>
        </table:table-row>
        <table:table-row table:style-name="ro1">
          <table:table-cell office:value-type="string" calcext:value-type="string">
            <text:p>66°F</text:p>
          </table:table-cell>
          <table:table-cell office:value-type="string" calcext:value-type="string">
            <text:p>18.889°C</text:p>
          </table:table-cell>
          <table:table-cell office:value-type="string" calcext:value-type="string">
            <text:p>12848.073 Ω</text:p>
          </table:table-cell>
          <table:table-cell office:value-type="string" calcext:value-type="string">
            <text:p>179°F</text:p>
          </table:table-cell>
          <table:table-cell office:value-type="string" calcext:value-type="string">
            <text:p>81.667°C</text:p>
          </table:table-cell>
          <table:table-cell office:value-type="string" calcext:value-type="string">
            <text:p>1386.242 Ω</text:p>
          </table:table-cell>
          <table:table-cell office:value-type="string" calcext:value-type="string">
            <text:p>292°F</text:p>
          </table:table-cell>
          <table:table-cell office:value-type="string" calcext:value-type="string">
            <text:p>144.444°C</text:p>
          </table:table-cell>
          <table:table-cell office:value-type="string" calcext:value-type="string">
            <text:p>268.447 Ω</text:p>
          </table:table-cell>
        </table:table-row>
        <table:table-row table:style-name="ro1">
          <table:table-cell office:value-type="string" calcext:value-type="string">
            <text:p>67°F</text:p>
          </table:table-cell>
          <table:table-cell office:value-type="string" calcext:value-type="string">
            <text:p>19.444°C</text:p>
          </table:table-cell>
          <table:table-cell office:value-type="string" calcext:value-type="string">
            <text:p>12554.261 Ω</text:p>
          </table:table-cell>
          <table:table-cell office:value-type="string" calcext:value-type="string">
            <text:p>180°F</text:p>
          </table:table-cell>
          <table:table-cell office:value-type="string" calcext:value-type="string">
            <text:p>82.222°C</text:p>
          </table:table-cell>
          <table:table-cell office:value-type="string" calcext:value-type="string">
            <text:p>1363.264 Ω</text:p>
          </table:table-cell>
          <table:table-cell office:value-type="string" calcext:value-type="string">
            <text:p>293°F</text:p>
          </table:table-cell>
          <table:table-cell office:value-type="string" calcext:value-type="string">
            <text:p>145.000°C</text:p>
          </table:table-cell>
          <table:table-cell office:value-type="string" calcext:value-type="string">
            <text:p>265.088 Ω</text:p>
          </table:table-cell>
        </table:table-row>
        <table:table-row table:style-name="ro1">
          <table:table-cell office:value-type="string" calcext:value-type="string">
            <text:p>68°F</text:p>
          </table:table-cell>
          <table:table-cell office:value-type="string" calcext:value-type="string">
            <text:p>20.000°C</text:p>
          </table:table-cell>
          <table:table-cell office:value-type="string" calcext:value-type="string">
            <text:p>12268.039 Ω</text:p>
          </table:table-cell>
          <table:table-cell office:value-type="string" calcext:value-type="string">
            <text:p>181°F</text:p>
          </table:table-cell>
          <table:table-cell office:value-type="string" calcext:value-type="string">
            <text:p>82.778°C</text:p>
          </table:table-cell>
          <table:table-cell office:value-type="string" calcext:value-type="string">
            <text:p>1340.726 Ω</text:p>
          </table:table-cell>
          <table:table-cell office:value-type="string" calcext:value-type="string">
            <text:p>294°F</text:p>
          </table:table-cell>
          <table:table-cell office:value-type="string" calcext:value-type="string">
            <text:p>145.556°C</text:p>
          </table:table-cell>
          <table:table-cell office:value-type="string" calcext:value-type="string">
            <text:p>261.779 Ω</text:p>
          </table:table-cell>
        </table:table-row>
        <table:table-row table:style-name="ro1">
          <table:table-cell office:value-type="string" calcext:value-type="string">
            <text:p>69°F</text:p>
          </table:table-cell>
          <table:table-cell office:value-type="string" calcext:value-type="string">
            <text:p>20.556°C</text:p>
          </table:table-cell>
          <table:table-cell office:value-type="string" calcext:value-type="string">
            <text:p>11989.193 Ω</text:p>
          </table:table-cell>
          <table:table-cell office:value-type="string" calcext:value-type="string">
            <text:p>182°F</text:p>
          </table:table-cell>
          <table:table-cell office:value-type="string" calcext:value-type="string">
            <text:p>83.333°C</text:p>
          </table:table-cell>
          <table:table-cell office:value-type="string" calcext:value-type="string">
            <text:p>1318.620 Ω</text:p>
          </table:table-cell>
          <table:table-cell office:value-type="string" calcext:value-type="string">
            <text:p>295°F</text:p>
          </table:table-cell>
          <table:table-cell office:value-type="string" calcext:value-type="string">
            <text:p>146.111°C</text:p>
          </table:table-cell>
          <table:table-cell office:value-type="string" calcext:value-type="string">
            <text:p>258.519 Ω</text:p>
          </table:table-cell>
        </table:table-row>
        <table:table-row table:style-name="ro1">
          <table:table-cell office:value-type="string" calcext:value-type="string">
            <text:p>70°F</text:p>
          </table:table-cell>
          <table:table-cell office:value-type="string" calcext:value-type="string">
            <text:p>21.111°C</text:p>
          </table:table-cell>
          <table:table-cell office:value-type="string" calcext:value-type="string">
            <text:p>11717.511 Ω</text:p>
          </table:table-cell>
          <table:table-cell office:value-type="string" calcext:value-type="string">
            <text:p>183°F</text:p>
          </table:table-cell>
          <table:table-cell office:value-type="string" calcext:value-type="string">
            <text:p>83.889°C</text:p>
          </table:table-cell>
          <table:table-cell office:value-type="string" calcext:value-type="string">
            <text:p>1296.937 Ω</text:p>
          </table:table-cell>
          <table:table-cell office:value-type="string" calcext:value-type="string">
            <text:p>296°F</text:p>
          </table:table-cell>
          <table:table-cell office:value-type="string" calcext:value-type="string">
            <text:p>146.667°C</text:p>
          </table:table-cell>
          <table:table-cell office:value-type="string" calcext:value-type="string">
            <text:p>255.307 Ω</text:p>
          </table:table-cell>
        </table:table-row>
        <table:table-row table:style-name="ro1">
          <table:table-cell office:value-type="string" calcext:value-type="string">
            <text:p>71°F</text:p>
          </table:table-cell>
          <table:table-cell office:value-type="string" calcext:value-type="string">
            <text:p>21.667°C</text:p>
          </table:table-cell>
          <table:table-cell office:value-type="string" calcext:value-type="string">
            <text:p>11452.789 Ω</text:p>
          </table:table-cell>
          <table:table-cell office:value-type="string" calcext:value-type="string">
            <text:p>184°F</text:p>
          </table:table-cell>
          <table:table-cell office:value-type="string" calcext:value-type="string">
            <text:p>84.444°C</text:p>
          </table:table-cell>
          <table:table-cell office:value-type="string" calcext:value-type="string">
            <text:p>1275.666 Ω</text:p>
          </table:table-cell>
          <table:table-cell office:value-type="string" calcext:value-type="string">
            <text:p>297°F</text:p>
          </table:table-cell>
          <table:table-cell office:value-type="string" calcext:value-type="string">
            <text:p>147.222°C</text:p>
          </table:table-cell>
          <table:table-cell office:value-type="string" calcext:value-type="string">
            <text:p>252.142 Ω</text:p>
          </table:table-cell>
        </table:table-row>
        <table:table-row table:style-name="ro1">
          <table:table-cell office:value-type="string" calcext:value-type="string">
            <text:p>72°F</text:p>
          </table:table-cell>
          <table:table-cell office:value-type="string" calcext:value-type="string">
            <text:p>22.222°C</text:p>
          </table:table-cell>
          <table:table-cell office:value-type="string" calcext:value-type="string">
            <text:p>11194.831 Ω</text:p>
          </table:table-cell>
          <table:table-cell office:value-type="string" calcext:value-type="string">
            <text:p>185°F</text:p>
          </table:table-cell>
          <table:table-cell office:value-type="string" calcext:value-type="string">
            <text:p>85.000°C</text:p>
          </table:table-cell>
          <table:table-cell office:value-type="string" calcext:value-type="string">
            <text:p>1254.799 Ω</text:p>
          </table:table-cell>
          <table:table-cell office:value-type="string" calcext:value-type="string">
            <text:p>298°F</text:p>
          </table:table-cell>
          <table:table-cell office:value-type="string" calcext:value-type="string">
            <text:p>147.778°C</text:p>
          </table:table-cell>
          <table:table-cell office:value-type="string" calcext:value-type="string">
            <text:p>249.024 Ω</text:p>
          </table:table-cell>
        </table:table-row>
        <table:table-row table:style-name="ro1">
          <table:table-cell office:value-type="string" calcext:value-type="string">
            <text:p>73°F</text:p>
          </table:table-cell>
          <table:table-cell office:value-type="string" calcext:value-type="string">
            <text:p>22.778°C</text:p>
          </table:table-cell>
          <table:table-cell office:value-type="string" calcext:value-type="string">
            <text:p>10943.446 Ω</text:p>
          </table:table-cell>
          <table:table-cell office:value-type="string" calcext:value-type="string">
            <text:p>186°F</text:p>
          </table:table-cell>
          <table:table-cell office:value-type="string" calcext:value-type="string">
            <text:p>85.556°C</text:p>
          </table:table-cell>
          <table:table-cell office:value-type="string" calcext:value-type="string">
            <text:p>1234.327 Ω</text:p>
          </table:table-cell>
          <table:table-cell office:value-type="string" calcext:value-type="string">
            <text:p>299°F</text:p>
          </table:table-cell>
          <table:table-cell office:value-type="string" calcext:value-type="string">
            <text:p>148.333°C</text:p>
          </table:table-cell>
          <table:table-cell office:value-type="string" calcext:value-type="string">
            <text:p>245.951 Ω</text:p>
          </table:table-cell>
        </table:table-row>
      </table:table>
      <table:table table:name="10kTypeIII-PullDown-R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16380" table:default-cell-style-name="ce4"/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Ω</text:p>
          </table:table-cell>
          <table:table-cell office:value-type="string" calcext:value-type="string">
            <text:p>I (amp)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PullDownR</text:p>
          </table:table-cell>
          <table:table-cell table:number-columns-repeated="16376"/>
        </table:table-row>
        <table:table-row table:style-name="ro1">
          <table:table-cell table:number-columns-repeated="2" table:style-name="ce2" office:value-type="float" office:value="-40" calcext:value-type="float">
            <text:p>-40</text:p>
          </table:table-cell>
          <table:table-cell table:style-name="ce2" office:value-type="float" office:value="239686" calcext:value-type="float">
            <text:p>239686</text:p>
          </table:table-cell>
          <table:table-cell table:formula="of:=[.$G$2]/([.C2]+[.$H$2])" office:value-type="float" office:value="0.0000134408817474748" calcext:value-type="float">
            <text:p>1,34408817474748E-05</text:p>
          </table:table-cell>
          <table:table-cell table:formula="of:=ROUND([.$H$2]*[.D2];5)" office:value-type="float" office:value="0.13441" calcext:value-type="float">
            <text:p>0,13441</text:p>
          </table:table-cell>
          <table:table-cell/>
          <table:table-cell office:value-type="float" office:value="3.356" calcext:value-type="float">
            <text:p>3,356</text:p>
          </table:table-cell>
          <table:table-cell office:value-type="float" office:value="10000" calcext:value-type="float">
            <text:p>10000</text:p>
          </table:table-cell>
          <table:table-cell table:number-columns-repeated="16376"/>
        </table:table-row>
        <table:table-row table:style-name="ro1">
          <table:table-cell table:style-name="ce2" office:value-type="float" office:value="-39" calcext:value-type="float">
            <text:p>-39</text:p>
          </table:table-cell>
          <table:table-cell table:style-name="ce2" office:value-type="float" office:value="-39.444" calcext:value-type="float">
            <text:p>-39,444</text:p>
          </table:table-cell>
          <table:table-cell table:style-name="ce2" office:value-type="float" office:value="231973.799" calcext:value-type="float">
            <text:p>231973,799</text:p>
          </table:table-cell>
          <table:table-cell table:formula="of:=[.$G$2]/([.C3]+[.$H$2])" office:value-type="float" office:value="0.0000138692702014403" calcext:value-type="float">
            <text:p>1,38692702014403E-05</text:p>
          </table:table-cell>
          <table:table-cell table:formula="of:=ROUND([.$H$2]*[.D3];5)" office:value-type="float" office:value="0.13869" calcext:value-type="float">
            <text:p>0,13869</text:p>
          </table:table-cell>
          <table:table-cell table:number-columns-repeated="16379"/>
        </table:table-row>
        <table:table-row table:style-name="ro1">
          <table:table-cell table:style-name="ce2" office:value-type="float" office:value="-38" calcext:value-type="float">
            <text:p>-38</text:p>
          </table:table-cell>
          <table:table-cell table:style-name="ce2" office:value-type="float" office:value="-38.889" calcext:value-type="float">
            <text:p>-38,889</text:p>
          </table:table-cell>
          <table:table-cell table:style-name="ce2" office:value-type="float" office:value="224534.802" calcext:value-type="float">
            <text:p>224534,802</text:p>
          </table:table-cell>
          <table:table-cell table:formula="of:=[.$G$2]/([.C4]+[.$H$2])" office:value-type="float" office:value="0.0000143091770235447" calcext:value-type="float">
            <text:p>1,43091770235447E-05</text:p>
          </table:table-cell>
          <table:table-cell table:formula="of:=ROUND([.$H$2]*[.D4];5)" office:value-type="float" office:value="0.14309" calcext:value-type="float">
            <text:p>0,14309</text:p>
          </table:table-cell>
          <table:table-cell table:number-columns-repeated="16379"/>
        </table:table-row>
        <table:table-row table:style-name="ro1">
          <table:table-cell table:style-name="ce2" office:value-type="float" office:value="-37" calcext:value-type="float">
            <text:p>-37</text:p>
          </table:table-cell>
          <table:table-cell table:style-name="ce2" office:value-type="float" office:value="-38.333" calcext:value-type="float">
            <text:p>-38,333</text:p>
          </table:table-cell>
          <table:table-cell table:style-name="ce2" office:value-type="float" office:value="217358.518" calcext:value-type="float">
            <text:p>217358,518</text:p>
          </table:table-cell>
          <table:table-cell table:formula="of:=[.$G$2]/([.C5]+[.$H$2])" office:value-type="float" office:value="0.0000147608280944196" calcext:value-type="float">
            <text:p>1,47608280944196E-05</text:p>
          </table:table-cell>
          <table:table-cell table:formula="of:=ROUND([.$H$2]*[.D5];5)" office:value-type="float" office:value="0.14761" calcext:value-type="float">
            <text:p>0,14761</text:p>
          </table:table-cell>
          <table:table-cell table:number-columns-repeated="16379"/>
        </table:table-row>
        <table:table-row table:style-name="ro1">
          <table:table-cell table:style-name="ce2" office:value-type="float" office:value="-36" calcext:value-type="float">
            <text:p>-36</text:p>
          </table:table-cell>
          <table:table-cell table:style-name="ce2" office:value-type="float" office:value="-37.778" calcext:value-type="float">
            <text:p>-37,778</text:p>
          </table:table-cell>
          <table:table-cell table:style-name="ce2" office:value-type="float" office:value="210434.888" calcext:value-type="float">
            <text:p>210434,888</text:p>
          </table:table-cell>
          <table:table-cell table:formula="of:=[.$G$2]/([.C6]+[.$H$2])" office:value-type="float" office:value="0.0000152244503147796" calcext:value-type="float">
            <text:p>1,52244503147796E-05</text:p>
          </table:table-cell>
          <table:table-cell table:formula="of:=ROUND([.$H$2]*[.D6];5)" office:value-type="float" office:value="0.15224" calcext:value-type="float">
            <text:p>0,15224</text:p>
          </table:table-cell>
          <table:table-cell table:number-columns-repeated="16379"/>
        </table:table-row>
        <table:table-row table:style-name="ro1">
          <table:table-cell table:style-name="ce2" office:value-type="float" office:value="-35" calcext:value-type="float">
            <text:p>-35</text:p>
          </table:table-cell>
          <table:table-cell table:style-name="ce2" office:value-type="float" office:value="-37.222" calcext:value-type="float">
            <text:p>-37,222</text:p>
          </table:table-cell>
          <table:table-cell table:style-name="ce2" office:value-type="float" office:value="203754.268" calcext:value-type="float">
            <text:p>203754,268</text:p>
          </table:table-cell>
          <table:table-cell table:formula="of:=[.$G$2]/([.C7]+[.$H$2])" office:value-type="float" office:value="0.0000157002713040565" calcext:value-type="float">
            <text:p>1,57002713040565E-05</text:p>
          </table:table-cell>
          <table:table-cell table:formula="of:=ROUND([.$H$2]*[.D7];5)" office:value-type="float" office:value="0.157" calcext:value-type="float">
            <text:p>0,157</text:p>
          </table:table-cell>
          <table:table-cell table:number-columns-repeated="16379"/>
        </table:table-row>
        <table:table-row table:style-name="ro1">
          <table:table-cell table:style-name="ce2" office:value-type="float" office:value="-34" calcext:value-type="float">
            <text:p>-34</text:p>
          </table:table-cell>
          <table:table-cell table:style-name="ce2" office:value-type="float" office:value="-36.667" calcext:value-type="float">
            <text:p>-36,667</text:p>
          </table:table-cell>
          <table:table-cell table:style-name="ce2" office:value-type="float" office:value="197307.406" calcext:value-type="float">
            <text:p>197307,406</text:p>
          </table:table-cell>
          <table:table-cell table:formula="of:=[.$G$2]/([.C8]+[.$H$2])" office:value-type="float" office:value="0.0000161885195746456" calcext:value-type="float">
            <text:p>1,61885195746456E-05</text:p>
          </table:table-cell>
          <table:table-cell table:formula="of:=ROUND([.$H$2]*[.D8];5)" office:value-type="float" office:value="0.16189" calcext:value-type="float">
            <text:p>0,16189</text:p>
          </table:table-cell>
          <table:table-cell table:number-columns-repeated="16379"/>
        </table:table-row>
        <table:table-row table:style-name="ro1">
          <table:table-cell table:style-name="ce2" office:value-type="float" office:value="-33" calcext:value-type="float">
            <text:p>-33</text:p>
          </table:table-cell>
          <table:table-cell table:style-name="ce2" office:value-type="float" office:value="-36.111" calcext:value-type="float">
            <text:p>-36,111</text:p>
          </table:table-cell>
          <table:table-cell table:style-name="ce2" office:value-type="float" office:value="191085.429" calcext:value-type="float">
            <text:p>191085,429</text:p>
          </table:table-cell>
          <table:table-cell table:formula="of:=[.$G$2]/([.C9]+[.$H$2])" office:value-type="float" office:value="0.0000166894240755754" calcext:value-type="float">
            <text:p>1,66894240755754E-05</text:p>
          </table:table-cell>
          <table:table-cell table:formula="of:=ROUND([.$H$2]*[.D9];5)" office:value-type="float" office:value="0.16689" calcext:value-type="float">
            <text:p>0,16689</text:p>
          </table:table-cell>
          <table:table-cell table:number-columns-repeated="16379"/>
        </table:table-row>
        <table:table-row table:style-name="ro1"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-35.556" calcext:value-type="float">
            <text:p>-35,556</text:p>
          </table:table-cell>
          <table:table-cell table:style-name="ce2" office:value-type="float" office:value="185079.825" calcext:value-type="float">
            <text:p>185079,825</text:p>
          </table:table-cell>
          <table:table-cell table:formula="of:=[.$G$2]/([.C10]+[.$H$2])" office:value-type="float" office:value="0.0000172032141201685" calcext:value-type="float">
            <text:p>1,72032141201685E-05</text:p>
          </table:table-cell>
          <table:table-cell table:formula="of:=ROUND([.$H$2]*[.D10];5)" office:value-type="float" office:value="0.17203" calcext:value-type="float">
            <text:p>0,17203</text:p>
          </table:table-cell>
          <table:table-cell table:number-columns-repeated="16379"/>
        </table:table-row>
        <table:table-row table:style-name="ro1">
          <table:table-cell table:style-name="ce2" office:value-type="float" office:value="-31" calcext:value-type="float">
            <text:p>-31</text:p>
          </table:table-cell>
          <table:table-cell table:style-name="ce2" office:value-type="float" office:value="-35" calcext:value-type="float">
            <text:p>-35</text:p>
          </table:table-cell>
          <table:table-cell table:style-name="ce2" office:value-type="float" office:value="179282.426" calcext:value-type="float">
            <text:p>179282,426</text:p>
          </table:table-cell>
          <table:table-cell table:formula="of:=[.$G$2]/([.C11]+[.$H$2])" office:value-type="float" office:value="0.0000177301193297258" calcext:value-type="float">
            <text:p>1,77301193297258E-05</text:p>
          </table:table-cell>
          <table:table-cell table:formula="of:=ROUND([.$H$2]*[.D11];5)" office:value-type="float" office:value="0.1773" calcext:value-type="float">
            <text:p>0,1773</text:p>
          </table:table-cell>
          <table:table-cell table:number-columns-repeated="16379"/>
        </table:table-row>
        <table:table-row table:style-name="ro1"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-34.444" calcext:value-type="float">
            <text:p>-34,444</text:p>
          </table:table-cell>
          <table:table-cell table:style-name="ce2" office:value-type="float" office:value="173685.397" calcext:value-type="float">
            <text:p>173685,397</text:p>
          </table:table-cell>
          <table:table-cell table:formula="of:=[.$G$2]/([.C12]+[.$H$2])" office:value-type="float" office:value="0.000018270369091997" calcext:value-type="float">
            <text:p>1,8270369091997E-05</text:p>
          </table:table-cell>
          <table:table-cell table:formula="of:=ROUND([.$H$2]*[.D12];5)" office:value-type="float" office:value="0.1827" calcext:value-type="float">
            <text:p>0,1827</text:p>
          </table:table-cell>
          <table:table-cell table:number-columns-repeated="16379"/>
        </table:table-row>
        <table:table-row table:style-name="ro1">
          <table:table-cell table:style-name="ce2" office:value-type="float" office:value="-29" calcext:value-type="float">
            <text:p>-29</text:p>
          </table:table-cell>
          <table:table-cell table:style-name="ce2" office:value-type="float" office:value="-33.889" calcext:value-type="float">
            <text:p>-33,889</text:p>
          </table:table-cell>
          <table:table-cell table:style-name="ce2" office:value-type="float" office:value="168281.218" calcext:value-type="float">
            <text:p>168281,218</text:p>
          </table:table-cell>
          <table:table-cell table:formula="of:=[.$G$2]/([.C13]+[.$H$2])" office:value-type="float" office:value="0.0000188241926864107" calcext:value-type="float">
            <text:p>1,88241926864107E-05</text:p>
          </table:table-cell>
          <table:table-cell table:formula="of:=ROUND([.$H$2]*[.D13];5)" office:value-type="float" office:value="0.18824" calcext:value-type="float">
            <text:p>0,18824</text:p>
          </table:table-cell>
          <table:table-cell table:number-columns-repeated="16379"/>
        </table:table-row>
        <table:table-row table:style-name="ro1">
          <table:table-cell table:style-name="ce2" office:value-type="float" office:value="-28" calcext:value-type="float">
            <text:p>-28</text:p>
          </table:table-cell>
          <table:table-cell table:style-name="ce2" office:value-type="float" office:value="-33.333" calcext:value-type="float">
            <text:p>-33,333</text:p>
          </table:table-cell>
          <table:table-cell table:style-name="ce2" office:value-type="float" office:value="163062.672" calcext:value-type="float">
            <text:p>163062,672</text:p>
          </table:table-cell>
          <table:table-cell table:formula="of:=[.$G$2]/([.C14]+[.$H$2])" office:value-type="float" office:value="0.0000193918189359748" calcext:value-type="float">
            <text:p>1,93918189359748E-05</text:p>
          </table:table-cell>
          <table:table-cell table:formula="of:=ROUND([.$H$2]*[.D14];5)" office:value-type="float" office:value="0.19392" calcext:value-type="float">
            <text:p>0,19392</text:p>
          </table:table-cell>
          <table:table-cell table:number-columns-repeated="16379"/>
        </table:table-row>
        <table:table-row table:style-name="ro1">
          <table:table-cell table:style-name="ce2" office:value-type="float" office:value="-27" calcext:value-type="float">
            <text:p>-27</text:p>
          </table:table-cell>
          <table:table-cell table:style-name="ce2" office:value-type="float" office:value="-32.778" calcext:value-type="float">
            <text:p>-32,778</text:p>
          </table:table-cell>
          <table:table-cell table:style-name="ce2" office:value-type="float" office:value="158022.832" calcext:value-type="float">
            <text:p>158022,832</text:p>
          </table:table-cell>
          <table:table-cell table:formula="of:=[.$G$2]/([.C15]+[.$H$2])" office:value-type="float" office:value="0.0000199734759856922" calcext:value-type="float">
            <text:p>1,99734759856922E-05</text:p>
          </table:table-cell>
          <table:table-cell table:formula="of:=ROUND([.$H$2]*[.D15];5)" office:value-type="float" office:value="0.19973" calcext:value-type="float">
            <text:p>0,19973</text:p>
          </table:table-cell>
          <table:table-cell table:number-columns-repeated="16379"/>
        </table:table-row>
        <table:table-row table:style-name="ro1">
          <table:table-cell table:style-name="ce2" office:value-type="float" office:value="-26" calcext:value-type="float">
            <text:p>-26</text:p>
          </table:table-cell>
          <table:table-cell table:style-name="ce2" office:value-type="float" office:value="-32.222" calcext:value-type="float">
            <text:p>-32,222</text:p>
          </table:table-cell>
          <table:table-cell table:style-name="ce2" office:value-type="float" office:value="153155.048" calcext:value-type="float">
            <text:p>153155,048</text:p>
          </table:table-cell>
          <table:table-cell table:formula="of:=[.$G$2]/([.C16]+[.$H$2])" office:value-type="float" office:value="0.000020569391147493" calcext:value-type="float">
            <text:p>2,0569391147493E-05</text:p>
          </table:table-cell>
          <table:table-cell table:formula="of:=ROUND([.$H$2]*[.D16];5)" office:value-type="float" office:value="0.20569" calcext:value-type="float">
            <text:p>0,20569</text:p>
          </table:table-cell>
          <table:table-cell table:number-columns-repeated="16379"/>
        </table:table-row>
        <table:table-row table:style-name="ro1"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-31.667" calcext:value-type="float">
            <text:p>-31,667</text:p>
          </table:table-cell>
          <table:table-cell table:style-name="ce2" office:value-type="float" office:value="148452.937" calcext:value-type="float">
            <text:p>148452,937</text:p>
          </table:table-cell>
          <table:table-cell table:formula="of:=[.$G$2]/([.C17]+[.$H$2])" office:value-type="float" office:value="0.0000211797904383432" calcext:value-type="float">
            <text:p>2,11797904383432E-05</text:p>
          </table:table-cell>
          <table:table-cell table:formula="of:=ROUND([.$H$2]*[.D17];5)" office:value-type="float" office:value="0.2118" calcext:value-type="float">
            <text:p>0,2118</text:p>
          </table:table-cell>
          <table:table-cell table:number-columns-repeated="16379"/>
        </table:table-row>
        <table:table-row table:style-name="ro1">
          <table:table-cell table:style-name="ce2" office:value-type="float" office:value="-24" calcext:value-type="float">
            <text:p>-24</text:p>
          </table:table-cell>
          <table:table-cell table:style-name="ce2" office:value-type="float" office:value="-31.111" calcext:value-type="float">
            <text:p>-31,111</text:p>
          </table:table-cell>
          <table:table-cell table:style-name="ce2" office:value-type="float" office:value="143910.369" calcext:value-type="float">
            <text:p>143910,369</text:p>
          </table:table-cell>
          <table:table-cell table:formula="of:=[.$G$2]/([.C18]+[.$H$2])" office:value-type="float" office:value="0.0000218048986680033" calcext:value-type="float">
            <text:p>2,18048986680033E-05</text:p>
          </table:table-cell>
          <table:table-cell table:formula="of:=ROUND([.$H$2]*[.D18];5)" office:value-type="float" office:value="0.21805" calcext:value-type="float">
            <text:p>0,21805</text:p>
          </table:table-cell>
          <table:table-cell table:number-columns-repeated="16379"/>
        </table:table-row>
        <table:table-row table:style-name="ro1">
          <table:table-cell table:style-name="ce2" office:value-type="float" office:value="-23" calcext:value-type="float">
            <text:p>-23</text:p>
          </table:table-cell>
          <table:table-cell table:style-name="ce2" office:value-type="float" office:value="-30.556" calcext:value-type="float">
            <text:p>-30,556</text:p>
          </table:table-cell>
          <table:table-cell table:style-name="ce2" office:value-type="float" office:value="139521.457" calcext:value-type="float">
            <text:p>139521,457</text:p>
          </table:table-cell>
          <table:table-cell table:formula="of:=[.$G$2]/([.C19]+[.$H$2])" office:value-type="float" office:value="0.0000224449391233527" calcext:value-type="float">
            <text:p>2,24449391233527E-05</text:p>
          </table:table-cell>
          <table:table-cell table:formula="of:=ROUND([.$H$2]*[.D19];5)" office:value-type="float" office:value="0.22445" calcext:value-type="float">
            <text:p>0,22445</text:p>
          </table:table-cell>
          <table:table-cell table:number-columns-repeated="16379"/>
        </table:table-row>
        <table:table-row table:style-name="ro1">
          <table:table-cell table:style-name="ce2" office:value-type="float" office:value="-22" calcext:value-type="float">
            <text:p>-22</text:p>
          </table:table-cell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135280.551" calcext:value-type="float">
            <text:p>135280,551</text:p>
          </table:table-cell>
          <table:table-cell table:formula="of:=[.$G$2]/([.C20]+[.$H$2])" office:value-type="float" office:value="0.0000231001326529936" calcext:value-type="float">
            <text:p>2,31001326529936E-05</text:p>
          </table:table-cell>
          <table:table-cell table:formula="of:=ROUND([.$H$2]*[.D20];5)" office:value-type="float" office:value="0.231" calcext:value-type="float">
            <text:p>0,231</text:p>
          </table:table-cell>
          <table:table-cell table:number-columns-repeated="16379"/>
        </table:table-row>
        <table:table-row table:style-name="ro1"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-29.444" calcext:value-type="float">
            <text:p>-29,444</text:p>
          </table:table-cell>
          <table:table-cell table:style-name="ce2" office:value-type="float" office:value="131182.219" calcext:value-type="float">
            <text:p>131182,219</text:p>
          </table:table-cell>
          <table:table-cell table:formula="of:=[.$G$2]/([.C21]+[.$H$2])" office:value-type="float" office:value="0.0000237706987733349" calcext:value-type="float">
            <text:p>2,37706987733349E-05</text:p>
          </table:table-cell>
          <table:table-cell table:formula="of:=ROUND([.$H$2]*[.D21];5)" office:value-type="float" office:value="0.23771" calcext:value-type="float">
            <text:p>0,23771</text:p>
          </table:table-cell>
          <table:table-cell table:number-columns-repeated="16379"/>
        </table:table-row>
        <table:table-row table:style-name="ro1"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-28.889" calcext:value-type="float">
            <text:p>-28,889</text:p>
          </table:table-cell>
          <table:table-cell table:style-name="ce2" office:value-type="float" office:value="127221.248" calcext:value-type="float">
            <text:p>127221,248</text:p>
          </table:table-cell>
          <table:table-cell table:formula="of:=[.$G$2]/([.C22]+[.$H$2])" office:value-type="float" office:value="0.0000244568537957037" calcext:value-type="float">
            <text:p>2,44568537957037E-05</text:p>
          </table:table-cell>
          <table:table-cell table:formula="of:=ROUND([.$H$2]*[.D22];5)" office:value-type="float" office:value="0.24457" calcext:value-type="float">
            <text:p>0,24457</text:p>
          </table:table-cell>
          <table:table-cell table:number-columns-repeated="16379"/>
        </table:table-row>
        <table:table-row table:style-name="ro1"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-28.333" calcext:value-type="float">
            <text:p>-28,333</text:p>
          </table:table-cell>
          <table:table-cell table:style-name="ce2" office:value-type="float" office:value="123392.627" calcext:value-type="float">
            <text:p>123392,627</text:p>
          </table:table-cell>
          <table:table-cell table:formula="of:=[.$G$2]/([.C23]+[.$H$2])" office:value-type="float" office:value="0.0000251588118134895" calcext:value-type="float">
            <text:p>2,51588118134895E-05</text:p>
          </table:table-cell>
          <table:table-cell table:formula="of:=ROUND([.$H$2]*[.D23];5)" office:value-type="float" office:value="0.25159" calcext:value-type="float">
            <text:p>0,25159</text:p>
          </table:table-cell>
          <table:table-cell table:number-columns-repeated="16379"/>
        </table:table-row>
        <table:table-row table:style-name="ro1"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-27.778" calcext:value-type="float">
            <text:p>-27,778</text:p>
          </table:table-cell>
          <table:table-cell table:style-name="ce2" office:value-type="float" office:value="119691.542" calcext:value-type="float">
            <text:p>119691,542</text:p>
          </table:table-cell>
          <table:table-cell table:formula="of:=[.$G$2]/([.C24]+[.$H$2])" office:value-type="float" office:value="0.0000258767838537998" calcext:value-type="float">
            <text:p>2,58767838537998E-05</text:p>
          </table:table-cell>
          <table:table-cell table:formula="of:=ROUND([.$H$2]*[.D24];5)" office:value-type="float" office:value="0.25877" calcext:value-type="float">
            <text:p>0,25877</text:p>
          </table:table-cell>
          <table:table-cell table:number-columns-repeated="16379"/>
        </table:table-row>
        <table:table-row table:style-name="ro1">
          <table:table-cell table:style-name="ce2" office:value-type="float" office:value="-17" calcext:value-type="float">
            <text:p>-17</text:p>
          </table:table-cell>
          <table:table-cell table:style-name="ce2" office:value-type="float" office:value="-27.222" calcext:value-type="float">
            <text:p>-27,222</text:p>
          </table:table-cell>
          <table:table-cell table:style-name="ce2" office:value-type="float" office:value="116113.369" calcext:value-type="float">
            <text:p>116113,369</text:p>
          </table:table-cell>
          <table:table-cell table:formula="of:=[.$G$2]/([.C25]+[.$H$2])" office:value-type="float" office:value="0.0000266109773024936" calcext:value-type="float">
            <text:p>2,66109773024936E-05</text:p>
          </table:table-cell>
          <table:table-cell table:formula="of:=ROUND([.$H$2]*[.D25];5)" office:value-type="float" office:value="0.26611" calcext:value-type="float">
            <text:p>0,26611</text:p>
          </table:table-cell>
          <table:table-cell table:number-columns-repeated="16379"/>
        </table:table-row>
        <table:table-row table:style-name="ro1"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-26.667" calcext:value-type="float">
            <text:p>-26,667</text:p>
          </table:table-cell>
          <table:table-cell table:style-name="ce2" office:value-type="float" office:value="112653.662" calcext:value-type="float">
            <text:p>112653,662</text:p>
          </table:table-cell>
          <table:table-cell table:formula="of:=[.$G$2]/([.C26]+[.$H$2])" office:value-type="float" office:value="0.0000273615964275082" calcext:value-type="float">
            <text:p>2,73615964275082E-05</text:p>
          </table:table-cell>
          <table:table-cell table:formula="of:=ROUND([.$H$2]*[.D26];5)" office:value-type="float" office:value="0.27362" calcext:value-type="float">
            <text:p>0,27362</text:p>
          </table:table-cell>
          <table:table-cell table:number-columns-repeated="16379"/>
        </table:table-row>
        <table:table-row table:style-name="ro1"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-26.111" calcext:value-type="float">
            <text:p>-26,111</text:p>
          </table:table-cell>
          <table:table-cell table:style-name="ce2" office:value-type="float" office:value="109308.149" calcext:value-type="float">
            <text:p>109308,149</text:p>
          </table:table-cell>
          <table:table-cell table:formula="of:=[.$G$2]/([.C27]+[.$H$2])" office:value-type="float" office:value="0.0000281288413920494" calcext:value-type="float">
            <text:p>2,81288413920494E-05</text:p>
          </table:table-cell>
          <table:table-cell table:formula="of:=ROUND([.$H$2]*[.D27];5)" office:value-type="float" office:value="0.28129" calcext:value-type="float">
            <text:p>0,28129</text:p>
          </table:table-cell>
          <table:table-cell table:number-columns-repeated="16379"/>
        </table:table-row>
        <table:table-row table:style-name="ro1"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25.556" calcext:value-type="float">
            <text:p>-25,556</text:p>
          </table:table-cell>
          <table:table-cell table:style-name="ce2" office:value-type="float" office:value="106072.724" calcext:value-type="float">
            <text:p>106072,724</text:p>
          </table:table-cell>
          <table:table-cell table:formula="of:=[.$G$2]/([.C28]+[.$H$2])" office:value-type="float" office:value="0.000028912908083384" calcext:value-type="float">
            <text:p>2,8912908083384E-05</text:p>
          </table:table-cell>
          <table:table-cell table:formula="of:=ROUND([.$H$2]*[.D28];5)" office:value-type="float" office:value="0.28913" calcext:value-type="float">
            <text:p>0,28913</text:p>
          </table:table-cell>
          <table:table-cell table:number-columns-repeated="16379"/>
        </table:table-row>
        <table:table-row table:style-name="ro1"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02943.44" calcext:value-type="float">
            <text:p>102943,44</text:p>
          </table:table-cell>
          <table:table-cell table:formula="of:=[.$G$2]/([.C29]+[.$H$2])" office:value-type="float" office:value="0.0000297139878154942" calcext:value-type="float">
            <text:p>2,97139878154942E-05</text:p>
          </table:table-cell>
          <table:table-cell table:formula="of:=ROUND([.$H$2]*[.D29];5)" office:value-type="float" office:value="0.29714" calcext:value-type="float">
            <text:p>0,29714</text:p>
          </table:table-cell>
          <table:table-cell table:number-columns-repeated="16379"/>
        </table:table-row>
        <table:table-row table:style-name="ro1">
          <table:table-cell table:style-name="ce2" office:value-type="float" office:value="-12" calcext:value-type="float">
            <text:p>-12</text:p>
          </table:table-cell>
          <table:table-cell table:style-name="ce2" office:value-type="float" office:value="-24.444" calcext:value-type="float">
            <text:p>-24,444</text:p>
          </table:table-cell>
          <table:table-cell table:style-name="ce2" office:value-type="float" office:value="99916.502" calcext:value-type="float">
            <text:p>99916,502</text:p>
          </table:table-cell>
          <table:table-cell table:formula="of:=[.$G$2]/([.C30]+[.$H$2])" office:value-type="float" office:value="0.0000305322671203638" calcext:value-type="float">
            <text:p>3,05322671203638E-05</text:p>
          </table:table-cell>
          <table:table-cell table:formula="of:=ROUND([.$H$2]*[.D30];5)" office:value-type="float" office:value="0.30532" calcext:value-type="float">
            <text:p>0,30532</text:p>
          </table:table-cell>
          <table:table-cell table:number-columns-repeated="16379"/>
        </table:table-row>
        <table:table-row table:style-name="ro1">
          <table:table-cell table:style-name="ce2" office:value-type="float" office:value="-11" calcext:value-type="float">
            <text:p>-11</text:p>
          </table:table-cell>
          <table:table-cell table:style-name="ce2" office:value-type="float" office:value="-23.889" calcext:value-type="float">
            <text:p>-23,889</text:p>
          </table:table-cell>
          <table:table-cell table:style-name="ce2" office:value-type="float" office:value="96988.261" calcext:value-type="float">
            <text:p>96988,261</text:p>
          </table:table-cell>
          <table:table-cell table:formula="of:=[.$G$2]/([.C31]+[.$H$2])" office:value-type="float" office:value="0.0000313679273654144" calcext:value-type="float">
            <text:p>3,13679273654144E-05</text:p>
          </table:table-cell>
          <table:table-cell table:formula="of:=ROUND([.$H$2]*[.D31];5)" office:value-type="float" office:value="0.31368" calcext:value-type="float">
            <text:p>0,31368</text:p>
          </table:table-cell>
          <table:table-cell table:number-columns-repeated="16379"/>
        </table:table-row>
        <table:table-row table:style-name="ro1"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23.333" calcext:value-type="float">
            <text:p>-23,333</text:p>
          </table:table-cell>
          <table:table-cell table:style-name="ce2" office:value-type="float" office:value="94155.208" calcext:value-type="float">
            <text:p>94155,208</text:p>
          </table:table-cell>
          <table:table-cell table:formula="of:=[.$G$2]/([.C32]+[.$H$2])" office:value-type="float" office:value="0.0000322211444289949" calcext:value-type="float">
            <text:p>3,22211444289949E-05</text:p>
          </table:table-cell>
          <table:table-cell table:formula="of:=ROUND([.$H$2]*[.D32];5)" office:value-type="float" office:value="0.32221" calcext:value-type="float">
            <text:p>0,32221</text:p>
          </table:table-cell>
          <table:table-cell table:number-columns-repeated="16379"/>
        </table:table-row>
        <table:table-row table:style-name="ro1"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2.778" calcext:value-type="float">
            <text:p>-22,778</text:p>
          </table:table-cell>
          <table:table-cell table:style-name="ce2" office:value-type="float" office:value="91413.968" calcext:value-type="float">
            <text:p>91413,968</text:p>
          </table:table-cell>
          <table:table-cell table:formula="of:=[.$G$2]/([.C33]+[.$H$2])" office:value-type="float" office:value="0.0000330920884586628" calcext:value-type="float">
            <text:p>3,30920884586628E-05</text:p>
          </table:table-cell>
          <table:table-cell table:formula="of:=ROUND([.$H$2]*[.D33];5)" office:value-type="float" office:value="0.33092" calcext:value-type="float">
            <text:p>0,33092</text:p>
          </table:table-cell>
          <table:table-cell table:number-columns-repeated="16379"/>
        </table:table-row>
        <table:table-row table:style-name="ro1">
          <table:table-cell table:style-name="ce2" office:value-type="float" office:value="-8" calcext:value-type="float">
            <text:p>-8</text:p>
          </table:table-cell>
          <table:table-cell table:style-name="ce2" office:value-type="float" office:value="-22.222" calcext:value-type="float">
            <text:p>-22,222</text:p>
          </table:table-cell>
          <table:table-cell table:style-name="ce2" office:value-type="float" office:value="88761.297" calcext:value-type="float">
            <text:p>88761,297</text:p>
          </table:table-cell>
          <table:table-cell table:formula="of:=[.$G$2]/([.C34]+[.$H$2])" office:value-type="float" office:value="0.0000339809227090244" calcext:value-type="float">
            <text:p>3,39809227090244E-05</text:p>
          </table:table-cell>
          <table:table-cell table:formula="of:=ROUND([.$H$2]*[.D34];5)" office:value-type="float" office:value="0.33981" calcext:value-type="float">
            <text:p>0,33981</text:p>
          </table:table-cell>
          <table:table-cell table:number-columns-repeated="16379"/>
        </table:table-row>
        <table:table-row table:style-name="ro1">
          <table:table-cell table:style-name="ce2" office:value-type="float" office:value="-7" calcext:value-type="float">
            <text:p>-7</text:p>
          </table:table-cell>
          <table:table-cell table:style-name="ce2" office:value-type="float" office:value="-21.667" calcext:value-type="float">
            <text:p>-21,667</text:p>
          </table:table-cell>
          <table:table-cell table:style-name="ce2" office:value-type="float" office:value="86194.072" calcext:value-type="float">
            <text:p>86194,072</text:p>
          </table:table-cell>
          <table:table-cell table:formula="of:=[.$G$2]/([.C35]+[.$H$2])" office:value-type="float" office:value="0.0000348878047287571" calcext:value-type="float">
            <text:p>3,48878047287571E-05</text:p>
          </table:table-cell>
          <table:table-cell table:formula="of:=ROUND([.$H$2]*[.D35];5)" office:value-type="float" office:value="0.34888" calcext:value-type="float">
            <text:p>0,34888</text:p>
          </table:table-cell>
          <table:table-cell table:number-columns-repeated="16379"/>
        </table:table-row>
        <table:table-row table:style-name="ro1">
          <table:table-cell table:style-name="ce2" office:value-type="float" office:value="-6" calcext:value-type="float">
            <text:p>-6</text:p>
          </table:table-cell>
          <table:table-cell table:style-name="ce2" office:value-type="float" office:value="-21.111" calcext:value-type="float">
            <text:p>-21,111</text:p>
          </table:table-cell>
          <table:table-cell table:style-name="ce2" office:value-type="float" office:value="83709.29" calcext:value-type="float">
            <text:p>83709,29</text:p>
          </table:table-cell>
          <table:table-cell table:formula="of:=[.$G$2]/([.C36]+[.$H$2])" office:value-type="float" office:value="0.0000358128847203943" calcext:value-type="float">
            <text:p>3,58128847203943E-05</text:p>
          </table:table-cell>
          <table:table-cell table:formula="of:=ROUND([.$H$2]*[.D36];5)" office:value-type="float" office:value="0.35813" calcext:value-type="float">
            <text:p>0,35813</text:p>
          </table:table-cell>
          <table:table-cell table:number-columns-repeated="16379"/>
        </table:table-row>
        <table:table-row table:style-name="ro1">
          <table:table-cell table:style-name="ce2" office:value-type="float" office:value="-5" calcext:value-type="float">
            <text:p>-5</text:p>
          </table:table-cell>
          <table:table-cell table:style-name="ce2" office:value-type="float" office:value="-20.556" calcext:value-type="float">
            <text:p>-20,556</text:p>
          </table:table-cell>
          <table:table-cell table:style-name="ce2" office:value-type="float" office:value="81304.06" calcext:value-type="float">
            <text:p>81304,06</text:p>
          </table:table-cell>
          <table:table-cell table:formula="of:=[.$G$2]/([.C37]+[.$H$2])" office:value-type="float" office:value="0.0000367563063460705" calcext:value-type="float">
            <text:p>3,67563063460705E-05</text:p>
          </table:table-cell>
          <table:table-cell table:formula="of:=ROUND([.$H$2]*[.D37];5)" office:value-type="float" office:value="0.36756" calcext:value-type="float">
            <text:p>0,36756</text:p>
          </table:table-cell>
          <table:table-cell table:number-columns-repeated="16379"/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78975.604" calcext:value-type="float">
            <text:p>78975,604</text:p>
          </table:table-cell>
          <table:table-cell table:formula="of:=[.$G$2]/([.C38]+[.$H$2])" office:value-type="float" office:value="0.0000377182041944891" calcext:value-type="float">
            <text:p>3,77182041944891E-05</text:p>
          </table:table-cell>
          <table:table-cell table:formula="of:=ROUND([.$H$2]*[.D38];5)" office:value-type="float" office:value="0.37718" calcext:value-type="float">
            <text:p>0,37718</text:p>
          </table:table-cell>
          <table:table-cell table:number-columns-repeated="16379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style-name="ce2" office:value-type="float" office:value="-19.444" calcext:value-type="float">
            <text:p>-19,444</text:p>
          </table:table-cell>
          <table:table-cell table:style-name="ce2" office:value-type="float" office:value="76721.244" calcext:value-type="float">
            <text:p>76721,244</text:p>
          </table:table-cell>
          <table:table-cell table:formula="of:=[.$G$2]/([.C39]+[.$H$2])" office:value-type="float" office:value="0.000038698706858956" calcext:value-type="float">
            <text:p>3,8698706858956E-05</text:p>
          </table:table-cell>
          <table:table-cell table:formula="of:=ROUND([.$H$2]*[.D39];5)" office:value-type="float" office:value="0.38699" calcext:value-type="float">
            <text:p>0,38699</text:p>
          </table:table-cell>
          <table:table-cell table:number-columns-repeated="16379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8.889" calcext:value-type="float">
            <text:p>-18,889</text:p>
          </table:table-cell>
          <table:table-cell table:style-name="ce2" office:value-type="float" office:value="74538.407" calcext:value-type="float">
            <text:p>74538,407</text:p>
          </table:table-cell>
          <table:table-cell table:formula="of:=[.$G$2]/([.C40]+[.$H$2])" office:value-type="float" office:value="0.0000396979327987574" calcext:value-type="float">
            <text:p>3,96979327987574E-05</text:p>
          </table:table-cell>
          <table:table-cell table:formula="of:=ROUND([.$H$2]*[.D40];5)" office:value-type="float" office:value="0.39698" calcext:value-type="float">
            <text:p>0,39698</text:p>
          </table:table-cell>
          <table:table-cell table:number-columns-repeated="16379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office:value-type="float" office:value="-18.333" calcext:value-type="float">
            <text:p>-18,333</text:p>
          </table:table-cell>
          <table:table-cell table:style-name="ce2" office:value-type="float" office:value="72424.612" calcext:value-type="float">
            <text:p>72424,612</text:p>
          </table:table-cell>
          <table:table-cell table:formula="of:=[.$G$2]/([.C41]+[.$H$2])" office:value-type="float" office:value="0.0000407159939072567" calcext:value-type="float">
            <text:p>4,07159939072567E-05</text:p>
          </table:table-cell>
          <table:table-cell table:formula="of:=ROUND([.$H$2]*[.D41];5)" office:value-type="float" office:value="0.40716" calcext:value-type="float">
            <text:p>0,40716</text:p>
          </table:table-cell>
          <table:table-cell table:number-columns-repeated="1637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17.778" calcext:value-type="float">
            <text:p>-17,778</text:p>
          </table:table-cell>
          <table:table-cell table:style-name="ce2" office:value-type="float" office:value="70377.475" calcext:value-type="float">
            <text:p>70377,475</text:p>
          </table:table-cell>
          <table:table-cell table:formula="of:=[.$G$2]/([.C42]+[.$H$2])" office:value-type="float" office:value="0.0000417529911209577" calcext:value-type="float">
            <text:p>4,17529911209577E-05</text:p>
          </table:table-cell>
          <table:table-cell table:formula="of:=ROUND([.$H$2]*[.D42];5)" office:value-type="float" office:value="0.41753" calcext:value-type="float">
            <text:p>0,41753</text:p>
          </table:table-cell>
          <table:table-cell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-17.222" calcext:value-type="float">
            <text:p>-17,222</text:p>
          </table:table-cell>
          <table:table-cell table:style-name="ce2" office:value-type="float" office:value="68394.698" calcext:value-type="float">
            <text:p>68394,698</text:p>
          </table:table-cell>
          <table:table-cell table:formula="of:=[.$G$2]/([.C43]+[.$H$2])" office:value-type="float" office:value="0.0000428090175179959" calcext:value-type="float">
            <text:p>4,28090175179959E-05</text:p>
          </table:table-cell>
          <table:table-cell table:formula="of:=ROUND([.$H$2]*[.D43];5)" office:value-type="float" office:value="0.42809" calcext:value-type="float">
            <text:p>0,42809</text:p>
          </table:table-cell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16.667" calcext:value-type="float">
            <text:p>-16,667</text:p>
          </table:table-cell>
          <table:table-cell table:style-name="ce2" office:value-type="float" office:value="66474.07" calcext:value-type="float">
            <text:p>66474,07</text:p>
          </table:table-cell>
          <table:table-cell table:formula="of:=[.$G$2]/([.C44]+[.$H$2])" office:value-type="float" office:value="0.0000438841557667847" calcext:value-type="float">
            <text:p>4,38841557667847E-05</text:p>
          </table:table-cell>
          <table:table-cell table:formula="of:=ROUND([.$H$2]*[.D44];5)" office:value-type="float" office:value="0.43884" calcext:value-type="float">
            <text:p>0,43884</text:p>
          </table:table-cell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16.111" calcext:value-type="float">
            <text:p>-16,111</text:p>
          </table:table-cell>
          <table:table-cell table:style-name="ce2" office:value-type="float" office:value="64613.462" calcext:value-type="float">
            <text:p>64613,462</text:p>
          </table:table-cell>
          <table:table-cell table:formula="of:=[.$G$2]/([.C45]+[.$H$2])" office:value-type="float" office:value="0.0000449784785485493" calcext:value-type="float">
            <text:p>4,49784785485493E-05</text:p>
          </table:table-cell>
          <table:table-cell table:formula="of:=ROUND([.$H$2]*[.D45];5)" office:value-type="float" office:value="0.44978" calcext:value-type="float">
            <text:p>0,44978</text:p>
          </table:table-cell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-15.556" calcext:value-type="float">
            <text:p>-15,556</text:p>
          </table:table-cell>
          <table:table-cell table:style-name="ce2" office:value-type="float" office:value="62810.821" calcext:value-type="float">
            <text:p>62810,821</text:p>
          </table:table-cell>
          <table:table-cell table:formula="of:=[.$G$2]/([.C46]+[.$H$2])" office:value-type="float" office:value="0.0000460920499715283" calcext:value-type="float">
            <text:p>4,60920499715283E-05</text:p>
          </table:table-cell>
          <table:table-cell table:formula="of:=ROUND([.$H$2]*[.D46];5)" office:value-type="float" office:value="0.46092" calcext:value-type="float">
            <text:p>0,46092</text:p>
          </table:table-cell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61064.175" calcext:value-type="float">
            <text:p>61064,175</text:p>
          </table:table-cell>
          <table:table-cell table:formula="of:=[.$G$2]/([.C47]+[.$H$2])" office:value-type="float" office:value="0.0000472249202921162" calcext:value-type="float">
            <text:p>4,72249202921162E-05</text:p>
          </table:table-cell>
          <table:table-cell table:formula="of:=ROUND([.$H$2]*[.D47];5)" office:value-type="float" office:value="0.47225" calcext:value-type="float">
            <text:p>0,47225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-14.444" calcext:value-type="float">
            <text:p>-14,444</text:p>
          </table:table-cell>
          <table:table-cell table:style-name="ce2" office:value-type="float" office:value="59371.619" calcext:value-type="float">
            <text:p>59371,619</text:p>
          </table:table-cell>
          <table:table-cell table:formula="of:=[.$G$2]/([.C48]+[.$H$2])" office:value-type="float" office:value="0.0000483771324408617" calcext:value-type="float">
            <text:p>4,83771324408617E-05</text:p>
          </table:table-cell>
          <table:table-cell table:formula="of:=ROUND([.$H$2]*[.D48];5)" office:value-type="float" office:value="0.48377" calcext:value-type="float">
            <text:p>0,48377</text:p>
          </table:table-cell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-13.889" calcext:value-type="float">
            <text:p>-13,889</text:p>
          </table:table-cell>
          <table:table-cell table:style-name="ce2" office:value-type="float" office:value="57731.321" calcext:value-type="float">
            <text:p>57731,321</text:p>
          </table:table-cell>
          <table:table-cell table:formula="of:=[.$G$2]/([.C49]+[.$H$2])" office:value-type="float" office:value="0.0000495487161692889" calcext:value-type="float">
            <text:p>4,95487161692889E-05</text:p>
          </table:table-cell>
          <table:table-cell table:formula="of:=ROUND([.$H$2]*[.D49];5)" office:value-type="float" office:value="0.49549" calcext:value-type="float">
            <text:p>0,49549</text:p>
          </table:table-cell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-13.333" calcext:value-type="float">
            <text:p>-13,333</text:p>
          </table:table-cell>
          <table:table-cell table:style-name="ce2" office:value-type="float" office:value="56141.516" calcext:value-type="float">
            <text:p>56141,516</text:p>
          </table:table-cell>
          <table:table-cell table:formula="of:=[.$G$2]/([.C50]+[.$H$2])" office:value-type="float" office:value="0.0000507396897283092" calcext:value-type="float">
            <text:p>5,07396897283092E-05</text:p>
          </table:table-cell>
          <table:table-cell table:formula="of:=ROUND([.$H$2]*[.D50];5)" office:value-type="float" office:value="0.5074" calcext:value-type="float">
            <text:p>0,5074</text:p>
          </table:table-cell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-12.778" calcext:value-type="float">
            <text:p>-12,778</text:p>
          </table:table-cell>
          <table:table-cell table:style-name="ce2" office:value-type="float" office:value="54600.502" calcext:value-type="float">
            <text:p>54600,502</text:p>
          </table:table-cell>
          <table:table-cell table:formula="of:=[.$G$2]/([.C51]+[.$H$2])" office:value-type="float" office:value="0.0000519500606976707" calcext:value-type="float">
            <text:p>5,19500606976707E-05</text:p>
          </table:table-cell>
          <table:table-cell table:formula="of:=ROUND([.$H$2]*[.D51];5)" office:value-type="float" office:value="0.5195" calcext:value-type="float">
            <text:p>0,5195</text:p>
          </table:table-cell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2.222" calcext:value-type="float">
            <text:p>-12,222</text:p>
          </table:table-cell>
          <table:table-cell table:style-name="ce2" office:value-type="float" office:value="53106.641" calcext:value-type="float">
            <text:p>53106,641</text:p>
          </table:table-cell>
          <table:table-cell table:formula="of:=[.$G$2]/([.C52]+[.$H$2])" office:value-type="float" office:value="0.0000531798230236973" calcext:value-type="float">
            <text:p>5,31798230236973E-05</text:p>
          </table:table-cell>
          <table:table-cell table:formula="of:=ROUND([.$H$2]*[.D52];5)" office:value-type="float" office:value="0.5318" calcext:value-type="float">
            <text:p>0,5318</text:p>
          </table:table-cell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-11.667" calcext:value-type="float">
            <text:p>-11,667</text:p>
          </table:table-cell>
          <table:table-cell table:style-name="ce2" office:value-type="float" office:value="51658.352" calcext:value-type="float">
            <text:p>51658,352</text:p>
          </table:table-cell>
          <table:table-cell table:formula="of:=[.$G$2]/([.C53]+[.$H$2])" office:value-type="float" office:value="0.0000544289604107486" calcext:value-type="float">
            <text:p>5,44289604107486E-05</text:p>
          </table:table-cell>
          <table:table-cell table:formula="of:=ROUND([.$H$2]*[.D53];5)" office:value-type="float" office:value="0.54429" calcext:value-type="float">
            <text:p>0,54429</text:p>
          </table:table-cell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1.111" calcext:value-type="float">
            <text:p>-11,111</text:p>
          </table:table-cell>
          <table:table-cell table:style-name="ce2" office:value-type="float" office:value="50254.113" calcext:value-type="float">
            <text:p>50254,113</text:p>
          </table:table-cell>
          <table:table-cell table:formula="of:=[.$G$2]/([.C54]+[.$H$2])" office:value-type="float" office:value="0.0000556974425961594" calcext:value-type="float">
            <text:p>5,56974425961594E-05</text:p>
          </table:table-cell>
          <table:table-cell table:formula="of:=ROUND([.$H$2]*[.D54];5)" office:value-type="float" office:value="0.55697" calcext:value-type="float">
            <text:p>0,55697</text:p>
          </table:table-cell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-10.556" calcext:value-type="float">
            <text:p>-10,556</text:p>
          </table:table-cell>
          <table:table-cell table:style-name="ce2" office:value-type="float" office:value="48892.457" calcext:value-type="float">
            <text:p>48892,457</text:p>
          </table:table-cell>
          <table:table-cell table:formula="of:=[.$G$2]/([.C55]+[.$H$2])" office:value-type="float" office:value="0.0000569852264781549" calcext:value-type="float">
            <text:p>5,69852264781549E-05</text:p>
          </table:table-cell>
          <table:table-cell table:formula="of:=ROUND([.$H$2]*[.D55];5)" office:value-type="float" office:value="0.56985" calcext:value-type="float">
            <text:p>0,56985</text:p>
          </table:table-cell>
          <table:table-cell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7571.969" calcext:value-type="float">
            <text:p>47571,969</text:p>
          </table:table-cell>
          <table:table-cell table:formula="of:=[.$G$2]/([.C56]+[.$H$2])" office:value-type="float" office:value="0.0000582922567751678" calcext:value-type="float">
            <text:p>5,82922567751678E-05</text:p>
          </table:table-cell>
          <table:table-cell table:formula="of:=ROUND([.$H$2]*[.D56];5)" office:value-type="float" office:value="0.58292" calcext:value-type="float">
            <text:p>0,58292</text:p>
          </table:table-cell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-9.444" calcext:value-type="float">
            <text:p>-9,444</text:p>
          </table:table-cell>
          <table:table-cell table:style-name="ce2" office:value-type="float" office:value="46291.285" calcext:value-type="float">
            <text:p>46291,285</text:p>
          </table:table-cell>
          <table:table-cell table:formula="of:=[.$G$2]/([.C57]+[.$H$2])" office:value-type="float" office:value="0.0000596184649186815" calcext:value-type="float">
            <text:p>5,96184649186815E-05</text:p>
          </table:table-cell>
          <table:table-cell table:formula="of:=ROUND([.$H$2]*[.D57];5)" office:value-type="float" office:value="0.59618" calcext:value-type="float">
            <text:p>0,59618</text:p>
          </table:table-cell>
          <table:table-cell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-8.889" calcext:value-type="float">
            <text:p>-8,889</text:p>
          </table:table-cell>
          <table:table-cell table:style-name="ce2" office:value-type="float" office:value="45049.091" calcext:value-type="float">
            <text:p>45049,091</text:p>
          </table:table-cell>
          <table:table-cell table:formula="of:=[.$G$2]/([.C58]+[.$H$2])" office:value-type="float" office:value="0.0000609637677759293" calcext:value-type="float">
            <text:p>6,09637677759293E-05</text:p>
          </table:table-cell>
          <table:table-cell table:formula="of:=ROUND([.$H$2]*[.D58];5)" office:value-type="float" office:value="0.60964" calcext:value-type="float">
            <text:p>0,60964</text:p>
          </table:table-cell>
          <table:table-cell table:number-columns-repeated="163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-8.333" calcext:value-type="float">
            <text:p>-8,333</text:p>
          </table:table-cell>
          <table:table-cell table:style-name="ce2" office:value-type="float" office:value="43844.117" calcext:value-type="float">
            <text:p>43844,117</text:p>
          </table:table-cell>
          <table:table-cell table:formula="of:=[.$G$2]/([.C59]+[.$H$2])" office:value-type="float" office:value="0.000062328071978597" calcext:value-type="float">
            <text:p>6,2328071978597E-05</text:p>
          </table:table-cell>
          <table:table-cell table:formula="of:=ROUND([.$H$2]*[.D59];5)" office:value-type="float" office:value="0.62328" calcext:value-type="float">
            <text:p>0,62328</text:p>
          </table:table-cell>
          <table:table-cell table:number-columns-repeated="1637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-7.778" calcext:value-type="float">
            <text:p>-7,778</text:p>
          </table:table-cell>
          <table:table-cell table:style-name="ce2" office:value-type="float" office:value="42675.143" calcext:value-type="float">
            <text:p>42675,143</text:p>
          </table:table-cell>
          <table:table-cell table:formula="of:=[.$G$2]/([.C60]+[.$H$2])" office:value-type="float" office:value="0.0000637112651027829" calcext:value-type="float">
            <text:p>6,37112651027829E-05</text:p>
          </table:table-cell>
          <table:table-cell table:formula="of:=ROUND([.$H$2]*[.D60];5)" office:value-type="float" office:value="0.63711" calcext:value-type="float">
            <text:p>0,63711</text:p>
          </table:table-cell>
          <table:table-cell table:number-columns-repeated="163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-7.222" calcext:value-type="float">
            <text:p>-7,222</text:p>
          </table:table-cell>
          <table:table-cell table:style-name="ce2" office:value-type="float" office:value="41540.987" calcext:value-type="float">
            <text:p>41540,987</text:p>
          </table:table-cell>
          <table:table-cell table:formula="of:=[.$G$2]/([.C61]+[.$H$2])" office:value-type="float" office:value="0.0000651132272651278" calcext:value-type="float">
            <text:p>6,51132272651278E-05</text:p>
          </table:table-cell>
          <table:table-cell table:formula="of:=ROUND([.$H$2]*[.D61];5)" office:value-type="float" office:value="0.65113" calcext:value-type="float">
            <text:p>0,65113</text:p>
          </table:table-cell>
          <table:table-cell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-6.667" calcext:value-type="float">
            <text:p>-6,667</text:p>
          </table:table-cell>
          <table:table-cell table:style-name="ce2" office:value-type="float" office:value="40440.513" calcext:value-type="float">
            <text:p>40440,513</text:p>
          </table:table-cell>
          <table:table-cell table:formula="of:=[.$G$2]/([.C62]+[.$H$2])" office:value-type="float" office:value="0.0000665338197492163" calcext:value-type="float">
            <text:p>6,65338197492163E-05</text:p>
          </table:table-cell>
          <table:table-cell table:formula="of:=ROUND([.$H$2]*[.D62];5)" office:value-type="float" office:value="0.66534" calcext:value-type="float">
            <text:p>0,66534</text:p>
          </table:table-cell>
          <table:table-cell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-6.111" calcext:value-type="float">
            <text:p>-6,111</text:p>
          </table:table-cell>
          <table:table-cell table:style-name="ce2" office:value-type="float" office:value="39372.624" calcext:value-type="float">
            <text:p>39372,624</text:p>
          </table:table-cell>
          <table:table-cell table:formula="of:=[.$G$2]/([.C63]+[.$H$2])" office:value-type="float" office:value="0.0000679728912119396" calcext:value-type="float">
            <text:p>6,79728912119396E-05</text:p>
          </table:table-cell>
          <table:table-cell table:formula="of:=ROUND([.$H$2]*[.D63];5)" office:value-type="float" office:value="0.67973" calcext:value-type="float">
            <text:p>0,67973</text:p>
          </table:table-cell>
          <table:table-cell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-5.556" calcext:value-type="float">
            <text:p>-5,556</text:p>
          </table:table-cell>
          <table:table-cell table:style-name="ce2" office:value-type="float" office:value="38336.26" calcext:value-type="float">
            <text:p>38336,26</text:p>
          </table:table-cell>
          <table:table-cell table:formula="of:=[.$G$2]/([.C64]+[.$H$2])" office:value-type="float" office:value="0.0000694302786355419" calcext:value-type="float">
            <text:p>6,94302786355419E-05</text:p>
          </table:table-cell>
          <table:table-cell table:formula="of:=ROUND([.$H$2]*[.D64];5)" office:value-type="float" office:value="0.6943" calcext:value-type="float">
            <text:p>0,6943</text:p>
          </table:table-cell>
          <table:table-cell table:number-columns-repeated="1637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37330.401" calcext:value-type="float">
            <text:p>37330,401</text:p>
          </table:table-cell>
          <table:table-cell table:formula="of:=[.$G$2]/([.C65]+[.$H$2])" office:value-type="float" office:value="0.000070905801115017" calcext:value-type="float">
            <text:p>7,0905801115017E-05</text:p>
          </table:table-cell>
          <table:table-cell table:formula="of:=ROUND([.$H$2]*[.D65];5)" office:value-type="float" office:value="0.70906" calcext:value-type="float">
            <text:p>0,70906</text:p>
          </table:table-cell>
          <table:table-cell table:number-columns-repeated="1637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-4.444" calcext:value-type="float">
            <text:p>-4,444</text:p>
          </table:table-cell>
          <table:table-cell table:style-name="ce2" office:value-type="float" office:value="36354.061" calcext:value-type="float">
            <text:p>36354,061</text:p>
          </table:table-cell>
          <table:table-cell table:formula="of:=[.$G$2]/([.C66]+[.$H$2])" office:value-type="float" office:value="0.0000723992661613834" calcext:value-type="float">
            <text:p>7,23992661613834E-05</text:p>
          </table:table-cell>
          <table:table-cell table:formula="of:=ROUND([.$H$2]*[.D66];5)" office:value-type="float" office:value="0.72399" calcext:value-type="float">
            <text:p>0,72399</text:p>
          </table:table-cell>
          <table:table-cell table:number-columns-repeated="1637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-3.889" calcext:value-type="float">
            <text:p>-3,889</text:p>
          </table:table-cell>
          <table:table-cell table:style-name="ce2" office:value-type="float" office:value="35406.29" calcext:value-type="float">
            <text:p>35406,29</text:p>
          </table:table-cell>
          <table:table-cell table:formula="of:=[.$G$2]/([.C67]+[.$H$2])" office:value-type="float" office:value="0.0000739104648276704" calcext:value-type="float">
            <text:p>7,39104648276704E-05</text:p>
          </table:table-cell>
          <table:table-cell table:formula="of:=ROUND([.$H$2]*[.D67];5)" office:value-type="float" office:value="0.7391" calcext:value-type="float">
            <text:p>0,7391</text:p>
          </table:table-cell>
          <table:table-cell table:number-columns-repeated="1637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-3.333" calcext:value-type="float">
            <text:p>-3,333</text:p>
          </table:table-cell>
          <table:table-cell table:style-name="ce2" office:value-type="float" office:value="34486.168" calcext:value-type="float">
            <text:p>34486,168</text:p>
          </table:table-cell>
          <table:table-cell table:formula="of:=[.$G$2]/([.C68]+[.$H$2])" office:value-type="float" office:value="0.0000754391792073437" calcext:value-type="float">
            <text:p>7,54391792073437E-05</text:p>
          </table:table-cell>
          <table:table-cell table:formula="of:=ROUND([.$H$2]*[.D68];5)" office:value-type="float" office:value="0.75439" calcext:value-type="float">
            <text:p>0,75439</text:p>
          </table:table-cell>
          <table:table-cell table:number-columns-repeated="1637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-2.778" calcext:value-type="float">
            <text:p>-2,778</text:p>
          </table:table-cell>
          <table:table-cell table:style-name="ce2" office:value-type="float" office:value="33592.811" calcext:value-type="float">
            <text:p>33592,811</text:p>
          </table:table-cell>
          <table:table-cell table:formula="of:=[.$G$2]/([.C69]+[.$H$2])" office:value-type="float" office:value="0.0000769851707888257" calcext:value-type="float">
            <text:p>7,69851707888257E-05</text:p>
          </table:table-cell>
          <table:table-cell table:formula="of:=ROUND([.$H$2]*[.D69];5)" office:value-type="float" office:value="0.76985" calcext:value-type="float">
            <text:p>0,76985</text:p>
          </table:table-cell>
          <table:table-cell table:number-columns-repeated="1637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-2.222" calcext:value-type="float">
            <text:p>-2,222</text:p>
          </table:table-cell>
          <table:table-cell table:style-name="ce2" office:value-type="float" office:value="32725.363" calcext:value-type="float">
            <text:p>32725,363</text:p>
          </table:table-cell>
          <table:table-cell table:formula="of:=[.$G$2]/([.C70]+[.$H$2])" office:value-type="float" office:value="0.0000785481916209817" calcext:value-type="float">
            <text:p>7,85481916209817E-05</text:p>
          </table:table-cell>
          <table:table-cell table:formula="of:=ROUND([.$H$2]*[.D70];5)" office:value-type="float" office:value="0.78548" calcext:value-type="float">
            <text:p>0,78548</text:p>
          </table:table-cell>
          <table:table-cell table:number-columns-repeated="1637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-1.667" calcext:value-type="float">
            <text:p>-1,667</text:p>
          </table:table-cell>
          <table:table-cell table:style-name="ce2" office:value-type="float" office:value="31882.999" calcext:value-type="float">
            <text:p>31882,999</text:p>
          </table:table-cell>
          <table:table-cell table:formula="of:=[.$G$2]/([.C71]+[.$H$2])" office:value-type="float" office:value="0.000080127977464078" calcext:value-type="float">
            <text:p>8,0127977464078E-05</text:p>
          </table:table-cell>
          <table:table-cell table:formula="of:=ROUND([.$H$2]*[.D71];5)" office:value-type="float" office:value="0.80128" calcext:value-type="float">
            <text:p>0,80128</text:p>
          </table:table-cell>
          <table:table-cell table:number-columns-repeated="1637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.111" calcext:value-type="float">
            <text:p>-1,111</text:p>
          </table:table-cell>
          <table:table-cell table:style-name="ce2" office:value-type="float" office:value="31064.922" calcext:value-type="float">
            <text:p>31064,922</text:p>
          </table:table-cell>
          <table:table-cell table:formula="of:=[.$G$2]/([.C72]+[.$H$2])" office:value-type="float" office:value="0.0000817242511747618" calcext:value-type="float">
            <text:p>8,17242511747618E-05</text:p>
          </table:table-cell>
          <table:table-cell table:formula="of:=ROUND([.$H$2]*[.D72];5)" office:value-type="float" office:value="0.81724" calcext:value-type="float">
            <text:p>0,81724</text:p>
          </table:table-cell>
          <table:table-cell table:number-columns-repeated="1637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-0.556" calcext:value-type="float">
            <text:p>-0,556</text:p>
          </table:table-cell>
          <table:table-cell table:style-name="ce2" office:value-type="float" office:value="30270.362" calcext:value-type="float">
            <text:p>30270,362</text:p>
          </table:table-cell>
          <table:table-cell table:formula="of:=[.$G$2]/([.C73]+[.$H$2])" office:value-type="float" office:value="0.0000833367229229278" calcext:value-type="float">
            <text:p>8,33367229229278E-05</text:p>
          </table:table-cell>
          <table:table-cell table:formula="of:=ROUND([.$H$2]*[.D73];5)" office:value-type="float" office:value="0.83337" calcext:value-type="float">
            <text:p>0,83337</text:p>
          </table:table-cell>
          <table:table-cell table:number-columns-repeated="1637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498.576" calcext:value-type="float">
            <text:p>29498,576</text:p>
          </table:table-cell>
          <table:table-cell table:formula="of:=[.$G$2]/([.C74]+[.$H$2])" office:value-type="float" office:value="0.0000849650883616665" calcext:value-type="float">
            <text:p>8,49650883616665E-05</text:p>
          </table:table-cell>
          <table:table-cell table:formula="of:=ROUND([.$H$2]*[.D74];5)" office:value-type="float" office:value="0.84965" calcext:value-type="float">
            <text:p>0,84965</text:p>
          </table:table-cell>
          <table:table-cell table:number-columns-repeated="1637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0.556" calcext:value-type="float">
            <text:p>0,556</text:p>
          </table:table-cell>
          <table:table-cell table:style-name="ce2" office:value-type="float" office:value="28748.847" calcext:value-type="float">
            <text:p>28748,847</text:p>
          </table:table-cell>
          <table:table-cell table:formula="of:=[.$G$2]/([.C75]+[.$H$2])" office:value-type="float" office:value="0.0000866090286505815" calcext:value-type="float">
            <text:p>8,66090286505815E-05</text:p>
          </table:table-cell>
          <table:table-cell table:formula="of:=ROUND([.$H$2]*[.D75];5)" office:value-type="float" office:value="0.86609" calcext:value-type="float">
            <text:p>0,86609</text:p>
          </table:table-cell>
          <table:table-cell table:number-columns-repeated="1637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.111" calcext:value-type="float">
            <text:p>1,111</text:p>
          </table:table-cell>
          <table:table-cell table:style-name="ce2" office:value-type="float" office:value="28020.481" calcext:value-type="float">
            <text:p>28020,481</text:p>
          </table:table-cell>
          <table:table-cell table:formula="of:=[.$G$2]/([.C76]+[.$H$2])" office:value-type="float" office:value="0.0000882682152285238" calcext:value-type="float">
            <text:p>8,82682152285238E-05</text:p>
          </table:table-cell>
          <table:table-cell table:formula="of:=ROUND([.$H$2]*[.D76];5)" office:value-type="float" office:value="0.88268" calcext:value-type="float">
            <text:p>0,88268</text:p>
          </table:table-cell>
          <table:table-cell table:number-columns-repeated="1637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.667" calcext:value-type="float">
            <text:p>1,667</text:p>
          </table:table-cell>
          <table:table-cell table:style-name="ce2" office:value-type="float" office:value="27312.809" calcext:value-type="float">
            <text:p>27312,809</text:p>
          </table:table-cell>
          <table:table-cell table:formula="of:=[.$G$2]/([.C77]+[.$H$2])" office:value-type="float" office:value="0.0000899423037273876" calcext:value-type="float">
            <text:p>8,99423037273876E-05</text:p>
          </table:table-cell>
          <table:table-cell table:formula="of:=ROUND([.$H$2]*[.D77];5)" office:value-type="float" office:value="0.89942" calcext:value-type="float">
            <text:p>0,89942</text:p>
          </table:table-cell>
          <table:table-cell table:number-columns-repeated="1637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.222" calcext:value-type="float">
            <text:p>2,222</text:p>
          </table:table-cell>
          <table:table-cell table:style-name="ce2" office:value-type="float" office:value="26625.184" calcext:value-type="float">
            <text:p>26625,184</text:p>
          </table:table-cell>
          <table:table-cell table:formula="of:=[.$G$2]/([.C78]+[.$H$2])" office:value-type="float" office:value="0.0000916309389735762" calcext:value-type="float">
            <text:p>9,16309389735762E-05</text:p>
          </table:table-cell>
          <table:table-cell table:formula="of:=ROUND([.$H$2]*[.D78];5)" office:value-type="float" office:value="0.91631" calcext:value-type="float">
            <text:p>0,91631</text:p>
          </table:table-cell>
          <table:table-cell table:number-columns-repeated="1637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.778" calcext:value-type="float">
            <text:p>2,778</text:p>
          </table:table-cell>
          <table:table-cell table:style-name="ce2" office:value-type="float" office:value="25956.981" calcext:value-type="float">
            <text:p>25956,981</text:p>
          </table:table-cell>
          <table:table-cell table:formula="of:=[.$G$2]/([.C79]+[.$H$2])" office:value-type="float" office:value="0.0000933337534650086" calcext:value-type="float">
            <text:p>9,33337534650086E-05</text:p>
          </table:table-cell>
          <table:table-cell table:formula="of:=ROUND([.$H$2]*[.D79];5)" office:value-type="float" office:value="0.93334" calcext:value-type="float">
            <text:p>0,93334</text:p>
          </table:table-cell>
          <table:table-cell table:number-columns-repeated="1637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.333" calcext:value-type="float">
            <text:p>3,333</text:p>
          </table:table-cell>
          <table:table-cell table:style-name="ce2" office:value-type="float" office:value="25307.598" calcext:value-type="float">
            <text:p>25307,598</text:p>
          </table:table-cell>
          <table:table-cell table:formula="of:=[.$G$2]/([.C80]+[.$H$2])" office:value-type="float" office:value="0.0000950503628142589" calcext:value-type="float">
            <text:p>9,50503628142589E-05</text:p>
          </table:table-cell>
          <table:table-cell table:formula="of:=ROUND([.$H$2]*[.D80];5)" office:value-type="float" office:value="0.9505" calcext:value-type="float">
            <text:p>0,9505</text:p>
          </table:table-cell>
          <table:table-cell table:number-columns-repeated="1637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889" calcext:value-type="float">
            <text:p>3,889</text:p>
          </table:table-cell>
          <table:table-cell table:style-name="ce2" office:value-type="float" office:value="24676.449" calcext:value-type="float">
            <text:p>24676,449</text:p>
          </table:table-cell>
          <table:table-cell table:formula="of:=[.$G$2]/([.C81]+[.$H$2])" office:value-type="float" office:value="0.0000967803825587793" calcext:value-type="float">
            <text:p>9,67803825587793E-05</text:p>
          </table:table-cell>
          <table:table-cell table:formula="of:=ROUND([.$H$2]*[.D81];5)" office:value-type="float" office:value="0.9678" calcext:value-type="float">
            <text:p>0,9678</text:p>
          </table:table-cell>
          <table:table-cell table:number-columns-repeated="1637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.444" calcext:value-type="float">
            <text:p>4,444</text:p>
          </table:table-cell>
          <table:table-cell table:style-name="ce2" office:value-type="float" office:value="24062.973" calcext:value-type="float">
            <text:p>24062,973</text:p>
          </table:table-cell>
          <table:table-cell table:formula="of:=[.$G$2]/([.C82]+[.$H$2])" office:value-type="float" office:value="0.0000985234025227334" calcext:value-type="float">
            <text:p>9,85234025227334E-05</text:p>
          </table:table-cell>
          <table:table-cell table:formula="of:=ROUND([.$H$2]*[.D82];5)" office:value-type="float" office:value="0.98523" calcext:value-type="float">
            <text:p>0,98523</text:p>
          </table:table-cell>
          <table:table-cell table:number-columns-repeated="1637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466.624" calcext:value-type="float">
            <text:p>23466,624</text:p>
          </table:table-cell>
          <table:table-cell table:formula="of:=[.$G$2]/([.C83]+[.$H$2])" office:value-type="float" office:value="0.000100279012307904" calcext:value-type="float">
            <text:p>0,000100279012307904</text:p>
          </table:table-cell>
          <table:table-cell table:formula="of:=ROUND([.$H$2]*[.D83];5)" office:value-type="float" office:value="1.00279" calcext:value-type="float">
            <text:p>1,00279</text:p>
          </table:table-cell>
          <table:table-cell table:number-columns-repeated="1637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.556" calcext:value-type="float">
            <text:p>5,556</text:p>
          </table:table-cell>
          <table:table-cell table:style-name="ce2" office:value-type="float" office:value="22886.875" calcext:value-type="float">
            <text:p>22886,875</text:p>
          </table:table-cell>
          <table:table-cell table:formula="of:=[.$G$2]/([.C84]+[.$H$2])" office:value-type="float" office:value="0.000102046789182615" calcext:value-type="float">
            <text:p>0,000102046789182615</text:p>
          </table:table-cell>
          <table:table-cell table:formula="of:=ROUND([.$H$2]*[.D84];5)" office:value-type="float" office:value="1.02047" calcext:value-type="float">
            <text:p>1,02047</text:p>
          </table:table-cell>
          <table:table-cell table:number-columns-repeated="1637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6.111" calcext:value-type="float">
            <text:p>6,111</text:p>
          </table:table-cell>
          <table:table-cell table:style-name="ce2" office:value-type="float" office:value="22323.218" calcext:value-type="float">
            <text:p>22323,218</text:p>
          </table:table-cell>
          <table:table-cell table:formula="of:=[.$G$2]/([.C85]+[.$H$2])" office:value-type="float" office:value="0.000103826296008027" calcext:value-type="float">
            <text:p>0,000103826296008027</text:p>
          </table:table-cell>
          <table:table-cell table:formula="of:=ROUND([.$H$2]*[.D85];5)" office:value-type="float" office:value="1.03826" calcext:value-type="float">
            <text:p>1,03826</text:p>
          </table:table-cell>
          <table:table-cell table:number-columns-repeated="1637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6.667" calcext:value-type="float">
            <text:p>6,667</text:p>
          </table:table-cell>
          <table:table-cell table:style-name="ce2" office:value-type="float" office:value="21775.16" calcext:value-type="float">
            <text:p>21775,16</text:p>
          </table:table-cell>
          <table:table-cell table:formula="of:=[.$G$2]/([.C86]+[.$H$2])" office:value-type="float" office:value="0.000105617092093321" calcext:value-type="float">
            <text:p>0,000105617092093321</text:p>
          </table:table-cell>
          <table:table-cell table:formula="of:=ROUND([.$H$2]*[.D86];5)" office:value-type="float" office:value="1.05617" calcext:value-type="float">
            <text:p>1,05617</text:p>
          </table:table-cell>
          <table:table-cell table:number-columns-repeated="1637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7.222" calcext:value-type="float">
            <text:p>7,222</text:p>
          </table:table-cell>
          <table:table-cell table:style-name="ce2" office:value-type="float" office:value="21242.227" calcext:value-type="float">
            <text:p>21242,227</text:p>
          </table:table-cell>
          <table:table-cell table:formula="of:=[.$G$2]/([.C87]+[.$H$2])" office:value-type="float" office:value="0.000107418718902465" calcext:value-type="float">
            <text:p>0,000107418718902465</text:p>
          </table:table-cell>
          <table:table-cell table:formula="of:=ROUND([.$H$2]*[.D87];5)" office:value-type="float" office:value="1.07419" calcext:value-type="float">
            <text:p>1,07419</text:p>
          </table:table-cell>
          <table:table-cell table:number-columns-repeated="1637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7.778" calcext:value-type="float">
            <text:p>7,778</text:p>
          </table:table-cell>
          <table:table-cell table:style-name="ce2" office:value-type="float" office:value="20723.957" calcext:value-type="float">
            <text:p>20723,957</text:p>
          </table:table-cell>
          <table:table-cell table:formula="of:=[.$G$2]/([.C88]+[.$H$2])" office:value-type="float" office:value="0.000109230721810996" calcext:value-type="float">
            <text:p>0,000109230721810996</text:p>
          </table:table-cell>
          <table:table-cell table:formula="of:=ROUND([.$H$2]*[.D88];5)" office:value-type="float" office:value="1.09231" calcext:value-type="float">
            <text:p>1,09231</text:p>
          </table:table-cell>
          <table:table-cell table:number-columns-repeated="1637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8.333" calcext:value-type="float">
            <text:p>8,333</text:p>
          </table:table-cell>
          <table:table-cell table:style-name="ce2" office:value-type="float" office:value="20219.907" calcext:value-type="float">
            <text:p>20219,907</text:p>
          </table:table-cell>
          <table:table-cell table:formula="of:=[.$G$2]/([.C89]+[.$H$2])" office:value-type="float" office:value="0.000111052625013042" calcext:value-type="float">
            <text:p>0,000111052625013042</text:p>
          </table:table-cell>
          <table:table-cell table:formula="of:=ROUND([.$H$2]*[.D89];5)" office:value-type="float" office:value="1.11053" calcext:value-type="float">
            <text:p>1,11053</text:p>
          </table:table-cell>
          <table:table-cell table:number-columns-repeated="1637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8.889" calcext:value-type="float">
            <text:p>8,889</text:p>
          </table:table-cell>
          <table:table-cell table:style-name="ce2" office:value-type="float" office:value="19729.646" calcext:value-type="float">
            <text:p>19729,646</text:p>
          </table:table-cell>
          <table:table-cell table:formula="of:=[.$G$2]/([.C90]+[.$H$2])" office:value-type="float" office:value="0.0001128839542859" calcext:value-type="float">
            <text:p>0,0001128839542859</text:p>
          </table:table-cell>
          <table:table-cell table:formula="of:=ROUND([.$H$2]*[.D90];5)" office:value-type="float" office:value="1.12884" calcext:value-type="float">
            <text:p>1,12884</text:p>
          </table:table-cell>
          <table:table-cell table:number-columns-repeated="1637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9.444" calcext:value-type="float">
            <text:p>9,444</text:p>
          </table:table-cell>
          <table:table-cell table:style-name="ce2" office:value-type="float" office:value="19252.759" calcext:value-type="float">
            <text:p>19252,759</text:p>
          </table:table-cell>
          <table:table-cell table:formula="of:=[.$G$2]/([.C91]+[.$H$2])" office:value-type="float" office:value="0.000114724221397373" calcext:value-type="float">
            <text:p>0,000114724221397373</text:p>
          </table:table-cell>
          <table:table-cell table:formula="of:=ROUND([.$H$2]*[.D91];5)" office:value-type="float" office:value="1.14724" calcext:value-type="float">
            <text:p>1,14724</text:p>
          </table:table-cell>
          <table:table-cell table:number-columns-repeated="1637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788.843" calcext:value-type="float">
            <text:p>18788,843</text:p>
          </table:table-cell>
          <table:table-cell table:formula="of:=[.$G$2]/([.C92]+[.$H$2])" office:value-type="float" office:value="0.000116572937648102" calcext:value-type="float">
            <text:p>0,000116572937648102</text:p>
          </table:table-cell>
          <table:table-cell table:formula="of:=ROUND([.$H$2]*[.D92];5)" office:value-type="float" office:value="1.16573" calcext:value-type="float">
            <text:p>1,16573</text:p>
          </table:table-cell>
          <table:table-cell table:number-columns-repeated="1637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0.556" calcext:value-type="float">
            <text:p>10,556</text:p>
          </table:table-cell>
          <table:table-cell table:style-name="ce2" office:value-type="float" office:value="18337.509" calcext:value-type="float">
            <text:p>18337,509</text:p>
          </table:table-cell>
          <table:table-cell table:formula="of:=[.$G$2]/([.C93]+[.$H$2])" office:value-type="float" office:value="0.000118429605086319" calcext:value-type="float">
            <text:p>0,000118429605086319</text:p>
          </table:table-cell>
          <table:table-cell table:formula="of:=ROUND([.$H$2]*[.D93];5)" office:value-type="float" office:value="1.1843" calcext:value-type="float">
            <text:p>1,1843</text:p>
          </table:table-cell>
          <table:table-cell table:number-columns-repeated="1637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111" calcext:value-type="float">
            <text:p>11,111</text:p>
          </table:table-cell>
          <table:table-cell table:style-name="ce2" office:value-type="float" office:value="17898.38" calcext:value-type="float">
            <text:p>17898,38</text:p>
          </table:table-cell>
          <table:table-cell table:formula="of:=[.$G$2]/([.C94]+[.$H$2])" office:value-type="float" office:value="0.000120293723148082" calcext:value-type="float">
            <text:p>0,000120293723148082</text:p>
          </table:table-cell>
          <table:table-cell table:formula="of:=ROUND([.$H$2]*[.D94];5)" office:value-type="float" office:value="1.20294" calcext:value-type="float">
            <text:p>1,20294</text:p>
          </table:table-cell>
          <table:table-cell table:number-columns-repeated="1637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1.667" calcext:value-type="float">
            <text:p>11,667</text:p>
          </table:table-cell>
          <table:table-cell table:style-name="ce2" office:value-type="float" office:value="17471.094" calcext:value-type="float">
            <text:p>17471,094</text:p>
          </table:table-cell>
          <table:table-cell table:formula="of:=[.$G$2]/([.C95]+[.$H$2])" office:value-type="float" office:value="0.000122164774362463" calcext:value-type="float">
            <text:p>0,000122164774362463</text:p>
          </table:table-cell>
          <table:table-cell table:formula="of:=ROUND([.$H$2]*[.D95];5)" office:value-type="float" office:value="1.22165" calcext:value-type="float">
            <text:p>1,22165</text:p>
          </table:table-cell>
          <table:table-cell table:number-columns-repeated="1637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2.222" calcext:value-type="float">
            <text:p>12,222</text:p>
          </table:table-cell>
          <table:table-cell table:style-name="ce2" office:value-type="float" office:value="17055.296" calcext:value-type="float">
            <text:p>17055,296</text:p>
          </table:table-cell>
          <table:table-cell table:formula="of:=[.$G$2]/([.C96]+[.$H$2])" office:value-type="float" office:value="0.000124042257752419" calcext:value-type="float">
            <text:p>0,000124042257752419</text:p>
          </table:table-cell>
          <table:table-cell table:formula="of:=ROUND([.$H$2]*[.D96];5)" office:value-type="float" office:value="1.24042" calcext:value-type="float">
            <text:p>1,24042</text:p>
          </table:table-cell>
          <table:table-cell table:number-columns-repeated="1637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.778" calcext:value-type="float">
            <text:p>12,778</text:p>
          </table:table-cell>
          <table:table-cell table:style-name="ce2" office:value-type="float" office:value="16650.647" calcext:value-type="float">
            <text:p>16650,647</text:p>
          </table:table-cell>
          <table:table-cell table:formula="of:=[.$G$2]/([.C97]+[.$H$2])" office:value-type="float" office:value="0.000125925648259121" calcext:value-type="float">
            <text:p>0,000125925648259121</text:p>
          </table:table-cell>
          <table:table-cell table:formula="of:=ROUND([.$H$2]*[.D97];5)" office:value-type="float" office:value="1.25926" calcext:value-type="float">
            <text:p>1,25926</text:p>
          </table:table-cell>
          <table:table-cell table:number-columns-repeated="1637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3.333" calcext:value-type="float">
            <text:p>13,333</text:p>
          </table:table-cell>
          <table:table-cell table:style-name="ce2" office:value-type="float" office:value="16256.816" calcext:value-type="float">
            <text:p>16256,816</text:p>
          </table:table-cell>
          <table:table-cell table:formula="of:=[.$G$2]/([.C98]+[.$H$2])" office:value-type="float" office:value="0.000127814431117619" calcext:value-type="float">
            <text:p>0,000127814431117619</text:p>
          </table:table-cell>
          <table:table-cell table:formula="of:=ROUND([.$H$2]*[.D98];5)" office:value-type="float" office:value="1.27814" calcext:value-type="float">
            <text:p>1,27814</text:p>
          </table:table-cell>
          <table:table-cell table:number-columns-repeated="1637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3.889" calcext:value-type="float">
            <text:p>13,889</text:p>
          </table:table-cell>
          <table:table-cell table:style-name="ce2" office:value-type="float" office:value="15873.484" calcext:value-type="float">
            <text:p>15873,484</text:p>
          </table:table-cell>
          <table:table-cell table:formula="of:=[.$G$2]/([.C99]+[.$H$2])" office:value-type="float" office:value="0.000129708082606888" calcext:value-type="float">
            <text:p>0,000129708082606888</text:p>
          </table:table-cell>
          <table:table-cell table:formula="of:=ROUND([.$H$2]*[.D99];5)" office:value-type="float" office:value="1.29708" calcext:value-type="float">
            <text:p>1,29708</text:p>
          </table:table-cell>
          <table:table-cell table:number-columns-repeated="1637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.444" calcext:value-type="float">
            <text:p>14,444</text:p>
          </table:table-cell>
          <table:table-cell table:style-name="ce2" office:value-type="float" office:value="15500.342" calcext:value-type="float">
            <text:p>15500,342</text:p>
          </table:table-cell>
          <table:table-cell table:formula="of:=[.$G$2]/([.C100]+[.$H$2])" office:value-type="float" office:value="0.000131606078067502" calcext:value-type="float">
            <text:p>0,000131606078067502</text:p>
          </table:table-cell>
          <table:table-cell table:formula="of:=ROUND([.$H$2]*[.D100];5)" office:value-type="float" office:value="1.31606" calcext:value-type="float">
            <text:p>1,31606</text:p>
          </table:table-cell>
          <table:table-cell table:number-columns-repeated="1637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137.09" calcext:value-type="float">
            <text:p>15137,09</text:p>
          </table:table-cell>
          <table:table-cell table:formula="of:=[.$G$2]/([.C101]+[.$H$2])" office:value-type="float" office:value="0.000133507896100941" calcext:value-type="float">
            <text:p>0,000133507896100941</text:p>
          </table:table-cell>
          <table:table-cell table:formula="of:=ROUND([.$H$2]*[.D101];5)" office:value-type="float" office:value="1.33508" calcext:value-type="float">
            <text:p>1,33508</text:p>
          </table:table-cell>
          <table:table-cell table:number-columns-repeated="1637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.556" calcext:value-type="float">
            <text:p>15,556</text:p>
          </table:table-cell>
          <table:table-cell table:style-name="ce2" office:value-type="float" office:value="14783.44" calcext:value-type="float">
            <text:p>14783,44</text:p>
          </table:table-cell>
          <table:table-cell table:formula="of:=[.$G$2]/([.C102]+[.$H$2])" office:value-type="float" office:value="0.000135413001584929" calcext:value-type="float">
            <text:p>0,000135413001584929</text:p>
          </table:table-cell>
          <table:table-cell table:formula="of:=ROUND([.$H$2]*[.D102];5)" office:value-type="float" office:value="1.35413" calcext:value-type="float">
            <text:p>1,35413</text:p>
          </table:table-cell>
          <table:table-cell table:number-columns-repeated="1637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6.111" calcext:value-type="float">
            <text:p>16,111</text:p>
          </table:table-cell>
          <table:table-cell table:style-name="ce2" office:value-type="float" office:value="14439.111" calcext:value-type="float">
            <text:p>14439,111</text:p>
          </table:table-cell>
          <table:table-cell table:formula="of:=[.$G$2]/([.C103]+[.$H$2])" office:value-type="float" office:value="0.000137320870632324" calcext:value-type="float">
            <text:p>0,000137320870632324</text:p>
          </table:table-cell>
          <table:table-cell table:formula="of:=ROUND([.$H$2]*[.D103];5)" office:value-type="float" office:value="1.37321" calcext:value-type="float">
            <text:p>1,37321</text:p>
          </table:table-cell>
          <table:table-cell table:number-columns-repeated="1637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.667" calcext:value-type="float">
            <text:p>16,667</text:p>
          </table:table-cell>
          <table:table-cell table:style-name="ce2" office:value-type="float" office:value="14103.831" calcext:value-type="float">
            <text:p>14103,831</text:p>
          </table:table-cell>
          <table:table-cell table:formula="of:=[.$G$2]/([.C104]+[.$H$2])" office:value-type="float" office:value="0.000139230979506951" calcext:value-type="float">
            <text:p>0,000139230979506951</text:p>
          </table:table-cell>
          <table:table-cell table:formula="of:=ROUND([.$H$2]*[.D104];5)" office:value-type="float" office:value="1.39231" calcext:value-type="float">
            <text:p>1,39231</text:p>
          </table:table-cell>
          <table:table-cell table:number-columns-repeated="1637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7.222" calcext:value-type="float">
            <text:p>17,222</text:p>
          </table:table-cell>
          <table:table-cell table:style-name="ce2" office:value-type="float" office:value="13777.338" calcext:value-type="float">
            <text:p>13777,338</text:p>
          </table:table-cell>
          <table:table-cell table:formula="of:=[.$G$2]/([.C105]+[.$H$2])" office:value-type="float" office:value="0.000141142797398094" calcext:value-type="float">
            <text:p>0,000141142797398094</text:p>
          </table:table-cell>
          <table:table-cell table:formula="of:=ROUND([.$H$2]*[.D105];5)" office:value-type="float" office:value="1.41143" calcext:value-type="float">
            <text:p>1,41143</text:p>
          </table:table-cell>
          <table:table-cell table:number-columns-repeated="1637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7.778" calcext:value-type="float">
            <text:p>17,778</text:p>
          </table:table-cell>
          <table:table-cell table:style-name="ce2" office:value-type="float" office:value="13459.377" calcext:value-type="float">
            <text:p>13459,377</text:p>
          </table:table-cell>
          <table:table-cell table:formula="of:=[.$G$2]/([.C106]+[.$H$2])" office:value-type="float" office:value="0.00014305580237702" calcext:value-type="float">
            <text:p>0,00014305580237702</text:p>
          </table:table-cell>
          <table:table-cell table:formula="of:=ROUND([.$H$2]*[.D106];5)" office:value-type="float" office:value="1.43056" calcext:value-type="float">
            <text:p>1,43056</text:p>
          </table:table-cell>
          <table:table-cell table:number-columns-repeated="1637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.333" calcext:value-type="float">
            <text:p>18,333</text:p>
          </table:table-cell>
          <table:table-cell table:style-name="ce2" office:value-type="float" office:value="13149.702" calcext:value-type="float">
            <text:p>13149,702</text:p>
          </table:table-cell>
          <table:table-cell table:formula="of:=[.$G$2]/([.C107]+[.$H$2])" office:value-type="float" office:value="0.000144969468721455" calcext:value-type="float">
            <text:p>0,000144969468721455</text:p>
          </table:table-cell>
          <table:table-cell table:formula="of:=ROUND([.$H$2]*[.D107];5)" office:value-type="float" office:value="1.44969" calcext:value-type="float">
            <text:p>1,44969</text:p>
          </table:table-cell>
          <table:table-cell table:number-columns-repeated="1637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8.889" calcext:value-type="float">
            <text:p>18,889</text:p>
          </table:table-cell>
          <table:table-cell table:style-name="ce2" office:value-type="float" office:value="12848.073" calcext:value-type="float">
            <text:p>12848,073</text:p>
          </table:table-cell>
          <table:table-cell table:formula="of:=[.$G$2]/([.C108]+[.$H$2])" office:value-type="float" office:value="0.000146883284205193" calcext:value-type="float">
            <text:p>0,000146883284205193</text:p>
          </table:table-cell>
          <table:table-cell table:formula="of:=ROUND([.$H$2]*[.D108];5)" office:value-type="float" office:value="1.46883" calcext:value-type="float">
            <text:p>1,46883</text:p>
          </table:table-cell>
          <table:table-cell table:number-columns-repeated="1637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.444" calcext:value-type="float">
            <text:p>19,444</text:p>
          </table:table-cell>
          <table:table-cell table:style-name="ce2" office:value-type="float" office:value="12554.261" calcext:value-type="float">
            <text:p>12554,261</text:p>
          </table:table-cell>
          <table:table-cell table:formula="of:=[.$G$2]/([.C109]+[.$H$2])" office:value-type="float" office:value="0.000148796717391893" calcext:value-type="float">
            <text:p>0,000148796717391893</text:p>
          </table:table-cell>
          <table:table-cell table:formula="of:=ROUND([.$H$2]*[.D109];5)" office:value-type="float" office:value="1.48797" calcext:value-type="float">
            <text:p>1,48797</text:p>
          </table:table-cell>
          <table:table-cell table:number-columns-repeated="1637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268.039" calcext:value-type="float">
            <text:p>12268,039</text:p>
          </table:table-cell>
          <table:table-cell table:formula="of:=[.$G$2]/([.C110]+[.$H$2])" office:value-type="float" office:value="0.00015070927439996" calcext:value-type="float">
            <text:p>0,00015070927439996</text:p>
          </table:table-cell>
          <table:table-cell table:formula="of:=ROUND([.$H$2]*[.D110];5)" office:value-type="float" office:value="1.50709" calcext:value-type="float">
            <text:p>1,50709</text:p>
          </table:table-cell>
          <table:table-cell table:number-columns-repeated="1637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0.556" calcext:value-type="float">
            <text:p>20,556</text:p>
          </table:table-cell>
          <table:table-cell table:style-name="ce2" office:value-type="float" office:value="11989.193" calcext:value-type="float">
            <text:p>11989,193</text:p>
          </table:table-cell>
          <table:table-cell table:formula="of:=[.$G$2]/([.C111]+[.$H$2])" office:value-type="float" office:value="0.000152620425861013" calcext:value-type="float">
            <text:p>0,000152620425861013</text:p>
          </table:table-cell>
          <table:table-cell table:formula="of:=ROUND([.$H$2]*[.D111];5)" office:value-type="float" office:value="1.5262" calcext:value-type="float">
            <text:p>1,5262</text:p>
          </table:table-cell>
          <table:table-cell table:number-columns-repeated="1637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.111" calcext:value-type="float">
            <text:p>21,111</text:p>
          </table:table-cell>
          <table:table-cell table:style-name="ce2" office:value-type="float" office:value="11717.511" calcext:value-type="float">
            <text:p>11717,511</text:p>
          </table:table-cell>
          <table:table-cell table:formula="of:=[.$G$2]/([.C112]+[.$H$2])" office:value-type="float" office:value="0.000154529678838427" calcext:value-type="float">
            <text:p>0,000154529678838427</text:p>
          </table:table-cell>
          <table:table-cell table:formula="of:=ROUND([.$H$2]*[.D112];5)" office:value-type="float" office:value="1.5453" calcext:value-type="float">
            <text:p>1,5453</text:p>
          </table:table-cell>
          <table:table-cell table:number-columns-repeated="1637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1.667" calcext:value-type="float">
            <text:p>21,667</text:p>
          </table:table-cell>
          <table:table-cell table:style-name="ce2" office:value-type="float" office:value="11452.789" calcext:value-type="float">
            <text:p>11452,789</text:p>
          </table:table-cell>
          <table:table-cell table:formula="of:=[.$G$2]/([.C113]+[.$H$2])" office:value-type="float" office:value="0.000156436536060649" calcext:value-type="float">
            <text:p>0,000156436536060649</text:p>
          </table:table-cell>
          <table:table-cell table:formula="of:=ROUND([.$H$2]*[.D113];5)" office:value-type="float" office:value="1.56437" calcext:value-type="float">
            <text:p>1,56437</text:p>
          </table:table-cell>
          <table:table-cell table:number-columns-repeated="1637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2.222" calcext:value-type="float">
            <text:p>22,222</text:p>
          </table:table-cell>
          <table:table-cell table:style-name="ce2" office:value-type="float" office:value="11194.831" calcext:value-type="float">
            <text:p>11194,831</text:p>
          </table:table-cell>
          <table:table-cell table:formula="of:=[.$G$2]/([.C114]+[.$H$2])" office:value-type="float" office:value="0.000158340493491078" calcext:value-type="float">
            <text:p>0,000158340493491078</text:p>
          </table:table-cell>
          <table:table-cell table:formula="of:=ROUND([.$H$2]*[.D114];5)" office:value-type="float" office:value="1.5834" calcext:value-type="float">
            <text:p>1,5834</text:p>
          </table:table-cell>
          <table:table-cell table:number-columns-repeated="1637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2.778" calcext:value-type="float">
            <text:p>22,778</text:p>
          </table:table-cell>
          <table:table-cell table:style-name="ce2" office:value-type="float" office:value="10943.446" calcext:value-type="float">
            <text:p>10943,446</text:p>
          </table:table-cell>
          <table:table-cell table:formula="of:=[.$G$2]/([.C115]+[.$H$2])" office:value-type="float" office:value="0.00016024106061629" calcext:value-type="float">
            <text:p>0,00016024106061629</text:p>
          </table:table-cell>
          <table:table-cell table:formula="of:=ROUND([.$H$2]*[.D115];5)" office:value-type="float" office:value="1.60241" calcext:value-type="float">
            <text:p>1,60241</text:p>
          </table:table-cell>
          <table:table-cell table:number-columns-repeated="1637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.333" calcext:value-type="float">
            <text:p>23,333</text:p>
          </table:table-cell>
          <table:table-cell table:style-name="ce2" office:value-type="float" office:value="10698.446" calcext:value-type="float">
            <text:p>10698,446</text:p>
          </table:table-cell>
          <table:table-cell table:formula="of:=[.$G$2]/([.C116]+[.$H$2])" office:value-type="float" office:value="0.000162137775947045" calcext:value-type="float">
            <text:p>0,000162137775947045</text:p>
          </table:table-cell>
          <table:table-cell table:formula="of:=ROUND([.$H$2]*[.D116];5)" office:value-type="float" office:value="1.62138" calcext:value-type="float">
            <text:p>1,62138</text:p>
          </table:table-cell>
          <table:table-cell table:number-columns-repeated="1637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3.889" calcext:value-type="float">
            <text:p>23,889</text:p>
          </table:table-cell>
          <table:table-cell table:style-name="ce2" office:value-type="float" office:value="10459.654" calcext:value-type="float">
            <text:p>10459,654</text:p>
          </table:table-cell>
          <table:table-cell table:formula="of:=[.$G$2]/([.C117]+[.$H$2])" office:value-type="float" office:value="0.000164030144400291" calcext:value-type="float">
            <text:p>0,000164030144400291</text:p>
          </table:table-cell>
          <table:table-cell table:formula="of:=ROUND([.$H$2]*[.D117];5)" office:value-type="float" office:value="1.6403" calcext:value-type="float">
            <text:p>1,6403</text:p>
          </table:table-cell>
          <table:table-cell table:number-columns-repeated="1637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4.444" calcext:value-type="float">
            <text:p>24,444</text:p>
          </table:table-cell>
          <table:table-cell table:style-name="ce2" office:value-type="float" office:value="10226.895" calcext:value-type="float">
            <text:p>10226,895</text:p>
          </table:table-cell>
          <table:table-cell table:formula="of:=[.$G$2]/([.C118]+[.$H$2])" office:value-type="float" office:value="0.000165917705114898" calcext:value-type="float">
            <text:p>0,000165917705114898</text:p>
          </table:table-cell>
          <table:table-cell table:formula="of:=ROUND([.$H$2]*[.D118];5)" office:value-type="float" office:value="1.65918" calcext:value-type="float">
            <text:p>1,65918</text:p>
          </table:table-cell>
          <table:table-cell table:number-columns-repeated="163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5" table:formula="of:=[.$G$2]/([.C119]+[.$H$2])" office:value-type="float" office:value="0.0001678" calcext:value-type="float">
            <text:p>0,0001678</text:p>
          </table:table-cell>
          <table:table-cell table:style-name="ce5" table:formula="of:=ROUND([.$H$2]*[.D119];5)" office:value-type="float" office:value="1.678" calcext:value-type="float">
            <text:p>1,678</text:p>
          </table:table-cell>
          <table:table-cell table:number-columns-repeated="1637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.556" calcext:value-type="float">
            <text:p>25,556</text:p>
          </table:table-cell>
          <table:table-cell table:style-name="ce2" office:value-type="float" office:value="9778.805" calcext:value-type="float">
            <text:p>9778,805</text:p>
          </table:table-cell>
          <table:table-cell table:formula="of:=[.$G$2]/([.C120]+[.$H$2])" office:value-type="float" office:value="0.000169676580561869" calcext:value-type="float">
            <text:p>0,000169676580561869</text:p>
          </table:table-cell>
          <table:table-cell table:formula="of:=ROUND([.$H$2]*[.D120];5)" office:value-type="float" office:value="1.69677" calcext:value-type="float">
            <text:p>1,69677</text:p>
          </table:table-cell>
          <table:table-cell table:number-columns-repeated="1637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6.111" calcext:value-type="float">
            <text:p>26,111</text:p>
          </table:table-cell>
          <table:table-cell table:style-name="ce2" office:value-type="float" office:value="9563.152" calcext:value-type="float">
            <text:p>9563,152</text:p>
          </table:table-cell>
          <table:table-cell table:formula="of:=[.$G$2]/([.C121]+[.$H$2])" office:value-type="float" office:value="0.000171546998152445" calcext:value-type="float">
            <text:p>0,000171546998152445</text:p>
          </table:table-cell>
          <table:table-cell table:formula="of:=ROUND([.$H$2]*[.D121];5)" office:value-type="float" office:value="1.71547" calcext:value-type="float">
            <text:p>1,71547</text:p>
          </table:table-cell>
          <table:table-cell table:number-columns-repeated="1637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6.667" calcext:value-type="float">
            <text:p>26,667</text:p>
          </table:table-cell>
          <table:table-cell table:style-name="ce2" office:value-type="float" office:value="9352.887" calcext:value-type="float">
            <text:p>9352,887</text:p>
          </table:table-cell>
          <table:table-cell table:formula="of:=[.$G$2]/([.C122]+[.$H$2])" office:value-type="float" office:value="0.000173410819791383" calcext:value-type="float">
            <text:p>0,000173410819791383</text:p>
          </table:table-cell>
          <table:table-cell table:formula="of:=ROUND([.$H$2]*[.D122];5)" office:value-type="float" office:value="1.73411" calcext:value-type="float">
            <text:p>1,73411</text:p>
          </table:table-cell>
          <table:table-cell table:number-columns-repeated="1637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7.222" calcext:value-type="float">
            <text:p>27,222</text:p>
          </table:table-cell>
          <table:table-cell table:style-name="ce2" office:value-type="float" office:value="9147.86" calcext:value-type="float">
            <text:p>9147,86</text:p>
          </table:table-cell>
          <table:table-cell table:formula="of:=[.$G$2]/([.C123]+[.$H$2])" office:value-type="float" office:value="0.000175267627818461" calcext:value-type="float">
            <text:p>0,000175267627818461</text:p>
          </table:table-cell>
          <table:table-cell table:formula="of:=ROUND([.$H$2]*[.D123];5)" office:value-type="float" office:value="1.75268" calcext:value-type="float">
            <text:p>1,75268</text:p>
          </table:table-cell>
          <table:table-cell table:number-columns-repeated="1637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7.778" calcext:value-type="float">
            <text:p>27,778</text:p>
          </table:table-cell>
          <table:table-cell table:style-name="ce2" office:value-type="float" office:value="8947.928" calcext:value-type="float">
            <text:p>8947,928</text:p>
          </table:table-cell>
          <table:table-cell table:formula="of:=[.$G$2]/([.C124]+[.$H$2])" office:value-type="float" office:value="0.000177116991367077" calcext:value-type="float">
            <text:p>0,000177116991367077</text:p>
          </table:table-cell>
          <table:table-cell table:formula="of:=ROUND([.$H$2]*[.D124];5)" office:value-type="float" office:value="1.77117" calcext:value-type="float">
            <text:p>1,77117</text:p>
          </table:table-cell>
          <table:table-cell table:number-columns-repeated="1637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8.333" calcext:value-type="float">
            <text:p>28,333</text:p>
          </table:table-cell>
          <table:table-cell table:style-name="ce2" office:value-type="float" office:value="8752.949" calcext:value-type="float">
            <text:p>8752,949</text:p>
          </table:table-cell>
          <table:table-cell table:formula="of:=[.$G$2]/([.C125]+[.$H$2])" office:value-type="float" office:value="0.00017895852007063" calcext:value-type="float">
            <text:p>0,00017895852007063</text:p>
          </table:table-cell>
          <table:table-cell table:formula="of:=ROUND([.$H$2]*[.D125];5)" office:value-type="float" office:value="1.78959" calcext:value-type="float">
            <text:p>1,78959</text:p>
          </table:table-cell>
          <table:table-cell table:number-columns-repeated="1637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8.889" calcext:value-type="float">
            <text:p>28,889</text:p>
          </table:table-cell>
          <table:table-cell table:style-name="ce2" office:value-type="float" office:value="8562.788" calcext:value-type="float">
            <text:p>8562,788</text:p>
          </table:table-cell>
          <table:table-cell table:formula="of:=[.$G$2]/([.C126]+[.$H$2])" office:value-type="float" office:value="0.000180791807782322" calcext:value-type="float">
            <text:p>0,000180791807782322</text:p>
          </table:table-cell>
          <table:table-cell table:formula="of:=ROUND([.$H$2]*[.D126];5)" office:value-type="float" office:value="1.80792" calcext:value-type="float">
            <text:p>1,80792</text:p>
          </table:table-cell>
          <table:table-cell table:number-columns-repeated="1637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9.444" calcext:value-type="float">
            <text:p>29,444</text:p>
          </table:table-cell>
          <table:table-cell table:style-name="ce2" office:value-type="float" office:value="8377.312" calcext:value-type="float">
            <text:p>8377,312</text:p>
          </table:table-cell>
          <table:table-cell table:formula="of:=[.$G$2]/([.C127]+[.$H$2])" office:value-type="float" office:value="0.000182616478405547" calcext:value-type="float">
            <text:p>0,000182616478405547</text:p>
          </table:table-cell>
          <table:table-cell table:formula="of:=ROUND([.$H$2]*[.D127];5)" office:value-type="float" office:value="1.82616" calcext:value-type="float">
            <text:p>1,82616</text:p>
          </table:table-cell>
          <table:table-cell table:number-columns-repeated="1637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96.393" calcext:value-type="float">
            <text:p>8196,393</text:p>
          </table:table-cell>
          <table:table-cell table:formula="of:=[.$G$2]/([.C128]+[.$H$2])" office:value-type="float" office:value="0.000184432156416934" calcext:value-type="float">
            <text:p>0,000184432156416934</text:p>
          </table:table-cell>
          <table:table-cell table:formula="of:=ROUND([.$H$2]*[.D128];5)" office:value-type="float" office:value="1.84432" calcext:value-type="float">
            <text:p>1,84432</text:p>
          </table:table-cell>
          <table:table-cell table:number-columns-repeated="1637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30.556" calcext:value-type="float">
            <text:p>30,556</text:p>
          </table:table-cell>
          <table:table-cell table:style-name="ce2" office:value-type="float" office:value="8019.908" calcext:value-type="float">
            <text:p>8019,908</text:p>
          </table:table-cell>
          <table:table-cell table:formula="of:=[.$G$2]/([.C129]+[.$H$2])" office:value-type="float" office:value="0.000186238464702484" calcext:value-type="float">
            <text:p>0,000186238464702484</text:p>
          </table:table-cell>
          <table:table-cell table:formula="of:=ROUND([.$H$2]*[.D129];5)" office:value-type="float" office:value="1.86238" calcext:value-type="float">
            <text:p>1,86238</text:p>
          </table:table-cell>
          <table:table-cell table:number-columns-repeated="1637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1.111" calcext:value-type="float">
            <text:p>31,111</text:p>
          </table:table-cell>
          <table:table-cell table:style-name="ce2" office:value-type="float" office:value="7847.736" calcext:value-type="float">
            <text:p>7847,736</text:p>
          </table:table-cell>
          <table:table-cell table:formula="of:=[.$G$2]/([.C130]+[.$H$2])" office:value-type="float" office:value="0.000188035053857811" calcext:value-type="float">
            <text:p>0,000188035053857811</text:p>
          </table:table-cell>
          <table:table-cell table:formula="of:=ROUND([.$H$2]*[.D130];5)" office:value-type="float" office:value="1.88035" calcext:value-type="float">
            <text:p>1,88035</text:p>
          </table:table-cell>
          <table:table-cell table:number-columns-repeated="1637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31.667" calcext:value-type="float">
            <text:p>31,667</text:p>
          </table:table-cell>
          <table:table-cell table:style-name="ce2" office:value-type="float" office:value="7679.759" calcext:value-type="float">
            <text:p>7679,759</text:p>
          </table:table-cell>
          <table:table-cell table:formula="of:=[.$G$2]/([.C131]+[.$H$2])" office:value-type="float" office:value="0.000189821592025095" calcext:value-type="float">
            <text:p>0,000189821592025095</text:p>
          </table:table-cell>
          <table:table-cell table:formula="of:=ROUND([.$H$2]*[.D131];5)" office:value-type="float" office:value="1.89822" calcext:value-type="float">
            <text:p>1,89822</text:p>
          </table:table-cell>
          <table:table-cell table:number-columns-repeated="1637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32.222" calcext:value-type="float">
            <text:p>32,222</text:p>
          </table:table-cell>
          <table:table-cell table:style-name="ce2" office:value-type="float" office:value="7515.864" calcext:value-type="float">
            <text:p>7515,864</text:p>
          </table:table-cell>
          <table:table-cell table:formula="of:=[.$G$2]/([.C132]+[.$H$2])" office:value-type="float" office:value="0.000191597742480759" calcext:value-type="float">
            <text:p>0,000191597742480759</text:p>
          </table:table-cell>
          <table:table-cell table:formula="of:=ROUND([.$H$2]*[.D132];5)" office:value-type="float" office:value="1.91598" calcext:value-type="float">
            <text:p>1,91598</text:p>
          </table:table-cell>
          <table:table-cell table:number-columns-repeated="1637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32.778" calcext:value-type="float">
            <text:p>32,778</text:p>
          </table:table-cell>
          <table:table-cell table:style-name="ce2" office:value-type="float" office:value="7355.942" calcext:value-type="float">
            <text:p>7355,942</text:p>
          </table:table-cell>
          <table:table-cell table:formula="of:=[.$G$2]/([.C133]+[.$H$2])" office:value-type="float" office:value="0.000193363172105553" calcext:value-type="float">
            <text:p>0,000193363172105553</text:p>
          </table:table-cell>
          <table:table-cell table:formula="of:=ROUND([.$H$2]*[.D133];5)" office:value-type="float" office:value="1.93363" calcext:value-type="float">
            <text:p>1,93363</text:p>
          </table:table-cell>
          <table:table-cell table:number-columns-repeated="1637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3.333" calcext:value-type="float">
            <text:p>33,333</text:p>
          </table:table-cell>
          <table:table-cell table:style-name="ce2" office:value-type="float" office:value="7199.884" calcext:value-type="float">
            <text:p>7199,884</text:p>
          </table:table-cell>
          <table:table-cell table:formula="of:=[.$G$2]/([.C134]+[.$H$2])" office:value-type="float" office:value="0.000195117594979129" calcext:value-type="float">
            <text:p>0,000195117594979129</text:p>
          </table:table-cell>
          <table:table-cell table:formula="of:=ROUND([.$H$2]*[.D134];5)" office:value-type="float" office:value="1.95118" calcext:value-type="float">
            <text:p>1,95118</text:p>
          </table:table-cell>
          <table:table-cell table:number-columns-repeated="1637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33.889" calcext:value-type="float">
            <text:p>33,889</text:p>
          </table:table-cell>
          <table:table-cell table:style-name="ce2" office:value-type="float" office:value="7047.588" calcext:value-type="float">
            <text:p>7047,588</text:p>
          </table:table-cell>
          <table:table-cell table:formula="of:=[.$G$2]/([.C135]+[.$H$2])" office:value-type="float" office:value="0.000196860693723945" calcext:value-type="float">
            <text:p>0,000196860693723945</text:p>
          </table:table-cell>
          <table:table-cell table:formula="of:=ROUND([.$H$2]*[.D135];5)" office:value-type="float" office:value="1.96861" calcext:value-type="float">
            <text:p>1,96861</text:p>
          </table:table-cell>
          <table:table-cell table:number-columns-repeated="1637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34.444" calcext:value-type="float">
            <text:p>34,444</text:p>
          </table:table-cell>
          <table:table-cell table:style-name="ce2" office:value-type="float" office:value="6898.953" calcext:value-type="float">
            <text:p>6898,953</text:p>
          </table:table-cell>
          <table:table-cell table:formula="of:=[.$G$2]/([.C136]+[.$H$2])" office:value-type="float" office:value="0.000198592184971459" calcext:value-type="float">
            <text:p>0,000198592184971459</text:p>
          </table:table-cell>
          <table:table-cell table:formula="of:=ROUND([.$H$2]*[.D136];5)" office:value-type="float" office:value="1.98592" calcext:value-type="float">
            <text:p>1,98592</text:p>
          </table:table-cell>
          <table:table-cell table:number-columns-repeated="1637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753.881" calcext:value-type="float">
            <text:p>6753,881</text:p>
          </table:table-cell>
          <table:table-cell table:formula="of:=[.$G$2]/([.C137]+[.$H$2])" office:value-type="float" office:value="0.000200311796413022" calcext:value-type="float">
            <text:p>0,000200311796413022</text:p>
          </table:table-cell>
          <table:table-cell table:formula="of:=ROUND([.$H$2]*[.D137];5)" office:value-type="float" office:value="2.00312" calcext:value-type="float">
            <text:p>2,00312</text:p>
          </table:table-cell>
          <table:table-cell table:number-columns-repeated="1637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35.556" calcext:value-type="float">
            <text:p>35,556</text:p>
          </table:table-cell>
          <table:table-cell table:style-name="ce2" office:value-type="float" office:value="6612.277" calcext:value-type="float">
            <text:p>6612,277</text:p>
          </table:table-cell>
          <table:table-cell table:formula="of:=[.$G$2]/([.C138]+[.$H$2])" office:value-type="float" office:value="0.000202019265631075" calcext:value-type="float">
            <text:p>0,000202019265631075</text:p>
          </table:table-cell>
          <table:table-cell table:formula="of:=ROUND([.$H$2]*[.D138];5)" office:value-type="float" office:value="2.02019" calcext:value-type="float">
            <text:p>2,02019</text:p>
          </table:table-cell>
          <table:table-cell table:number-columns-repeated="1637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6.111" calcext:value-type="float">
            <text:p>36,111</text:p>
          </table:table-cell>
          <table:table-cell table:style-name="ce2" office:value-type="float" office:value="6474.049" calcext:value-type="float">
            <text:p>6474,049</text:p>
          </table:table-cell>
          <table:table-cell table:formula="of:=[.$G$2]/([.C139]+[.$H$2])" office:value-type="float" office:value="0.000203714338836797" calcext:value-type="float">
            <text:p>0,000203714338836797</text:p>
          </table:table-cell>
          <table:table-cell table:formula="of:=ROUND([.$H$2]*[.D139];5)" office:value-type="float" office:value="2.03714" calcext:value-type="float">
            <text:p>2,03714</text:p>
          </table:table-cell>
          <table:table-cell table:number-columns-repeated="1637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36.667" calcext:value-type="float">
            <text:p>36,667</text:p>
          </table:table-cell>
          <table:table-cell table:style-name="ce2" office:value-type="float" office:value="6339.108" calcext:value-type="float">
            <text:p>6339,108</text:p>
          </table:table-cell>
          <table:table-cell table:formula="of:=[.$G$2]/([.C140]+[.$H$2])" office:value-type="float" office:value="0.000205396769517651" calcext:value-type="float">
            <text:p>0,000205396769517651</text:p>
          </table:table-cell>
          <table:table-cell table:formula="of:=ROUND([.$H$2]*[.D140];5)" office:value-type="float" office:value="2.05397" calcext:value-type="float">
            <text:p>2,05397</text:p>
          </table:table-cell>
          <table:table-cell table:number-columns-repeated="1637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37.222" calcext:value-type="float">
            <text:p>37,222</text:p>
          </table:table-cell>
          <table:table-cell table:style-name="ce2" office:value-type="float" office:value="6207.366" calcext:value-type="float">
            <text:p>6207,366</text:p>
          </table:table-cell>
          <table:table-cell table:formula="of:=[.$G$2]/([.C141]+[.$H$2])" office:value-type="float" office:value="0.000207066342550665" calcext:value-type="float">
            <text:p>0,000207066342550665</text:p>
          </table:table-cell>
          <table:table-cell table:formula="of:=ROUND([.$H$2]*[.D141];5)" office:value-type="float" office:value="2.07066" calcext:value-type="float">
            <text:p>2,07066</text:p>
          </table:table-cell>
          <table:table-cell table:number-columns-repeated="1637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7.778" calcext:value-type="float">
            <text:p>37,778</text:p>
          </table:table-cell>
          <table:table-cell table:style-name="ce2" office:value-type="float" office:value="6078.74" calcext:value-type="float">
            <text:p>6078,74</text:p>
          </table:table-cell>
          <table:table-cell table:formula="of:=[.$G$2]/([.C142]+[.$H$2])" office:value-type="float" office:value="0.000208722822808255" calcext:value-type="float">
            <text:p>0,000208722822808255</text:p>
          </table:table-cell>
          <table:table-cell table:formula="of:=ROUND([.$H$2]*[.D142];5)" office:value-type="float" office:value="2.08723" calcext:value-type="float">
            <text:p>2,08723</text:p>
          </table:table-cell>
          <table:table-cell table:number-columns-repeated="1637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8.333" calcext:value-type="float">
            <text:p>38,333</text:p>
          </table:table-cell>
          <table:table-cell table:style-name="ce2" office:value-type="float" office:value="5953.147" calcext:value-type="float">
            <text:p>5953,147</text:p>
          </table:table-cell>
          <table:table-cell table:formula="of:=[.$G$2]/([.C143]+[.$H$2])" office:value-type="float" office:value="0.00021036601743844" calcext:value-type="float">
            <text:p>0,00021036601743844</text:p>
          </table:table-cell>
          <table:table-cell table:formula="of:=ROUND([.$H$2]*[.D143];5)" office:value-type="float" office:value="2.10366" calcext:value-type="float">
            <text:p>2,10366</text:p>
          </table:table-cell>
          <table:table-cell table:number-columns-repeated="1637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8.889" calcext:value-type="float">
            <text:p>38,889</text:p>
          </table:table-cell>
          <table:table-cell table:style-name="ce2" office:value-type="float" office:value="5830.508" calcext:value-type="float">
            <text:p>5830,508</text:p>
          </table:table-cell>
          <table:table-cell table:formula="of:=[.$G$2]/([.C144]+[.$H$2])" office:value-type="float" office:value="0.000211995723700086" calcext:value-type="float">
            <text:p>0,000211995723700086</text:p>
          </table:table-cell>
          <table:table-cell table:formula="of:=ROUND([.$H$2]*[.D144];5)" office:value-type="float" office:value="2.11996" calcext:value-type="float">
            <text:p>2,11996</text:p>
          </table:table-cell>
          <table:table-cell table:number-columns-repeated="1637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9.444" calcext:value-type="float">
            <text:p>39,444</text:p>
          </table:table-cell>
          <table:table-cell table:style-name="ce2" office:value-type="float" office:value="5710.745" calcext:value-type="float">
            <text:p>5710,745</text:p>
          </table:table-cell>
          <table:table-cell table:formula="of:=[.$G$2]/([.C145]+[.$H$2])" office:value-type="float" office:value="0.000213611766978587" calcext:value-type="float">
            <text:p>0,000213611766978587</text:p>
          </table:table-cell>
          <table:table-cell table:formula="of:=ROUND([.$H$2]*[.D145];5)" office:value-type="float" office:value="2.13612" calcext:value-type="float">
            <text:p>2,13612</text:p>
          </table:table-cell>
          <table:table-cell table:number-columns-repeated="1637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593.784" calcext:value-type="float">
            <text:p>5593,784</text:p>
          </table:table-cell>
          <table:table-cell table:formula="of:=[.$G$2]/([.C146]+[.$H$2])" office:value-type="float" office:value="0.000215213959613651" calcext:value-type="float">
            <text:p>0,000215213959613651</text:p>
          </table:table-cell>
          <table:table-cell table:formula="of:=ROUND([.$H$2]*[.D146];5)" office:value-type="float" office:value="2.15214" calcext:value-type="float">
            <text:p>2,15214</text:p>
          </table:table-cell>
          <table:table-cell table:number-columns-repeated="1637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0.556" calcext:value-type="float">
            <text:p>40,556</text:p>
          </table:table-cell>
          <table:table-cell table:style-name="ce2" office:value-type="float" office:value="5479.552" calcext:value-type="float">
            <text:p>5479,552</text:p>
          </table:table-cell>
          <table:table-cell table:formula="of:=[.$G$2]/([.C147]+[.$H$2])" office:value-type="float" office:value="0.000216802140010254" calcext:value-type="float">
            <text:p>0,000216802140010254</text:p>
          </table:table-cell>
          <table:table-cell table:formula="of:=ROUND([.$H$2]*[.D147];5)" office:value-type="float" office:value="2.16802" calcext:value-type="float">
            <text:p>2,16802</text:p>
          </table:table-cell>
          <table:table-cell table:number-columns-repeated="1637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1.111" calcext:value-type="float">
            <text:p>41,111</text:p>
          </table:table-cell>
          <table:table-cell table:style-name="ce2" office:value-type="float" office:value="5367.977" calcext:value-type="float">
            <text:p>5367,977</text:p>
          </table:table-cell>
          <table:table-cell table:formula="of:=[.$G$2]/([.C148]+[.$H$2])" office:value-type="float" office:value="0.000218376172738936" calcext:value-type="float">
            <text:p>0,000218376172738936</text:p>
          </table:table-cell>
          <table:table-cell table:formula="of:=ROUND([.$H$2]*[.D148];5)" office:value-type="float" office:value="2.18376" calcext:value-type="float">
            <text:p>2,18376</text:p>
          </table:table-cell>
          <table:table-cell table:number-columns-repeated="1637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1.667" calcext:value-type="float">
            <text:p>41,667</text:p>
          </table:table-cell>
          <table:table-cell table:style-name="ce2" office:value-type="float" office:value="5258.992" calcext:value-type="float">
            <text:p>5258,992</text:p>
          </table:table-cell>
          <table:table-cell table:formula="of:=[.$G$2]/([.C149]+[.$H$2])" office:value-type="float" office:value="0.000219935890915992" calcext:value-type="float">
            <text:p>0,000219935890915992</text:p>
          </table:table-cell>
          <table:table-cell table:formula="of:=ROUND([.$H$2]*[.D149];5)" office:value-type="float" office:value="2.19936" calcext:value-type="float">
            <text:p>2,19936</text:p>
          </table:table-cell>
          <table:table-cell table:number-columns-repeated="1637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2.222" calcext:value-type="float">
            <text:p>42,222</text:p>
          </table:table-cell>
          <table:table-cell table:style-name="ce2" office:value-type="float" office:value="5152.528" calcext:value-type="float">
            <text:p>5152,528</text:p>
          </table:table-cell>
          <table:table-cell table:formula="of:=[.$G$2]/([.C150]+[.$H$2])" office:value-type="float" office:value="0.000221481194425115" calcext:value-type="float">
            <text:p>0,000221481194425115</text:p>
          </table:table-cell>
          <table:table-cell table:formula="of:=ROUND([.$H$2]*[.D150];5)" office:value-type="float" office:value="2.21481" calcext:value-type="float">
            <text:p>2,21481</text:p>
          </table:table-cell>
          <table:table-cell table:number-columns-repeated="1637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2.778" calcext:value-type="float">
            <text:p>42,778</text:p>
          </table:table-cell>
          <table:table-cell table:style-name="ce2" office:value-type="float" office:value="5048.522" calcext:value-type="float">
            <text:p>5048,522</text:p>
          </table:table-cell>
          <table:table-cell table:formula="of:=[.$G$2]/([.C151]+[.$H$2])" office:value-type="float" office:value="0.000223011934328169" calcext:value-type="float">
            <text:p>0,000223011934328169</text:p>
          </table:table-cell>
          <table:table-cell table:formula="of:=ROUND([.$H$2]*[.D151];5)" office:value-type="float" office:value="2.23012" calcext:value-type="float">
            <text:p>2,23012</text:p>
          </table:table-cell>
          <table:table-cell table:number-columns-repeated="1637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3.333" calcext:value-type="float">
            <text:p>43,333</text:p>
          </table:table-cell>
          <table:table-cell table:style-name="ce2" office:value-type="float" office:value="4946.91" calcext:value-type="float">
            <text:p>4946,91</text:p>
          </table:table-cell>
          <table:table-cell table:formula="of:=[.$G$2]/([.C152]+[.$H$2])" office:value-type="float" office:value="0.000224528012813351" calcext:value-type="float">
            <text:p>0,000224528012813351</text:p>
          </table:table-cell>
          <table:table-cell table:formula="of:=ROUND([.$H$2]*[.D152];5)" office:value-type="float" office:value="2.24528" calcext:value-type="float">
            <text:p>2,24528</text:p>
          </table:table-cell>
          <table:table-cell table:number-columns-repeated="1637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43.889" calcext:value-type="float">
            <text:p>43,889</text:p>
          </table:table-cell>
          <table:table-cell table:style-name="ce2" office:value-type="float" office:value="4847.63" calcext:value-type="float">
            <text:p>4847,63</text:p>
          </table:table-cell>
          <table:table-cell table:formula="of:=[.$G$2]/([.C153]+[.$H$2])" office:value-type="float" office:value="0.000226029339362578" calcext:value-type="float">
            <text:p>0,000226029339362578</text:p>
          </table:table-cell>
          <table:table-cell table:formula="of:=ROUND([.$H$2]*[.D153];5)" office:value-type="float" office:value="2.26029" calcext:value-type="float">
            <text:p>2,26029</text:p>
          </table:table-cell>
          <table:table-cell table:number-columns-repeated="1637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4.444" calcext:value-type="float">
            <text:p>44,444</text:p>
          </table:table-cell>
          <table:table-cell table:style-name="ce2" office:value-type="float" office:value="4750.623" calcext:value-type="float">
            <text:p>4750,623</text:p>
          </table:table-cell>
          <table:table-cell table:formula="of:=[.$G$2]/([.C154]+[.$H$2])" office:value-type="float" office:value="0.000227515814077819" calcext:value-type="float">
            <text:p>0,000227515814077819</text:p>
          </table:table-cell>
          <table:table-cell table:formula="of:=ROUND([.$H$2]*[.D154];5)" office:value-type="float" office:value="2.27516" calcext:value-type="float">
            <text:p>2,27516</text:p>
          </table:table-cell>
          <table:table-cell table:number-columns-repeated="1637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55.831" calcext:value-type="float">
            <text:p>4655,831</text:p>
          </table:table-cell>
          <table:table-cell table:formula="of:=[.$G$2]/([.C155]+[.$H$2])" office:value-type="float" office:value="0.000228987356636413" calcext:value-type="float">
            <text:p>0,000228987356636413</text:p>
          </table:table-cell>
          <table:table-cell table:formula="of:=ROUND([.$H$2]*[.D155];5)" office:value-type="float" office:value="2.28987" calcext:value-type="float">
            <text:p>2,28987</text:p>
          </table:table-cell>
          <table:table-cell table:number-columns-repeated="1637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5.556" calcext:value-type="float">
            <text:p>45,556</text:p>
          </table:table-cell>
          <table:table-cell table:style-name="ce2" office:value-type="float" office:value="4563.198" calcext:value-type="float">
            <text:p>4563,198</text:p>
          </table:table-cell>
          <table:table-cell table:formula="of:=[.$G$2]/([.C156]+[.$H$2])" office:value-type="float" office:value="0.000230443890140064" calcext:value-type="float">
            <text:p>0,000230443890140064</text:p>
          </table:table-cell>
          <table:table-cell table:formula="of:=ROUND([.$H$2]*[.D156];5)" office:value-type="float" office:value="2.30444" calcext:value-type="float">
            <text:p>2,30444</text:p>
          </table:table-cell>
          <table:table-cell table:number-columns-repeated="1637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6.111" calcext:value-type="float">
            <text:p>46,111</text:p>
          </table:table-cell>
          <table:table-cell table:style-name="ce2" office:value-type="float" office:value="4472.669" calcext:value-type="float">
            <text:p>4472,669</text:p>
          </table:table-cell>
          <table:table-cell table:formula="of:=[.$G$2]/([.C157]+[.$H$2])" office:value-type="float" office:value="0.000231885355769554" calcext:value-type="float">
            <text:p>0,000231885355769554</text:p>
          </table:table-cell>
          <table:table-cell table:formula="of:=ROUND([.$H$2]*[.D157];5)" office:value-type="float" office:value="2.31885" calcext:value-type="float">
            <text:p>2,31885</text:p>
          </table:table-cell>
          <table:table-cell table:number-columns-repeated="1637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6.667" calcext:value-type="float">
            <text:p>46,667</text:p>
          </table:table-cell>
          <table:table-cell table:style-name="ce2" office:value-type="float" office:value="4384.19" calcext:value-type="float">
            <text:p>4384,19</text:p>
          </table:table-cell>
          <table:table-cell table:formula="of:=[.$G$2]/([.C158]+[.$H$2])" office:value-type="float" office:value="0.000233311712373099" calcext:value-type="float">
            <text:p>0,000233311712373099</text:p>
          </table:table-cell>
          <table:table-cell table:formula="of:=ROUND([.$H$2]*[.D158];5)" office:value-type="float" office:value="2.33312" calcext:value-type="float">
            <text:p>2,33312</text:p>
          </table:table-cell>
          <table:table-cell table:number-columns-repeated="1637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7.222" calcext:value-type="float">
            <text:p>47,222</text:p>
          </table:table-cell>
          <table:table-cell table:style-name="ce2" office:value-type="float" office:value="4297.71" calcext:value-type="float">
            <text:p>4297,71</text:p>
          </table:table-cell>
          <table:table-cell table:formula="of:=[.$G$2]/([.C159]+[.$H$2])" office:value-type="float" office:value="0.000234722903178201" calcext:value-type="float">
            <text:p>0,000234722903178201</text:p>
          </table:table-cell>
          <table:table-cell table:formula="of:=ROUND([.$H$2]*[.D159];5)" office:value-type="float" office:value="2.34723" calcext:value-type="float">
            <text:p>2,34723</text:p>
          </table:table-cell>
          <table:table-cell table:number-columns-repeated="1637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7.778" calcext:value-type="float">
            <text:p>47,778</text:p>
          </table:table-cell>
          <table:table-cell table:style-name="ce2" office:value-type="float" office:value="4213.179" calcext:value-type="float">
            <text:p>4213,179</text:p>
          </table:table-cell>
          <table:table-cell table:formula="of:=[.$G$2]/([.C160]+[.$H$2])" office:value-type="float" office:value="0.000236118886562957" calcext:value-type="float">
            <text:p>0,000236118886562957</text:p>
          </table:table-cell>
          <table:table-cell table:formula="of:=ROUND([.$H$2]*[.D160];5)" office:value-type="float" office:value="2.36119" calcext:value-type="float">
            <text:p>2,36119</text:p>
          </table:table-cell>
          <table:table-cell table:number-columns-repeated="1637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8.333" calcext:value-type="float">
            <text:p>48,333</text:p>
          </table:table-cell>
          <table:table-cell table:style-name="ce2" office:value-type="float" office:value="4130.548" calcext:value-type="float">
            <text:p>4130,548</text:p>
          </table:table-cell>
          <table:table-cell table:formula="of:=[.$G$2]/([.C161]+[.$H$2])" office:value-type="float" office:value="0.000237499635541382" calcext:value-type="float">
            <text:p>0,000237499635541382</text:p>
          </table:table-cell>
          <table:table-cell table:formula="of:=ROUND([.$H$2]*[.D161];5)" office:value-type="float" office:value="2.375" calcext:value-type="float">
            <text:p>2,375</text:p>
          </table:table-cell>
          <table:table-cell table:number-columns-repeated="1637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8.889" calcext:value-type="float">
            <text:p>48,889</text:p>
          </table:table-cell>
          <table:table-cell table:style-name="ce2" office:value-type="float" office:value="4049.768" calcext:value-type="float">
            <text:p>4049,768</text:p>
          </table:table-cell>
          <table:table-cell table:formula="of:=[.$G$2]/([.C162]+[.$H$2])" office:value-type="float" office:value="0.000238865154214646" calcext:value-type="float">
            <text:p>0,000238865154214646</text:p>
          </table:table-cell>
          <table:table-cell table:formula="of:=ROUND([.$H$2]*[.D162];5)" office:value-type="float" office:value="2.38865" calcext:value-type="float">
            <text:p>2,38865</text:p>
          </table:table-cell>
          <table:table-cell table:number-columns-repeated="1637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9.444" calcext:value-type="float">
            <text:p>49,444</text:p>
          </table:table-cell>
          <table:table-cell table:style-name="ce2" office:value-type="float" office:value="3970.794" calcext:value-type="float">
            <text:p>3970,794</text:p>
          </table:table-cell>
          <table:table-cell table:formula="of:=[.$G$2]/([.C163]+[.$H$2])" office:value-type="float" office:value="0.000240215409374728" calcext:value-type="float">
            <text:p>0,000240215409374728</text:p>
          </table:table-cell>
          <table:table-cell table:formula="of:=ROUND([.$H$2]*[.D163];5)" office:value-type="float" office:value="2.40215" calcext:value-type="float">
            <text:p>2,40215</text:p>
          </table:table-cell>
          <table:table-cell table:number-columns-repeated="1637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93.58" calcext:value-type="float">
            <text:p>3893,58</text:p>
          </table:table-cell>
          <table:table-cell table:formula="of:=[.$G$2]/([.C164]+[.$H$2])" office:value-type="float" office:value="0.00024155041393219" calcext:value-type="float">
            <text:p>0,00024155041393219</text:p>
          </table:table-cell>
          <table:table-cell table:formula="of:=ROUND([.$H$2]*[.D164];5)" office:value-type="float" office:value="2.4155" calcext:value-type="float">
            <text:p>2,4155</text:p>
          </table:table-cell>
          <table:table-cell table:number-columns-repeated="1637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0.556" calcext:value-type="float">
            <text:p>50,556</text:p>
          </table:table-cell>
          <table:table-cell table:style-name="ce2" office:value-type="float" office:value="3818.084" calcext:value-type="float">
            <text:p>3818,084</text:p>
          </table:table-cell>
          <table:table-cell table:formula="of:=[.$G$2]/([.C165]+[.$H$2])" office:value-type="float" office:value="0.000242870140317572" calcext:value-type="float">
            <text:p>0,000242870140317572</text:p>
          </table:table-cell>
          <table:table-cell table:formula="of:=ROUND([.$H$2]*[.D165];5)" office:value-type="float" office:value="2.4287" calcext:value-type="float">
            <text:p>2,4287</text:p>
          </table:table-cell>
          <table:table-cell table:number-columns-repeated="1637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51.111" calcext:value-type="float">
            <text:p>51,111</text:p>
          </table:table-cell>
          <table:table-cell table:style-name="ce2" office:value-type="float" office:value="3744.262" calcext:value-type="float">
            <text:p>3744,262</text:p>
          </table:table-cell>
          <table:table-cell table:formula="of:=[.$G$2]/([.C166]+[.$H$2])" office:value-type="float" office:value="0.000244174623562909" calcext:value-type="float">
            <text:p>0,000244174623562909</text:p>
          </table:table-cell>
          <table:table-cell table:formula="of:=ROUND([.$H$2]*[.D166];5)" office:value-type="float" office:value="2.44175" calcext:value-type="float">
            <text:p>2,44175</text:p>
          </table:table-cell>
          <table:table-cell table:number-columns-repeated="1637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1.667" calcext:value-type="float">
            <text:p>51,667</text:p>
          </table:table-cell>
          <table:table-cell table:style-name="ce2" office:value-type="float" office:value="3672.072" calcext:value-type="float">
            <text:p>3672,072</text:p>
          </table:table-cell>
          <table:table-cell table:formula="of:=[.$G$2]/([.C167]+[.$H$2])" office:value-type="float" office:value="0.000245463891647148" calcext:value-type="float">
            <text:p>0,000245463891647148</text:p>
          </table:table-cell>
          <table:table-cell table:formula="of:=ROUND([.$H$2]*[.D167];5)" office:value-type="float" office:value="2.45464" calcext:value-type="float">
            <text:p>2,45464</text:p>
          </table:table-cell>
          <table:table-cell table:number-columns-repeated="1637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52.222" calcext:value-type="float">
            <text:p>52,222</text:p>
          </table:table-cell>
          <table:table-cell table:style-name="ce2" office:value-type="float" office:value="3601.475" calcext:value-type="float">
            <text:p>3601,475</text:p>
          </table:table-cell>
          <table:table-cell table:formula="of:=[.$G$2]/([.C168]+[.$H$2])" office:value-type="float" office:value="0.000246737945700742" calcext:value-type="float">
            <text:p>0,000246737945700742</text:p>
          </table:table-cell>
          <table:table-cell table:formula="of:=ROUND([.$H$2]*[.D168];5)" office:value-type="float" office:value="2.46738" calcext:value-type="float">
            <text:p>2,46738</text:p>
          </table:table-cell>
          <table:table-cell table:number-columns-repeated="1637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52.778" calcext:value-type="float">
            <text:p>52,778</text:p>
          </table:table-cell>
          <table:table-cell table:style-name="ce2" office:value-type="float" office:value="3532.431" calcext:value-type="float">
            <text:p>3532,431</text:p>
          </table:table-cell>
          <table:table-cell table:formula="of:=[.$G$2]/([.C169]+[.$H$2])" office:value-type="float" office:value="0.00024799683072465" calcext:value-type="float">
            <text:p>0,00024799683072465</text:p>
          </table:table-cell>
          <table:table-cell table:formula="of:=ROUND([.$H$2]*[.D169];5)" office:value-type="float" office:value="2.47997" calcext:value-type="float">
            <text:p>2,47997</text:p>
          </table:table-cell>
          <table:table-cell table:number-columns-repeated="1637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3.333" calcext:value-type="float">
            <text:p>53,333</text:p>
          </table:table-cell>
          <table:table-cell table:style-name="ce2" office:value-type="float" office:value="3464.903" calcext:value-type="float">
            <text:p>3464,903</text:p>
          </table:table-cell>
          <table:table-cell table:formula="of:=[.$G$2]/([.C170]+[.$H$2])" office:value-type="float" office:value="0.00024924056266874" calcext:value-type="float">
            <text:p>0,00024924056266874</text:p>
          </table:table-cell>
          <table:table-cell table:formula="of:=ROUND([.$H$2]*[.D170];5)" office:value-type="float" office:value="2.49241" calcext:value-type="float">
            <text:p>2,49241</text:p>
          </table:table-cell>
          <table:table-cell table:number-columns-repeated="1637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3.889" calcext:value-type="float">
            <text:p>53,889</text:p>
          </table:table-cell>
          <table:table-cell table:style-name="ce2" office:value-type="float" office:value="3398.852" calcext:value-type="float">
            <text:p>3398,852</text:p>
          </table:table-cell>
          <table:table-cell table:formula="of:=[.$G$2]/([.C171]+[.$H$2])" office:value-type="float" office:value="0.000250469219303266" calcext:value-type="float">
            <text:p>0,000250469219303266</text:p>
          </table:table-cell>
          <table:table-cell table:formula="of:=ROUND([.$H$2]*[.D171];5)" office:value-type="float" office:value="2.50469" calcext:value-type="float">
            <text:p>2,50469</text:p>
          </table:table-cell>
          <table:table-cell table:number-columns-repeated="1637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4.444" calcext:value-type="float">
            <text:p>54,444</text:p>
          </table:table-cell>
          <table:table-cell table:style-name="ce2" office:value-type="float" office:value="3334.244" calcext:value-type="float">
            <text:p>3334,244</text:p>
          </table:table-cell>
          <table:table-cell table:formula="of:=[.$G$2]/([.C172]+[.$H$2])" office:value-type="float" office:value="0.000251682810064073" calcext:value-type="float">
            <text:p>0,000251682810064073</text:p>
          </table:table-cell>
          <table:table-cell table:formula="of:=ROUND([.$H$2]*[.D172];5)" office:value-type="float" office:value="2.51683" calcext:value-type="float">
            <text:p>2,51683</text:p>
          </table:table-cell>
          <table:table-cell table:number-columns-repeated="1637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271.042" calcext:value-type="float">
            <text:p>3271,042</text:p>
          </table:table-cell>
          <table:table-cell table:formula="of:=[.$G$2]/([.C173]+[.$H$2])" office:value-type="float" office:value="0.000252881424081093" calcext:value-type="float">
            <text:p>0,000252881424081093</text:p>
          </table:table-cell>
          <table:table-cell table:formula="of:=ROUND([.$H$2]*[.D173];5)" office:value-type="float" office:value="2.52881" calcext:value-type="float">
            <text:p>2,52881</text:p>
          </table:table-cell>
          <table:table-cell table:number-columns-repeated="1637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5.556" calcext:value-type="float">
            <text:p>55,556</text:p>
          </table:table-cell>
          <table:table-cell table:style-name="ce2" office:value-type="float" office:value="3209.213" calcext:value-type="float">
            <text:p>3209,213</text:p>
          </table:table-cell>
          <table:table-cell table:formula="of:=[.$G$2]/([.C174]+[.$H$2])" office:value-type="float" office:value="0.000254065098352188" calcext:value-type="float">
            <text:p>0,000254065098352188</text:p>
          </table:table-cell>
          <table:table-cell table:formula="of:=ROUND([.$H$2]*[.D174];5)" office:value-type="float" office:value="2.54065" calcext:value-type="float">
            <text:p>2,54065</text:p>
          </table:table-cell>
          <table:table-cell table:number-columns-repeated="1637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56.111" calcext:value-type="float">
            <text:p>56,111</text:p>
          </table:table-cell>
          <table:table-cell table:style-name="ce2" office:value-type="float" office:value="3148.722" calcext:value-type="float">
            <text:p>3148,722</text:p>
          </table:table-cell>
          <table:table-cell table:formula="of:=[.$G$2]/([.C175]+[.$H$2])" office:value-type="float" office:value="0.000255233930719655" calcext:value-type="float">
            <text:p>0,000255233930719655</text:p>
          </table:table-cell>
          <table:table-cell table:formula="of:=ROUND([.$H$2]*[.D175];5)" office:value-type="float" office:value="2.55234" calcext:value-type="float">
            <text:p>2,55234</text:p>
          </table:table-cell>
          <table:table-cell table:number-columns-repeated="1637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6.667" calcext:value-type="float">
            <text:p>56,667</text:p>
          </table:table-cell>
          <table:table-cell table:style-name="ce2" office:value-type="float" office:value="3089.539" calcext:value-type="float">
            <text:p>3089,539</text:p>
          </table:table-cell>
          <table:table-cell table:formula="of:=[.$G$2]/([.C176]+[.$H$2])" office:value-type="float" office:value="0.000256387944602174" calcext:value-type="float">
            <text:p>0,000256387944602174</text:p>
          </table:table-cell>
          <table:table-cell table:formula="of:=ROUND([.$H$2]*[.D176];5)" office:value-type="float" office:value="2.56388" calcext:value-type="float">
            <text:p>2,56388</text:p>
          </table:table-cell>
          <table:table-cell table:number-columns-repeated="1637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57.222" calcext:value-type="float">
            <text:p>57,222</text:p>
          </table:table-cell>
          <table:table-cell table:style-name="ce2" office:value-type="float" office:value="3031.631" calcext:value-type="float">
            <text:p>3031,631</text:p>
          </table:table-cell>
          <table:table-cell table:formula="of:=[.$G$2]/([.C177]+[.$H$2])" office:value-type="float" office:value="0.000257527242752653" calcext:value-type="float">
            <text:p>0,000257527242752653</text:p>
          </table:table-cell>
          <table:table-cell table:formula="of:=ROUND([.$H$2]*[.D177];5)" office:value-type="float" office:value="2.57527" calcext:value-type="float">
            <text:p>2,57527</text:p>
          </table:table-cell>
          <table:table-cell table:number-columns-repeated="1637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57.778" calcext:value-type="float">
            <text:p>57,778</text:p>
          </table:table-cell>
          <table:table-cell table:style-name="ce2" office:value-type="float" office:value="2974.967" calcext:value-type="float">
            <text:p>2974,967</text:p>
          </table:table-cell>
          <table:table-cell table:formula="of:=[.$G$2]/([.C178]+[.$H$2])" office:value-type="float" office:value="0.000258651910251487" calcext:value-type="float">
            <text:p>0,000258651910251487</text:p>
          </table:table-cell>
          <table:table-cell table:formula="of:=ROUND([.$H$2]*[.D178];5)" office:value-type="float" office:value="2.58652" calcext:value-type="float">
            <text:p>2,58652</text:p>
          </table:table-cell>
          <table:table-cell table:number-columns-repeated="1637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8.333" calcext:value-type="float">
            <text:p>58,333</text:p>
          </table:table-cell>
          <table:table-cell table:style-name="ce2" office:value-type="float" office:value="2919.518" calcext:value-type="float">
            <text:p>2919,518</text:p>
          </table:table-cell>
          <table:table-cell table:formula="of:=[.$G$2]/([.C179]+[.$H$2])" office:value-type="float" office:value="0.000259762012793357" calcext:value-type="float">
            <text:p>0,000259762012793357</text:p>
          </table:table-cell>
          <table:table-cell table:formula="of:=ROUND([.$H$2]*[.D179];5)" office:value-type="float" office:value="2.59762" calcext:value-type="float">
            <text:p>2,59762</text:p>
          </table:table-cell>
          <table:table-cell table:number-columns-repeated="1637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58.889" calcext:value-type="float">
            <text:p>58,889</text:p>
          </table:table-cell>
          <table:table-cell table:style-name="ce2" office:value-type="float" office:value="2865.255" calcext:value-type="float">
            <text:p>2865,255</text:p>
          </table:table-cell>
          <table:table-cell table:formula="of:=[.$G$2]/([.C180]+[.$H$2])" office:value-type="float" office:value="0.000260857635546283" calcext:value-type="float">
            <text:p>0,000260857635546283</text:p>
          </table:table-cell>
          <table:table-cell table:formula="of:=ROUND([.$H$2]*[.D180];5)" office:value-type="float" office:value="2.60858" calcext:value-type="float">
            <text:p>2,60858</text:p>
          </table:table-cell>
          <table:table-cell table:number-columns-repeated="1637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59.444" calcext:value-type="float">
            <text:p>59,444</text:p>
          </table:table-cell>
          <table:table-cell table:style-name="ce2" office:value-type="float" office:value="2812.148" calcext:value-type="float">
            <text:p>2812,148</text:p>
          </table:table-cell>
          <table:table-cell table:formula="of:=[.$G$2]/([.C181]+[.$H$2])" office:value-type="float" office:value="0.000261938903609293" calcext:value-type="float">
            <text:p>0,000261938903609293</text:p>
          </table:table-cell>
          <table:table-cell table:formula="of:=ROUND([.$H$2]*[.D181];5)" office:value-type="float" office:value="2.61939" calcext:value-type="float">
            <text:p>2,61939</text:p>
          </table:table-cell>
          <table:table-cell table:number-columns-repeated="1637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60.172" calcext:value-type="float">
            <text:p>2760,172</text:p>
          </table:table-cell>
          <table:table-cell table:formula="of:=[.$G$2]/([.C182]+[.$H$2])" office:value-type="float" office:value="0.00026300585916867" calcext:value-type="float">
            <text:p>0,00026300585916867</text:p>
          </table:table-cell>
          <table:table-cell table:formula="of:=ROUND([.$H$2]*[.D182];5)" office:value-type="float" office:value="2.63006" calcext:value-type="float">
            <text:p>2,63006</text:p>
          </table:table-cell>
          <table:table-cell table:number-columns-repeated="1637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60.556" calcext:value-type="float">
            <text:p>60,556</text:p>
          </table:table-cell>
          <table:table-cell table:style-name="ce2" office:value-type="float" office:value="2709.298" calcext:value-type="float">
            <text:p>2709,298</text:p>
          </table:table-cell>
          <table:table-cell table:formula="of:=[.$G$2]/([.C183]+[.$H$2])" office:value-type="float" office:value="0.000264058644309072" calcext:value-type="float">
            <text:p>0,000264058644309072</text:p>
          </table:table-cell>
          <table:table-cell table:formula="of:=ROUND([.$H$2]*[.D183];5)" office:value-type="float" office:value="2.64059" calcext:value-type="float">
            <text:p>2,64059</text:p>
          </table:table-cell>
          <table:table-cell table:number-columns-repeated="1637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1.111" calcext:value-type="float">
            <text:p>61,111</text:p>
          </table:table-cell>
          <table:table-cell table:style-name="ce2" office:value-type="float" office:value="2659.5" calcext:value-type="float">
            <text:p>2659,5</text:p>
          </table:table-cell>
          <table:table-cell table:formula="of:=[.$G$2]/([.C184]+[.$H$2])" office:value-type="float" office:value="0.00026509735771555" calcext:value-type="float">
            <text:p>0,00026509735771555</text:p>
          </table:table-cell>
          <table:table-cell table:formula="of:=ROUND([.$H$2]*[.D184];5)" office:value-type="float" office:value="2.65097" calcext:value-type="float">
            <text:p>2,65097</text:p>
          </table:table-cell>
          <table:table-cell table:number-columns-repeated="1637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61.667" calcext:value-type="float">
            <text:p>61,667</text:p>
          </table:table-cell>
          <table:table-cell table:style-name="ce2" office:value-type="float" office:value="2610.754" calcext:value-type="float">
            <text:p>2610,754</text:p>
          </table:table-cell>
          <table:table-cell table:formula="of:=[.$G$2]/([.C185]+[.$H$2])" office:value-type="float" office:value="0.000266122073271749" calcext:value-type="float">
            <text:p>0,000266122073271749</text:p>
          </table:table-cell>
          <table:table-cell table:formula="of:=ROUND([.$H$2]*[.D185];5)" office:value-type="float" office:value="2.66122" calcext:value-type="float">
            <text:p>2,66122</text:p>
          </table:table-cell>
          <table:table-cell table:number-columns-repeated="1637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2.222" calcext:value-type="float">
            <text:p>62,222</text:p>
          </table:table-cell>
          <table:table-cell table:style-name="ce2" office:value-type="float" office:value="2563.033" calcext:value-type="float">
            <text:p>2563,033</text:p>
          </table:table-cell>
          <table:table-cell table:formula="of:=[.$G$2]/([.C186]+[.$H$2])" office:value-type="float" office:value="0.000267132944727599" calcext:value-type="float">
            <text:p>0,000267132944727599</text:p>
          </table:table-cell>
          <table:table-cell table:formula="of:=ROUND([.$H$2]*[.D186];5)" office:value-type="float" office:value="2.67133" calcext:value-type="float">
            <text:p>2,67133</text:p>
          </table:table-cell>
          <table:table-cell table:number-columns-repeated="1637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2.778" calcext:value-type="float">
            <text:p>62,778</text:p>
          </table:table-cell>
          <table:table-cell table:style-name="ce2" office:value-type="float" office:value="2516.315" calcext:value-type="float">
            <text:p>2516,315</text:p>
          </table:table-cell>
          <table:table-cell table:formula="of:=[.$G$2]/([.C187]+[.$H$2])" office:value-type="float" office:value="0.00026813003667613" calcext:value-type="float">
            <text:p>0,00026813003667613</text:p>
          </table:table-cell>
          <table:table-cell table:formula="of:=ROUND([.$H$2]*[.D187];5)" office:value-type="float" office:value="2.6813" calcext:value-type="float">
            <text:p>2,6813</text:p>
          </table:table-cell>
          <table:table-cell table:number-columns-repeated="1637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63.333" calcext:value-type="float">
            <text:p>63,333</text:p>
          </table:table-cell>
          <table:table-cell table:style-name="ce2" office:value-type="float" office:value="2470.575" calcext:value-type="float">
            <text:p>2470,575</text:p>
          </table:table-cell>
          <table:table-cell table:formula="of:=[.$G$2]/([.C188]+[.$H$2])" office:value-type="float" office:value="0.000269113493162905" calcext:value-type="float">
            <text:p>0,000269113493162905</text:p>
          </table:table-cell>
          <table:table-cell table:formula="of:=ROUND([.$H$2]*[.D188];5)" office:value-type="float" office:value="2.69113" calcext:value-type="float">
            <text:p>2,69113</text:p>
          </table:table-cell>
          <table:table-cell table:number-columns-repeated="1637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3.889" calcext:value-type="float">
            <text:p>63,889</text:p>
          </table:table-cell>
          <table:table-cell table:style-name="ce2" office:value-type="float" office:value="2425.791" calcext:value-type="float">
            <text:p>2425,791</text:p>
          </table:table-cell>
          <table:table-cell table:formula="of:=[.$G$2]/([.C189]+[.$H$2])" office:value-type="float" office:value="0.000270083409579318" calcext:value-type="float">
            <text:p>0,000270083409579318</text:p>
          </table:table-cell>
          <table:table-cell table:formula="of:=ROUND([.$H$2]*[.D189];5)" office:value-type="float" office:value="2.70083" calcext:value-type="float">
            <text:p>2,70083</text:p>
          </table:table-cell>
          <table:table-cell table:number-columns-repeated="1637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4.444" calcext:value-type="float">
            <text:p>64,444</text:p>
          </table:table-cell>
          <table:table-cell table:style-name="ce2" office:value-type="float" office:value="2381.94" calcext:value-type="float">
            <text:p>2381,94</text:p>
          </table:table-cell>
          <table:table-cell table:formula="of:=[.$G$2]/([.C190]+[.$H$2])" office:value-type="float" office:value="0.000271039917815787" calcext:value-type="float">
            <text:p>0,000271039917815787</text:p>
          </table:table-cell>
          <table:table-cell table:formula="of:=ROUND([.$H$2]*[.D190];5)" office:value-type="float" office:value="2.7104" calcext:value-type="float">
            <text:p>2,7104</text:p>
          </table:table-cell>
          <table:table-cell table:number-columns-repeated="1637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39" calcext:value-type="float">
            <text:p>2339</text:p>
          </table:table-cell>
          <table:table-cell table:formula="of:=[.$G$2]/([.C191]+[.$H$2])" office:value-type="float" office:value="0.000271983142880298" calcext:value-type="float">
            <text:p>0,000271983142880298</text:p>
          </table:table-cell>
          <table:table-cell table:formula="of:=ROUND([.$H$2]*[.D191];5)" office:value-type="float" office:value="2.71983" calcext:value-type="float">
            <text:p>2,71983</text:p>
          </table:table-cell>
          <table:table-cell table:number-columns-repeated="1637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5.556" calcext:value-type="float">
            <text:p>65,556</text:p>
          </table:table-cell>
          <table:table-cell table:style-name="ce2" office:value-type="float" office:value="2296.95" calcext:value-type="float">
            <text:p>2296,95</text:p>
          </table:table-cell>
          <table:table-cell table:formula="of:=[.$G$2]/([.C192]+[.$H$2])" office:value-type="float" office:value="0.000272913202054168" calcext:value-type="float">
            <text:p>0,000272913202054168</text:p>
          </table:table-cell>
          <table:table-cell table:formula="of:=ROUND([.$H$2]*[.D192];5)" office:value-type="float" office:value="2.72913" calcext:value-type="float">
            <text:p>2,72913</text:p>
          </table:table-cell>
          <table:table-cell table:number-columns-repeated="1637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66.111" calcext:value-type="float">
            <text:p>66,111</text:p>
          </table:table-cell>
          <table:table-cell table:style-name="ce2" office:value-type="float" office:value="2255.77" calcext:value-type="float">
            <text:p>2255,77</text:p>
          </table:table-cell>
          <table:table-cell table:formula="of:=[.$G$2]/([.C193]+[.$H$2])" office:value-type="float" office:value="0.000273830204058986" calcext:value-type="float">
            <text:p>0,000273830204058986</text:p>
          </table:table-cell>
          <table:table-cell table:formula="of:=ROUND([.$H$2]*[.D193];5)" office:value-type="float" office:value="2.7383" calcext:value-type="float">
            <text:p>2,7383</text:p>
          </table:table-cell>
          <table:table-cell table:number-columns-repeated="1637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66.667" calcext:value-type="float">
            <text:p>66,667</text:p>
          </table:table-cell>
          <table:table-cell table:style-name="ce2" office:value-type="float" office:value="2215.44" calcext:value-type="float">
            <text:p>2215,44</text:p>
          </table:table-cell>
          <table:table-cell table:formula="of:=[.$G$2]/([.C194]+[.$H$2])" office:value-type="float" office:value="0.000274734270726228" calcext:value-type="float">
            <text:p>0,000274734270726228</text:p>
          </table:table-cell>
          <table:table-cell table:formula="of:=ROUND([.$H$2]*[.D194];5)" office:value-type="float" office:value="2.74734" calcext:value-type="float">
            <text:p>2,74734</text:p>
          </table:table-cell>
          <table:table-cell table:number-columns-repeated="1637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7.222" calcext:value-type="float">
            <text:p>67,222</text:p>
          </table:table-cell>
          <table:table-cell table:style-name="ce2" office:value-type="float" office:value="2175.939" calcext:value-type="float">
            <text:p>2175,939</text:p>
          </table:table-cell>
          <table:table-cell table:formula="of:=[.$G$2]/([.C195]+[.$H$2])" office:value-type="float" office:value="0.000275625559556433" calcext:value-type="float">
            <text:p>0,000275625559556433</text:p>
          </table:table-cell>
          <table:table-cell table:formula="of:=ROUND([.$H$2]*[.D195];5)" office:value-type="float" office:value="2.75626" calcext:value-type="float">
            <text:p>2,75626</text:p>
          </table:table-cell>
          <table:table-cell table:number-columns-repeated="1637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67.778" calcext:value-type="float">
            <text:p>67,778</text:p>
          </table:table-cell>
          <table:table-cell table:style-name="ce2" office:value-type="float" office:value="2137.248" calcext:value-type="float">
            <text:p>2137,248</text:p>
          </table:table-cell>
          <table:table-cell table:formula="of:=[.$G$2]/([.C196]+[.$H$2])" office:value-type="float" office:value="0.000276504196008848" calcext:value-type="float">
            <text:p>0,000276504196008848</text:p>
          </table:table-cell>
          <table:table-cell table:formula="of:=ROUND([.$H$2]*[.D196];5)" office:value-type="float" office:value="2.76504" calcext:value-type="float">
            <text:p>2,76504</text:p>
          </table:table-cell>
          <table:table-cell table:number-columns-repeated="1637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68.333" calcext:value-type="float">
            <text:p>68,333</text:p>
          </table:table-cell>
          <table:table-cell table:style-name="ce2" office:value-type="float" office:value="2099.35" calcext:value-type="float">
            <text:p>2099,35</text:p>
          </table:table-cell>
          <table:table-cell table:formula="of:=[.$G$2]/([.C197]+[.$H$2])" office:value-type="float" office:value="0.000277370271956758" calcext:value-type="float">
            <text:p>0,000277370271956758</text:p>
          </table:table-cell>
          <table:table-cell table:formula="of:=ROUND([.$H$2]*[.D197];5)" office:value-type="float" office:value="2.7737" calcext:value-type="float">
            <text:p>2,7737</text:p>
          </table:table-cell>
          <table:table-cell table:number-columns-repeated="1637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68.889" calcext:value-type="float">
            <text:p>68,889</text:p>
          </table:table-cell>
          <table:table-cell table:style-name="ce2" office:value-type="float" office:value="2062.226" calcext:value-type="float">
            <text:p>2062,226</text:p>
          </table:table-cell>
          <table:table-cell table:formula="of:=[.$G$2]/([.C198]+[.$H$2])" office:value-type="float" office:value="0.000278223936444235" calcext:value-type="float">
            <text:p>0,000278223936444235</text:p>
          </table:table-cell>
          <table:table-cell table:formula="of:=ROUND([.$H$2]*[.D198];5)" office:value-type="float" office:value="2.78224" calcext:value-type="float">
            <text:p>2,78224</text:p>
          </table:table-cell>
          <table:table-cell table:number-columns-repeated="1637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69.444" calcext:value-type="float">
            <text:p>69,444</text:p>
          </table:table-cell>
          <table:table-cell table:style-name="ce2" office:value-type="float" office:value="2025.857" calcext:value-type="float">
            <text:p>2025,857</text:p>
          </table:table-cell>
          <table:table-cell table:formula="of:=[.$G$2]/([.C199]+[.$H$2])" office:value-type="float" office:value="0.000279065350602456" calcext:value-type="float">
            <text:p>0,000279065350602456</text:p>
          </table:table-cell>
          <table:table-cell table:formula="of:=ROUND([.$H$2]*[.D199];5)" office:value-type="float" office:value="2.79065" calcext:value-type="float">
            <text:p>2,79065</text:p>
          </table:table-cell>
          <table:table-cell table:number-columns-repeated="1637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90.227" calcext:value-type="float">
            <text:p>1990,227</text:p>
          </table:table-cell>
          <table:table-cell table:formula="of:=[.$G$2]/([.C200]+[.$H$2])" office:value-type="float" office:value="0.000279894617508076" calcext:value-type="float">
            <text:p>0,000279894617508076</text:p>
          </table:table-cell>
          <table:table-cell table:formula="of:=ROUND([.$H$2]*[.D200];5)" office:value-type="float" office:value="2.79895" calcext:value-type="float">
            <text:p>2,79895</text:p>
          </table:table-cell>
          <table:table-cell table:number-columns-repeated="1637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70.556" calcext:value-type="float">
            <text:p>70,556</text:p>
          </table:table-cell>
          <table:table-cell table:style-name="ce2" office:value-type="float" office:value="1955.319" calcext:value-type="float">
            <text:p>1955,319</text:p>
          </table:table-cell>
          <table:table-cell table:formula="of:=[.$G$2]/([.C201]+[.$H$2])" office:value-type="float" office:value="0.000280711873936614" calcext:value-type="float">
            <text:p>0,000280711873936614</text:p>
          </table:table-cell>
          <table:table-cell table:formula="of:=ROUND([.$H$2]*[.D201];5)" office:value-type="float" office:value="2.80712" calcext:value-type="float">
            <text:p>2,80712</text:p>
          </table:table-cell>
          <table:table-cell table:number-columns-repeated="1637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71.111" calcext:value-type="float">
            <text:p>71,111</text:p>
          </table:table-cell>
          <table:table-cell table:style-name="ce2" office:value-type="float" office:value="1921.117" calcext:value-type="float">
            <text:p>1921,117</text:p>
          </table:table-cell>
          <table:table-cell table:formula="of:=[.$G$2]/([.C202]+[.$H$2])" office:value-type="float" office:value="0.000281517243728084" calcext:value-type="float">
            <text:p>0,000281517243728084</text:p>
          </table:table-cell>
          <table:table-cell table:formula="of:=ROUND([.$H$2]*[.D202];5)" office:value-type="float" office:value="2.81517" calcext:value-type="float">
            <text:p>2,81517</text:p>
          </table:table-cell>
          <table:table-cell table:number-columns-repeated="1637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71.667" calcext:value-type="float">
            <text:p>71,667</text:p>
          </table:table-cell>
          <table:table-cell table:style-name="ce2" office:value-type="float" office:value="1887.605" calcext:value-type="float">
            <text:p>1887,605</text:p>
          </table:table-cell>
          <table:table-cell table:formula="of:=[.$G$2]/([.C203]+[.$H$2])" office:value-type="float" office:value="0.000282310860766319" calcext:value-type="float">
            <text:p>0,000282310860766319</text:p>
          </table:table-cell>
          <table:table-cell table:formula="of:=ROUND([.$H$2]*[.D203];5)" office:value-type="float" office:value="2.82311" calcext:value-type="float">
            <text:p>2,82311</text:p>
          </table:table-cell>
          <table:table-cell table:number-columns-repeated="1637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72.222" calcext:value-type="float">
            <text:p>72,222</text:p>
          </table:table-cell>
          <table:table-cell table:style-name="ce2" office:value-type="float" office:value="1854.766" calcext:value-type="float">
            <text:p>1854,766</text:p>
          </table:table-cell>
          <table:table-cell table:formula="of:=[.$G$2]/([.C204]+[.$H$2])" office:value-type="float" office:value="0.000283092892765661" calcext:value-type="float">
            <text:p>0,000283092892765661</text:p>
          </table:table-cell>
          <table:table-cell table:formula="of:=ROUND([.$H$2]*[.D204];5)" office:value-type="float" office:value="2.83093" calcext:value-type="float">
            <text:p>2,83093</text:p>
          </table:table-cell>
          <table:table-cell table:number-columns-repeated="1637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72.778" calcext:value-type="float">
            <text:p>72,778</text:p>
          </table:table-cell>
          <table:table-cell table:style-name="ce2" office:value-type="float" office:value="1822.586" calcext:value-type="float">
            <text:p>1822,586</text:p>
          </table:table-cell>
          <table:table-cell table:formula="of:=[.$G$2]/([.C205]+[.$H$2])" office:value-type="float" office:value="0.000283863445780813" calcext:value-type="float">
            <text:p>0,000283863445780813</text:p>
          </table:table-cell>
          <table:table-cell table:formula="of:=ROUND([.$H$2]*[.D205];5)" office:value-type="float" office:value="2.83863" calcext:value-type="float">
            <text:p>2,83863</text:p>
          </table:table-cell>
          <table:table-cell table:number-columns-repeated="1637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73.333" calcext:value-type="float">
            <text:p>73,333</text:p>
          </table:table-cell>
          <table:table-cell table:style-name="ce2" office:value-type="float" office:value="1791.05" calcext:value-type="float">
            <text:p>1791,05</text:p>
          </table:table-cell>
          <table:table-cell table:formula="of:=[.$G$2]/([.C206]+[.$H$2])" office:value-type="float" office:value="0.00028462265871148" calcext:value-type="float">
            <text:p>0,00028462265871148</text:p>
          </table:table-cell>
          <table:table-cell table:formula="of:=ROUND([.$H$2]*[.D206];5)" office:value-type="float" office:value="2.84623" calcext:value-type="float">
            <text:p>2,84623</text:p>
          </table:table-cell>
          <table:table-cell table:number-columns-repeated="1637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3.889" calcext:value-type="float">
            <text:p>73,889</text:p>
          </table:table-cell>
          <table:table-cell table:style-name="ce2" office:value-type="float" office:value="1760.143" calcext:value-type="float">
            <text:p>1760,143</text:p>
          </table:table-cell>
          <table:table-cell table:formula="of:=[.$G$2]/([.C207]+[.$H$2])" office:value-type="float" office:value="0.000285370679591226" calcext:value-type="float">
            <text:p>0,000285370679591226</text:p>
          </table:table-cell>
          <table:table-cell table:formula="of:=ROUND([.$H$2]*[.D207];5)" office:value-type="float" office:value="2.85371" calcext:value-type="float">
            <text:p>2,85371</text:p>
          </table:table-cell>
          <table:table-cell table:number-columns-repeated="1637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4.444" calcext:value-type="float">
            <text:p>74,444</text:p>
          </table:table-cell>
          <table:table-cell table:style-name="ce2" office:value-type="float" office:value="1729.852" calcext:value-type="float">
            <text:p>1729,852</text:p>
          </table:table-cell>
          <table:table-cell table:formula="of:=[.$G$2]/([.C208]+[.$H$2])" office:value-type="float" office:value="0.000286107616703092" calcext:value-type="float">
            <text:p>0,000286107616703092</text:p>
          </table:table-cell>
          <table:table-cell table:formula="of:=ROUND([.$H$2]*[.D208];5)" office:value-type="float" office:value="2.86108" calcext:value-type="float">
            <text:p>2,86108</text:p>
          </table:table-cell>
          <table:table-cell table:number-columns-repeated="1637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700.163" calcext:value-type="float">
            <text:p>1700,163</text:p>
          </table:table-cell>
          <table:table-cell table:formula="of:=[.$G$2]/([.C209]+[.$H$2])" office:value-type="float" office:value="0.000286833610779611" calcext:value-type="float">
            <text:p>0,000286833610779611</text:p>
          </table:table-cell>
          <table:table-cell table:formula="of:=ROUND([.$H$2]*[.D209];5)" office:value-type="float" office:value="2.86834" calcext:value-type="float">
            <text:p>2,86834</text:p>
          </table:table-cell>
          <table:table-cell table:number-columns-repeated="1637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75.556" calcext:value-type="float">
            <text:p>75,556</text:p>
          </table:table-cell>
          <table:table-cell table:style-name="ce2" office:value-type="float" office:value="1671.061" calcext:value-type="float">
            <text:p>1671,061</text:p>
          </table:table-cell>
          <table:table-cell table:formula="of:=[.$G$2]/([.C210]+[.$H$2])" office:value-type="float" office:value="0.000287548835534319" calcext:value-type="float">
            <text:p>0,000287548835534319</text:p>
          </table:table-cell>
          <table:table-cell table:formula="of:=ROUND([.$H$2]*[.D210];5)" office:value-type="float" office:value="2.87549" calcext:value-type="float">
            <text:p>2,87549</text:p>
          </table:table-cell>
          <table:table-cell table:number-columns-repeated="1637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76.111" calcext:value-type="float">
            <text:p>76,111</text:p>
          </table:table-cell>
          <table:table-cell table:style-name="ce2" office:value-type="float" office:value="1642.535" calcext:value-type="float">
            <text:p>1642,535</text:p>
          </table:table-cell>
          <table:table-cell table:formula="of:=[.$G$2]/([.C211]+[.$H$2])" office:value-type="float" office:value="0.000288253374372506" calcext:value-type="float">
            <text:p>0,000288253374372506</text:p>
          </table:table-cell>
          <table:table-cell table:formula="of:=ROUND([.$H$2]*[.D211];5)" office:value-type="float" office:value="2.88253" calcext:value-type="float">
            <text:p>2,88253</text:p>
          </table:table-cell>
          <table:table-cell table:number-columns-repeated="1637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76.667" calcext:value-type="float">
            <text:p>76,667</text:p>
          </table:table-cell>
          <table:table-cell table:style-name="ce2" office:value-type="float" office:value="1614.571" calcext:value-type="float">
            <text:p>1614,571</text:p>
          </table:table-cell>
          <table:table-cell table:formula="of:=[.$G$2]/([.C212]+[.$H$2])" office:value-type="float" office:value="0.000288947392030235" calcext:value-type="float">
            <text:p>0,000288947392030235</text:p>
          </table:table-cell>
          <table:table-cell table:formula="of:=ROUND([.$H$2]*[.D212];5)" office:value-type="float" office:value="2.88947" calcext:value-type="float">
            <text:p>2,88947</text:p>
          </table:table-cell>
          <table:table-cell table:number-columns-repeated="1637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77.222" calcext:value-type="float">
            <text:p>77,222</text:p>
          </table:table-cell>
          <table:table-cell table:style-name="ce2" office:value-type="float" office:value="1587.157" calcext:value-type="float">
            <text:p>1587,157</text:p>
          </table:table-cell>
          <table:table-cell table:formula="of:=[.$G$2]/([.C213]+[.$H$2])" office:value-type="float" office:value="0.000289631011299838" calcext:value-type="float">
            <text:p>0,000289631011299838</text:p>
          </table:table-cell>
          <table:table-cell table:formula="of:=ROUND([.$H$2]*[.D213];5)" office:value-type="float" office:value="2.89631" calcext:value-type="float">
            <text:p>2,89631</text:p>
          </table:table-cell>
          <table:table-cell table:number-columns-repeated="1637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77.778" calcext:value-type="float">
            <text:p>77,778</text:p>
          </table:table-cell>
          <table:table-cell table:style-name="ce2" office:value-type="float" office:value="1560.28" calcext:value-type="float">
            <text:p>1560,28</text:p>
          </table:table-cell>
          <table:table-cell table:formula="of:=[.$G$2]/([.C214]+[.$H$2])" office:value-type="float" office:value="0.00029030438709097" calcext:value-type="float">
            <text:p>0,00029030438709097</text:p>
          </table:table-cell>
          <table:table-cell table:formula="of:=ROUND([.$H$2]*[.D214];5)" office:value-type="float" office:value="2.90304" calcext:value-type="float">
            <text:p>2,90304</text:p>
          </table:table-cell>
          <table:table-cell table:number-columns-repeated="1637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78.333" calcext:value-type="float">
            <text:p>78,333</text:p>
          </table:table-cell>
          <table:table-cell table:style-name="ce2" office:value-type="float" office:value="1533.93" calcext:value-type="float">
            <text:p>1533,93</text:p>
          </table:table-cell>
          <table:table-cell table:formula="of:=[.$G$2]/([.C215]+[.$H$2])" office:value-type="float" office:value="0.000290967606011134" calcext:value-type="float">
            <text:p>0,000290967606011134</text:p>
          </table:table-cell>
          <table:table-cell table:formula="of:=ROUND([.$H$2]*[.D215];5)" office:value-type="float" office:value="2.90968" calcext:value-type="float">
            <text:p>2,90968</text:p>
          </table:table-cell>
          <table:table-cell table:number-columns-repeated="1637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78.889" calcext:value-type="float">
            <text:p>78,889</text:p>
          </table:table-cell>
          <table:table-cell table:style-name="ce2" office:value-type="float" office:value="1508.094" calcext:value-type="float">
            <text:p>1508,094</text:p>
          </table:table-cell>
          <table:table-cell table:formula="of:=[.$G$2]/([.C216]+[.$H$2])" office:value-type="float" office:value="0.00029162083660422" calcext:value-type="float">
            <text:p>0,00029162083660422</text:p>
          </table:table-cell>
          <table:table-cell table:formula="of:=ROUND([.$H$2]*[.D216];5)" office:value-type="float" office:value="2.91621" calcext:value-type="float">
            <text:p>2,91621</text:p>
          </table:table-cell>
          <table:table-cell table:number-columns-repeated="1637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79.444" calcext:value-type="float">
            <text:p>79,444</text:p>
          </table:table-cell>
          <table:table-cell table:style-name="ce2" office:value-type="float" office:value="1482.76" calcext:value-type="float">
            <text:p>1482,76</text:p>
          </table:table-cell>
          <table:table-cell table:formula="of:=[.$G$2]/([.C217]+[.$H$2])" office:value-type="float" office:value="0.00029226422915745" calcext:value-type="float">
            <text:p>0,00029226422915745</text:p>
          </table:table-cell>
          <table:table-cell table:formula="of:=ROUND([.$H$2]*[.D217];5)" office:value-type="float" office:value="2.92264" calcext:value-type="float">
            <text:p>2,92264</text:p>
          </table:table-cell>
          <table:table-cell table:number-columns-repeated="1637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57.919" calcext:value-type="float">
            <text:p>1457,919</text:p>
          </table:table-cell>
          <table:table-cell table:formula="of:=[.$G$2]/([.C218]+[.$H$2])" office:value-type="float" office:value="0.000292897863914032" calcext:value-type="float">
            <text:p>0,000292897863914032</text:p>
          </table:table-cell>
          <table:table-cell table:formula="of:=ROUND([.$H$2]*[.D218];5)" office:value-type="float" office:value="2.92898" calcext:value-type="float">
            <text:p>2,92898</text:p>
          </table:table-cell>
          <table:table-cell table:number-columns-repeated="1637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80.556" calcext:value-type="float">
            <text:p>80,556</text:p>
          </table:table-cell>
          <table:table-cell table:style-name="ce2" office:value-type="float" office:value="1433.559" calcext:value-type="float">
            <text:p>1433,559</text:p>
          </table:table-cell>
          <table:table-cell table:formula="of:=[.$G$2]/([.C219]+[.$H$2])" office:value-type="float" office:value="0.000293521903372345" calcext:value-type="float">
            <text:p>0,000293521903372345</text:p>
          </table:table-cell>
          <table:table-cell table:formula="of:=ROUND([.$H$2]*[.D219];5)" office:value-type="float" office:value="2.93522" calcext:value-type="float">
            <text:p>2,93522</text:p>
          </table:table-cell>
          <table:table-cell table:number-columns-repeated="1637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81.111" calcext:value-type="float">
            <text:p>81,111</text:p>
          </table:table-cell>
          <table:table-cell table:style-name="ce2" office:value-type="float" office:value="1409.67" calcext:value-type="float">
            <text:p>1409,67</text:p>
          </table:table-cell>
          <table:table-cell table:formula="of:=[.$G$2]/([.C220]+[.$H$2])" office:value-type="float" office:value="0.000294136464945963" calcext:value-type="float">
            <text:p>0,000294136464945963</text:p>
          </table:table-cell>
          <table:table-cell table:formula="of:=ROUND([.$H$2]*[.D220];5)" office:value-type="float" office:value="2.94136" calcext:value-type="float">
            <text:p>2,94136</text:p>
          </table:table-cell>
          <table:table-cell table:number-columns-repeated="1637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81.667" calcext:value-type="float">
            <text:p>81,667</text:p>
          </table:table-cell>
          <table:table-cell table:style-name="ce2" office:value-type="float" office:value="1386.242" calcext:value-type="float">
            <text:p>1386,242</text:p>
          </table:table-cell>
          <table:table-cell table:formula="of:=[.$G$2]/([.C221]+[.$H$2])" office:value-type="float" office:value="0.000294741671571709" calcext:value-type="float">
            <text:p>0,000294741671571709</text:p>
          </table:table-cell>
          <table:table-cell table:formula="of:=ROUND([.$H$2]*[.D221];5)" office:value-type="float" office:value="2.94742" calcext:value-type="float">
            <text:p>2,94742</text:p>
          </table:table-cell>
          <table:table-cell table:number-columns-repeated="1637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82.222" calcext:value-type="float">
            <text:p>82,222</text:p>
          </table:table-cell>
          <table:table-cell table:style-name="ce2" office:value-type="float" office:value="1363.264" calcext:value-type="float">
            <text:p>1363,264</text:p>
          </table:table-cell>
          <table:table-cell table:formula="of:=[.$G$2]/([.C222]+[.$H$2])" office:value-type="float" office:value="0.00029533767762502" calcext:value-type="float">
            <text:p>0,00029533767762502</text:p>
          </table:table-cell>
          <table:table-cell table:formula="of:=ROUND([.$H$2]*[.D222];5)" office:value-type="float" office:value="2.95338" calcext:value-type="float">
            <text:p>2,95338</text:p>
          </table:table-cell>
          <table:table-cell table:number-columns-repeated="1637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82.778" calcext:value-type="float">
            <text:p>82,778</text:p>
          </table:table-cell>
          <table:table-cell table:style-name="ce2" office:value-type="float" office:value="1340.726" calcext:value-type="float">
            <text:p>1340,726</text:p>
          </table:table-cell>
          <table:table-cell table:formula="of:=[.$G$2]/([.C223]+[.$H$2])" office:value-type="float" office:value="0.000295924617171775" calcext:value-type="float">
            <text:p>0,000295924617171775</text:p>
          </table:table-cell>
          <table:table-cell table:formula="of:=ROUND([.$H$2]*[.D223];5)" office:value-type="float" office:value="2.95925" calcext:value-type="float">
            <text:p>2,95925</text:p>
          </table:table-cell>
          <table:table-cell table:number-columns-repeated="1637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83.333" calcext:value-type="float">
            <text:p>83,333</text:p>
          </table:table-cell>
          <table:table-cell table:style-name="ce2" office:value-type="float" office:value="1318.62" calcext:value-type="float">
            <text:p>1318,62</text:p>
          </table:table-cell>
          <table:table-cell table:formula="of:=[.$G$2]/([.C224]+[.$H$2])" office:value-type="float" office:value="0.000296502577169302" calcext:value-type="float">
            <text:p>0,000296502577169302</text:p>
          </table:table-cell>
          <table:table-cell table:formula="of:=ROUND([.$H$2]*[.D224];5)" office:value-type="float" office:value="2.96503" calcext:value-type="float">
            <text:p>2,96503</text:p>
          </table:table-cell>
          <table:table-cell table:number-columns-repeated="1637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83.889" calcext:value-type="float">
            <text:p>83,889</text:p>
          </table:table-cell>
          <table:table-cell table:style-name="ce2" office:value-type="float" office:value="1296.937" calcext:value-type="float">
            <text:p>1296,937</text:p>
          </table:table-cell>
          <table:table-cell table:formula="of:=[.$G$2]/([.C225]+[.$H$2])" office:value-type="float" office:value="0.000297071675269146" calcext:value-type="float">
            <text:p>0,000297071675269146</text:p>
          </table:table-cell>
          <table:table-cell table:formula="of:=ROUND([.$H$2]*[.D225];5)" office:value-type="float" office:value="2.97072" calcext:value-type="float">
            <text:p>2,97072</text:p>
          </table:table-cell>
          <table:table-cell table:number-columns-repeated="1637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84.444" calcext:value-type="float">
            <text:p>84,444</text:p>
          </table:table-cell>
          <table:table-cell table:style-name="ce2" office:value-type="float" office:value="1275.666" calcext:value-type="float">
            <text:p>1275,666</text:p>
          </table:table-cell>
          <table:table-cell table:formula="of:=[.$G$2]/([.C226]+[.$H$2])" office:value-type="float" office:value="0.000297632086654571" calcext:value-type="float">
            <text:p>0,000297632086654571</text:p>
          </table:table-cell>
          <table:table-cell table:formula="of:=ROUND([.$H$2]*[.D226];5)" office:value-type="float" office:value="2.97632" calcext:value-type="float">
            <text:p>2,97632</text:p>
          </table:table-cell>
          <table:table-cell table:number-columns-repeated="1637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254.799" calcext:value-type="float">
            <text:p>1254,799</text:p>
          </table:table-cell>
          <table:table-cell table:formula="of:=[.$G$2]/([.C227]+[.$H$2])" office:value-type="float" office:value="0.000298183912480356" calcext:value-type="float">
            <text:p>0,000298183912480356</text:p>
          </table:table-cell>
          <table:table-cell table:formula="of:=ROUND([.$H$2]*[.D227];5)" office:value-type="float" office:value="2.98184" calcext:value-type="float">
            <text:p>2,98184</text:p>
          </table:table-cell>
          <table:table-cell table:number-columns-repeated="1637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85.556" calcext:value-type="float">
            <text:p>85,556</text:p>
          </table:table-cell>
          <table:table-cell table:style-name="ce2" office:value-type="float" office:value="1234.327" calcext:value-type="float">
            <text:p>1234,327</text:p>
          </table:table-cell>
          <table:table-cell table:formula="of:=[.$G$2]/([.C228]+[.$H$2])" office:value-type="float" office:value="0.000298727284687369" calcext:value-type="float">
            <text:p>0,000298727284687369</text:p>
          </table:table-cell>
          <table:table-cell table:formula="of:=ROUND([.$H$2]*[.D228];5)" office:value-type="float" office:value="2.98727" calcext:value-type="float">
            <text:p>2,98727</text:p>
          </table:table-cell>
          <table:table-cell table:number-columns-repeated="1637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86.111" calcext:value-type="float">
            <text:p>86,111</text:p>
          </table:table-cell>
          <table:table-cell table:style-name="ce2" office:value-type="float" office:value="1214.243" calcext:value-type="float">
            <text:p>1214,243</text:p>
          </table:table-cell>
          <table:table-cell table:formula="of:=[.$G$2]/([.C229]+[.$H$2])" office:value-type="float" office:value="0.000299262286362084" calcext:value-type="float">
            <text:p>0,000299262286362084</text:p>
          </table:table-cell>
          <table:table-cell table:formula="of:=ROUND([.$H$2]*[.D229];5)" office:value-type="float" office:value="2.99262" calcext:value-type="float">
            <text:p>2,99262</text:p>
          </table:table-cell>
          <table:table-cell table:number-columns-repeated="1637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86.667" calcext:value-type="float">
            <text:p>86,667</text:p>
          </table:table-cell>
          <table:table-cell table:style-name="ce2" office:value-type="float" office:value="1194.537" calcext:value-type="float">
            <text:p>1194,537</text:p>
          </table:table-cell>
          <table:table-cell table:formula="of:=[.$G$2]/([.C230]+[.$H$2])" office:value-type="float" office:value="0.000299789084622258" calcext:value-type="float">
            <text:p>0,000299789084622258</text:p>
          </table:table-cell>
          <table:table-cell table:formula="of:=ROUND([.$H$2]*[.D230];5)" office:value-type="float" office:value="2.99789" calcext:value-type="float">
            <text:p>2,99789</text:p>
          </table:table-cell>
          <table:table-cell table:number-columns-repeated="1637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87.222" calcext:value-type="float">
            <text:p>87,222</text:p>
          </table:table-cell>
          <table:table-cell table:style-name="ce2" office:value-type="float" office:value="1175.202" calcext:value-type="float">
            <text:p>1175,202</text:p>
          </table:table-cell>
          <table:table-cell table:formula="of:=[.$G$2]/([.C231]+[.$H$2])" office:value-type="float" office:value="0.000300307770723071" calcext:value-type="float">
            <text:p>0,000300307770723071</text:p>
          </table:table-cell>
          <table:table-cell table:formula="of:=ROUND([.$H$2]*[.D231];5)" office:value-type="float" office:value="3.00308" calcext:value-type="float">
            <text:p>3,00308</text:p>
          </table:table-cell>
          <table:table-cell table:number-columns-repeated="1637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87.778" calcext:value-type="float">
            <text:p>87,778</text:p>
          </table:table-cell>
          <table:table-cell table:style-name="ce2" office:value-type="float" office:value="1156.23" calcext:value-type="float">
            <text:p>1156,23</text:p>
          </table:table-cell>
          <table:table-cell table:formula="of:=[.$G$2]/([.C232]+[.$H$2])" office:value-type="float" office:value="0.000300818466453273" calcext:value-type="float">
            <text:p>0,000300818466453273</text:p>
          </table:table-cell>
          <table:table-cell table:formula="of:=ROUND([.$H$2]*[.D232];5)" office:value-type="float" office:value="3.00818" calcext:value-type="float">
            <text:p>3,00818</text:p>
          </table:table-cell>
          <table:table-cell table:number-columns-repeated="1637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88.333" calcext:value-type="float">
            <text:p>88,333</text:p>
          </table:table-cell>
          <table:table-cell table:style-name="ce2" office:value-type="float" office:value="1137.613" calcext:value-type="float">
            <text:p>1137,613</text:p>
          </table:table-cell>
          <table:table-cell table:formula="of:=[.$G$2]/([.C233]+[.$H$2])" office:value-type="float" office:value="0.000301321297480888" calcext:value-type="float">
            <text:p>0,000301321297480888</text:p>
          </table:table-cell>
          <table:table-cell table:formula="of:=ROUND([.$H$2]*[.D233];5)" office:value-type="float" office:value="3.01321" calcext:value-type="float">
            <text:p>3,01321</text:p>
          </table:table-cell>
          <table:table-cell table:number-columns-repeated="1637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88.889" calcext:value-type="float">
            <text:p>88,889</text:p>
          </table:table-cell>
          <table:table-cell table:style-name="ce2" office:value-type="float" office:value="1119.344" calcext:value-type="float">
            <text:p>1119,344</text:p>
          </table:table-cell>
          <table:table-cell table:formula="of:=[.$G$2]/([.C234]+[.$H$2])" office:value-type="float" office:value="0.000301816366145341" calcext:value-type="float">
            <text:p>0,000301816366145341</text:p>
          </table:table-cell>
          <table:table-cell table:formula="of:=ROUND([.$H$2]*[.D234];5)" office:value-type="float" office:value="3.01816" calcext:value-type="float">
            <text:p>3,01816</text:p>
          </table:table-cell>
          <table:table-cell table:number-columns-repeated="1637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89.444" calcext:value-type="float">
            <text:p>89,444</text:p>
          </table:table-cell>
          <table:table-cell table:style-name="ce2" office:value-type="float" office:value="1101.416" calcext:value-type="float">
            <text:p>1101,416</text:p>
          </table:table-cell>
          <table:table-cell table:formula="of:=[.$G$2]/([.C235]+[.$H$2])" office:value-type="float" office:value="0.000302303778184693" calcext:value-type="float">
            <text:p>0,000302303778184693</text:p>
          </table:table-cell>
          <table:table-cell table:formula="of:=ROUND([.$H$2]*[.D235];5)" office:value-type="float" office:value="3.02304" calcext:value-type="float">
            <text:p>3,02304</text:p>
          </table:table-cell>
          <table:table-cell table:number-columns-repeated="1637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83.82" calcext:value-type="float">
            <text:p>1083,82</text:p>
          </table:table-cell>
          <table:table-cell table:formula="of:=[.$G$2]/([.C236]+[.$H$2])" office:value-type="float" office:value="0.000302783697317351" calcext:value-type="float">
            <text:p>0,000302783697317351</text:p>
          </table:table-cell>
          <table:table-cell table:formula="of:=ROUND([.$H$2]*[.D236];5)" office:value-type="float" office:value="3.02784" calcext:value-type="float">
            <text:p>3,02784</text:p>
          </table:table-cell>
          <table:table-cell table:number-columns-repeated="1637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0.556" calcext:value-type="float">
            <text:p>90,556</text:p>
          </table:table-cell>
          <table:table-cell table:style-name="ce2" office:value-type="float" office:value="1066.551" calcext:value-type="float">
            <text:p>1066,551</text:p>
          </table:table-cell>
          <table:table-cell table:formula="of:=[.$G$2]/([.C237]+[.$H$2])" office:value-type="float" office:value="0.000303256181623344" calcext:value-type="float">
            <text:p>0,000303256181623344</text:p>
          </table:table-cell>
          <table:table-cell table:formula="of:=ROUND([.$H$2]*[.D237];5)" office:value-type="float" office:value="3.03256" calcext:value-type="float">
            <text:p>3,03256</text:p>
          </table:table-cell>
          <table:table-cell table:number-columns-repeated="1637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91.111" calcext:value-type="float">
            <text:p>91,111</text:p>
          </table:table-cell>
          <table:table-cell table:style-name="ce2" office:value-type="float" office:value="1049.601" calcext:value-type="float">
            <text:p>1049,601</text:p>
          </table:table-cell>
          <table:table-cell table:formula="of:=[.$G$2]/([.C238]+[.$H$2])" office:value-type="float" office:value="0.000303721374192607" calcext:value-type="float">
            <text:p>0,000303721374192607</text:p>
          </table:table-cell>
          <table:table-cell table:formula="of:=ROUND([.$H$2]*[.D238];5)" office:value-type="float" office:value="3.03721" calcext:value-type="float">
            <text:p>3,03721</text:p>
          </table:table-cell>
          <table:table-cell table:number-columns-repeated="1637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91.667" calcext:value-type="float">
            <text:p>91,667</text:p>
          </table:table-cell>
          <table:table-cell table:style-name="ce2" office:value-type="float" office:value="1032.964" calcext:value-type="float">
            <text:p>1032,964</text:p>
          </table:table-cell>
          <table:table-cell table:formula="of:=[.$G$2]/([.C239]+[.$H$2])" office:value-type="float" office:value="0.000304179366487555" calcext:value-type="float">
            <text:p>0,000304179366487555</text:p>
          </table:table-cell>
          <table:table-cell table:formula="of:=ROUND([.$H$2]*[.D239];5)" office:value-type="float" office:value="3.04179" calcext:value-type="float">
            <text:p>3,04179</text:p>
          </table:table-cell>
          <table:table-cell table:number-columns-repeated="1637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92.222" calcext:value-type="float">
            <text:p>92,222</text:p>
          </table:table-cell>
          <table:table-cell table:style-name="ce2" office:value-type="float" office:value="1016.633" calcext:value-type="float">
            <text:p>1016,633</text:p>
          </table:table-cell>
          <table:table-cell table:formula="of:=[.$G$2]/([.C240]+[.$H$2])" office:value-type="float" office:value="0.000304630280413262" calcext:value-type="float">
            <text:p>0,000304630280413262</text:p>
          </table:table-cell>
          <table:table-cell table:formula="of:=ROUND([.$H$2]*[.D240];5)" office:value-type="float" office:value="3.0463" calcext:value-type="float">
            <text:p>3,0463</text:p>
          </table:table-cell>
          <table:table-cell table:number-columns-repeated="1637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92.778" calcext:value-type="float">
            <text:p>92,778</text:p>
          </table:table-cell>
          <table:table-cell table:style-name="ce2" office:value-type="float" office:value="1000.602" calcext:value-type="float">
            <text:p>1000,602</text:p>
          </table:table-cell>
          <table:table-cell table:formula="of:=[.$G$2]/([.C241]+[.$H$2])" office:value-type="float" office:value="0.000305074213211241" calcext:value-type="float">
            <text:p>0,000305074213211241</text:p>
          </table:table-cell>
          <table:table-cell table:formula="of:=ROUND([.$H$2]*[.D241];5)" office:value-type="float" office:value="3.05074" calcext:value-type="float">
            <text:p>3,05074</text:p>
          </table:table-cell>
          <table:table-cell table:number-columns-repeated="1637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3.333" calcext:value-type="float">
            <text:p>93,333</text:p>
          </table:table-cell>
          <table:table-cell table:style-name="ce2" office:value-type="float" office:value="984.865" calcext:value-type="float">
            <text:p>984,865</text:p>
          </table:table-cell>
          <table:table-cell table:formula="of:=[.$G$2]/([.C242]+[.$H$2])" office:value-type="float" office:value="0.000305511264817547" calcext:value-type="float">
            <text:p>0,000305511264817547</text:p>
          </table:table-cell>
          <table:table-cell table:formula="of:=ROUND([.$H$2]*[.D242];5)" office:value-type="float" office:value="3.05511" calcext:value-type="float">
            <text:p>3,05511</text:p>
          </table:table-cell>
          <table:table-cell table:number-columns-repeated="1637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93.889" calcext:value-type="float">
            <text:p>93,889</text:p>
          </table:table-cell>
          <table:table-cell table:style-name="ce2" office:value-type="float" office:value="969.416" calcext:value-type="float">
            <text:p>969,416</text:p>
          </table:table-cell>
          <table:table-cell table:formula="of:=[.$G$2]/([.C243]+[.$H$2])" office:value-type="float" office:value="0.00030594153781751" calcext:value-type="float">
            <text:p>0,00030594153781751</text:p>
          </table:table-cell>
          <table:table-cell table:formula="of:=ROUND([.$H$2]*[.D243];5)" office:value-type="float" office:value="3.05942" calcext:value-type="float">
            <text:p>3,05942</text:p>
          </table:table-cell>
          <table:table-cell table:number-columns-repeated="1637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94.444" calcext:value-type="float">
            <text:p>94,444</text:p>
          </table:table-cell>
          <table:table-cell table:style-name="ce2" office:value-type="float" office:value="954.248" calcext:value-type="float">
            <text:p>954,248</text:p>
          </table:table-cell>
          <table:table-cell table:formula="of:=[.$G$2]/([.C244]+[.$H$2])" office:value-type="float" office:value="0.00030636516536781" calcext:value-type="float">
            <text:p>0,00030636516536781</text:p>
          </table:table-cell>
          <table:table-cell table:formula="of:=ROUND([.$H$2]*[.D244];5)" office:value-type="float" office:value="3.06365" calcext:value-type="float">
            <text:p>3,06365</text:p>
          </table:table-cell>
          <table:table-cell table:number-columns-repeated="1637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39.356" calcext:value-type="float">
            <text:p>939,356</text:p>
          </table:table-cell>
          <table:table-cell table:formula="of:=[.$G$2]/([.C245]+[.$H$2])" office:value-type="float" office:value="0.000306782227399858" calcext:value-type="float">
            <text:p>0,000306782227399858</text:p>
          </table:table-cell>
          <table:table-cell table:formula="of:=ROUND([.$H$2]*[.D245];5)" office:value-type="float" office:value="3.06782" calcext:value-type="float">
            <text:p>3,06782</text:p>
          </table:table-cell>
          <table:table-cell table:number-columns-repeated="1637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95.556" calcext:value-type="float">
            <text:p>95,556</text:p>
          </table:table-cell>
          <table:table-cell table:style-name="ce2" office:value-type="float" office:value="924.734" calcext:value-type="float">
            <text:p>924,734</text:p>
          </table:table-cell>
          <table:table-cell table:formula="of:=[.$G$2]/([.C246]+[.$H$2])" office:value-type="float" office:value="0.000307192834168777" calcext:value-type="float">
            <text:p>0,000307192834168777</text:p>
          </table:table-cell>
          <table:table-cell table:formula="of:=ROUND([.$H$2]*[.D246];5)" office:value-type="float" office:value="3.07193" calcext:value-type="float">
            <text:p>3,07193</text:p>
          </table:table-cell>
          <table:table-cell table:number-columns-repeated="1637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96.111" calcext:value-type="float">
            <text:p>96,111</text:p>
          </table:table-cell>
          <table:table-cell table:style-name="ce2" office:value-type="float" office:value="910.377" calcext:value-type="float">
            <text:p>910,377</text:p>
          </table:table-cell>
          <table:table-cell table:formula="of:=[.$G$2]/([.C247]+[.$H$2])" office:value-type="float" office:value="0.000307597070202065" calcext:value-type="float">
            <text:p>0,000307597070202065</text:p>
          </table:table-cell>
          <table:table-cell table:formula="of:=ROUND([.$H$2]*[.D247];5)" office:value-type="float" office:value="3.07597" calcext:value-type="float">
            <text:p>3,07597</text:p>
          </table:table-cell>
          <table:table-cell table:number-columns-repeated="1637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96.667" calcext:value-type="float">
            <text:p>96,667</text:p>
          </table:table-cell>
          <table:table-cell table:style-name="ce2" office:value-type="float" office:value="896.279" calcext:value-type="float">
            <text:p>896,279</text:p>
          </table:table-cell>
          <table:table-cell table:formula="of:=[.$G$2]/([.C248]+[.$H$2])" office:value-type="float" office:value="0.000307995050420423" calcext:value-type="float">
            <text:p>0,000307995050420423</text:p>
          </table:table-cell>
          <table:table-cell table:formula="of:=ROUND([.$H$2]*[.D248];5)" office:value-type="float" office:value="3.07995" calcext:value-type="float">
            <text:p>3,07995</text:p>
          </table:table-cell>
          <table:table-cell table:number-columns-repeated="1637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97.222" calcext:value-type="float">
            <text:p>97,222</text:p>
          </table:table-cell>
          <table:table-cell table:style-name="ce2" office:value-type="float" office:value="882.436" calcext:value-type="float">
            <text:p>882,436</text:p>
          </table:table-cell>
          <table:table-cell table:formula="of:=[.$G$2]/([.C249]+[.$H$2])" office:value-type="float" office:value="0.000308386835447505" calcext:value-type="float">
            <text:p>0,000308386835447505</text:p>
          </table:table-cell>
          <table:table-cell table:formula="of:=ROUND([.$H$2]*[.D249];5)" office:value-type="float" office:value="3.08387" calcext:value-type="float">
            <text:p>3,08387</text:p>
          </table:table-cell>
          <table:table-cell table:number-columns-repeated="1637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97.778" calcext:value-type="float">
            <text:p>97,778</text:p>
          </table:table-cell>
          <table:table-cell table:style-name="ce2" office:value-type="float" office:value="868.841" calcext:value-type="float">
            <text:p>868,841</text:p>
          </table:table-cell>
          <table:table-cell table:formula="of:=[.$G$2]/([.C250]+[.$H$2])" office:value-type="float" office:value="0.000308772572898987" calcext:value-type="float">
            <text:p>0,000308772572898987</text:p>
          </table:table-cell>
          <table:table-cell table:formula="of:=ROUND([.$H$2]*[.D250];5)" office:value-type="float" office:value="3.08773" calcext:value-type="float">
            <text:p>3,08773</text:p>
          </table:table-cell>
          <table:table-cell table:number-columns-repeated="1637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98.333" calcext:value-type="float">
            <text:p>98,333</text:p>
          </table:table-cell>
          <table:table-cell table:style-name="ce2" office:value-type="float" office:value="855.49" calcext:value-type="float">
            <text:p>855,49</text:p>
          </table:table-cell>
          <table:table-cell table:formula="of:=[.$G$2]/([.C251]+[.$H$2])" office:value-type="float" office:value="0.000309152327531968" calcext:value-type="float">
            <text:p>0,000309152327531968</text:p>
          </table:table-cell>
          <table:table-cell table:formula="of:=ROUND([.$H$2]*[.D251];5)" office:value-type="float" office:value="3.09152" calcext:value-type="float">
            <text:p>3,09152</text:p>
          </table:table-cell>
          <table:table-cell table:number-columns-repeated="1637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98.889" calcext:value-type="float">
            <text:p>98,889</text:p>
          </table:table-cell>
          <table:table-cell table:style-name="ce2" office:value-type="float" office:value="842.377" calcext:value-type="float">
            <text:p>842,377</text:p>
          </table:table-cell>
          <table:table-cell table:formula="of:=[.$G$2]/([.C252]+[.$H$2])" office:value-type="float" office:value="0.000309526222893744" calcext:value-type="float">
            <text:p>0,000309526222893744</text:p>
          </table:table-cell>
          <table:table-cell table:formula="of:=ROUND([.$H$2]*[.D252];5)" office:value-type="float" office:value="3.09526" calcext:value-type="float">
            <text:p>3,09526</text:p>
          </table:table-cell>
          <table:table-cell table:number-columns-repeated="1637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99.444" calcext:value-type="float">
            <text:p>99,444</text:p>
          </table:table-cell>
          <table:table-cell table:style-name="ce2" office:value-type="float" office:value="829.499" calcext:value-type="float">
            <text:p>829,499</text:p>
          </table:table-cell>
          <table:table-cell table:formula="of:=[.$G$2]/([.C253]+[.$H$2])" office:value-type="float" office:value="0.000309894298896006" calcext:value-type="float">
            <text:p>0,000309894298896006</text:p>
          </table:table-cell>
          <table:table-cell table:formula="of:=ROUND([.$H$2]*[.D253];5)" office:value-type="float" office:value="3.09894" calcext:value-type="float">
            <text:p>3,09894</text:p>
          </table:table-cell>
          <table:table-cell table:number-columns-repeated="1637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16.85" calcext:value-type="float">
            <text:p>816,85</text:p>
          </table:table-cell>
          <table:table-cell table:formula="of:=[.$G$2]/([.C254]+[.$H$2])" office:value-type="float" office:value="0.000310256682860537" calcext:value-type="float">
            <text:p>0,000310256682860537</text:p>
          </table:table-cell>
          <table:table-cell table:formula="of:=ROUND([.$H$2]*[.D254];5)" office:value-type="float" office:value="3.10257" calcext:value-type="float">
            <text:p>3,10257</text:p>
          </table:table-cell>
          <table:table-cell table:number-columns-repeated="1637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00.556" calcext:value-type="float">
            <text:p>100,556</text:p>
          </table:table-cell>
          <table:table-cell table:style-name="ce2" office:value-type="float" office:value="804.426" calcext:value-type="float">
            <text:p>804,426</text:p>
          </table:table-cell>
          <table:table-cell table:formula="of:=[.$G$2]/([.C255]+[.$H$2])" office:value-type="float" office:value="0.000310613446748582" calcext:value-type="float">
            <text:p>0,000310613446748582</text:p>
          </table:table-cell>
          <table:table-cell table:formula="of:=ROUND([.$H$2]*[.D255];5)" office:value-type="float" office:value="3.10613" calcext:value-type="float">
            <text:p>3,10613</text:p>
          </table:table-cell>
          <table:table-cell table:number-columns-repeated="16379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01.111" calcext:value-type="float">
            <text:p>101,111</text:p>
          </table:table-cell>
          <table:table-cell table:style-name="ce2" office:value-type="float" office:value="792.222" calcext:value-type="float">
            <text:p>792,222</text:p>
          </table:table-cell>
          <table:table-cell table:formula="of:=[.$G$2]/([.C256]+[.$H$2])" office:value-type="float" office:value="0.000310964692905687" calcext:value-type="float">
            <text:p>0,000310964692905687</text:p>
          </table:table-cell>
          <table:table-cell table:formula="of:=ROUND([.$H$2]*[.D256];5)" office:value-type="float" office:value="3.10965" calcext:value-type="float">
            <text:p>3,10965</text:p>
          </table:table-cell>
          <table:table-cell table:number-columns-repeated="1637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01.667" calcext:value-type="float">
            <text:p>101,667</text:p>
          </table:table-cell>
          <table:table-cell table:style-name="ce2" office:value-type="float" office:value="780.234" calcext:value-type="float">
            <text:p>780,234</text:p>
          </table:table-cell>
          <table:table-cell table:formula="of:=[.$G$2]/([.C257]+[.$H$2])" office:value-type="float" office:value="0.00031131049659961" calcext:value-type="float">
            <text:p>0,00031131049659961</text:p>
          </table:table-cell>
          <table:table-cell table:formula="of:=ROUND([.$H$2]*[.D257];5)" office:value-type="float" office:value="3.1131" calcext:value-type="float">
            <text:p>3,1131</text:p>
          </table:table-cell>
          <table:table-cell table:number-columns-repeated="16379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02.222" calcext:value-type="float">
            <text:p>102,222</text:p>
          </table:table-cell>
          <table:table-cell table:style-name="ce2" office:value-type="float" office:value="768.457" calcext:value-type="float">
            <text:p>768,457</text:p>
          </table:table-cell>
          <table:table-cell table:formula="of:=[.$G$2]/([.C258]+[.$H$2])" office:value-type="float" office:value="0.000311650963550303" calcext:value-type="float">
            <text:p>0,000311650963550303</text:p>
          </table:table-cell>
          <table:table-cell table:formula="of:=ROUND([.$H$2]*[.D258];5)" office:value-type="float" office:value="3.11651" calcext:value-type="float">
            <text:p>3,11651</text:p>
          </table:table-cell>
          <table:table-cell table:number-columns-repeated="16379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2.778" calcext:value-type="float">
            <text:p>102,778</text:p>
          </table:table-cell>
          <table:table-cell table:style-name="ce2" office:value-type="float" office:value="756.887" calcext:value-type="float">
            <text:p>756,887</text:p>
          </table:table-cell>
          <table:table-cell table:formula="of:=[.$G$2]/([.C259]+[.$H$2])" office:value-type="float" office:value="0.000311986172207628" calcext:value-type="float">
            <text:p>0,000311986172207628</text:p>
          </table:table-cell>
          <table:table-cell table:formula="of:=ROUND([.$H$2]*[.D259];5)" office:value-type="float" office:value="3.11986" calcext:value-type="float">
            <text:p>3,11986</text:p>
          </table:table-cell>
          <table:table-cell table:number-columns-repeated="1637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03.333" calcext:value-type="float">
            <text:p>103,333</text:p>
          </table:table-cell>
          <table:table-cell table:style-name="ce2" office:value-type="float" office:value="745.521" calcext:value-type="float">
            <text:p>745,521</text:p>
          </table:table-cell>
          <table:table-cell table:formula="of:=[.$G$2]/([.C260]+[.$H$2])" office:value-type="float" office:value="0.000312316173408437" calcext:value-type="float">
            <text:p>0,000312316173408437</text:p>
          </table:table-cell>
          <table:table-cell table:formula="of:=ROUND([.$H$2]*[.D260];5)" office:value-type="float" office:value="3.12316" calcext:value-type="float">
            <text:p>3,12316</text:p>
          </table:table-cell>
          <table:table-cell table:number-columns-repeated="16379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03.889" calcext:value-type="float">
            <text:p>103,889</text:p>
          </table:table-cell>
          <table:table-cell table:style-name="ce2" office:value-type="float" office:value="734.353" calcext:value-type="float">
            <text:p>734,353</text:p>
          </table:table-cell>
          <table:table-cell table:formula="of:=[.$G$2]/([.C261]+[.$H$2])" office:value-type="float" office:value="0.000312641106548294" calcext:value-type="float">
            <text:p>0,000312641106548294</text:p>
          </table:table-cell>
          <table:table-cell table:formula="of:=ROUND([.$H$2]*[.D261];5)" office:value-type="float" office:value="3.12641" calcext:value-type="float">
            <text:p>3,12641</text:p>
          </table:table-cell>
          <table:table-cell table:number-columns-repeated="1637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04.444" calcext:value-type="float">
            <text:p>104,444</text:p>
          </table:table-cell>
          <table:table-cell table:style-name="ce2" office:value-type="float" office:value="723.381" calcext:value-type="float">
            <text:p>723,381</text:p>
          </table:table-cell>
          <table:table-cell table:formula="of:=[.$G$2]/([.C262]+[.$H$2])" office:value-type="float" office:value="0.00031296099616343" calcext:value-type="float">
            <text:p>0,00031296099616343</text:p>
          </table:table-cell>
          <table:table-cell table:formula="of:=ROUND([.$H$2]*[.D262];5)" office:value-type="float" office:value="3.12961" calcext:value-type="float">
            <text:p>3,12961</text:p>
          </table:table-cell>
          <table:table-cell table:number-columns-repeated="1637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712.6" calcext:value-type="float">
            <text:p>712,6</text:p>
          </table:table-cell>
          <table:table-cell table:formula="of:=[.$G$2]/([.C263]+[.$H$2])" office:value-type="float" office:value="0.000313275955416986" calcext:value-type="float">
            <text:p>0,000313275955416986</text:p>
          </table:table-cell>
          <table:table-cell table:formula="of:=ROUND([.$H$2]*[.D263];5)" office:value-type="float" office:value="3.13276" calcext:value-type="float">
            <text:p>3,13276</text:p>
          </table:table-cell>
          <table:table-cell table:number-columns-repeated="16379"/>
        </table:table-row>
        <table:table-row table:style-name="ro1" table:number-rows-repeated="10483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0kB3950-PullDown-R_1kSeri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Ω</text:p>
          </table:table-cell>
          <table:table-cell office:value-type="string" calcext:value-type="string">
            <text:p>I (amp)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PullDownR</text:p>
          </table:table-cell>
          <table:table-cell office:value-type="string" calcext:value-type="string">
            <text:p>R in series</text:p>
          </table:table-cell>
          <table:table-cell/>
          <table:table-cell table:style-name="ce13" office:value-type="string" calcext:value-type="string" table:number-columns-spanned="5" table:number-rows-spanned="1">
            <text:p>Python Tuple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Temperature_C</text:p>
          </table:table-cell>
          <table:table-cell office:value-type="string" calcext:value-type="string">
            <text:p>Resistance_kOhm</text:p>
          </table:table-cell>
          <table:table-cell/>
        </table:table-row>
        <table:table-row table:style-name="ro1">
          <table:table-cell table:style-name="ce2"/>
          <table:table-cell table:style-name="Default" office:value-type="float" office:value="-40" calcext:value-type="float">
            <text:p>-40</text:p>
          </table:table-cell>
          <table:table-cell table:style-name="ce2" office:value-type="float" office:value="277200" calcext:value-type="float">
            <text:p>277200</text:p>
          </table:table-cell>
          <table:table-cell table:formula="of:=[.$G$2]/([.C2]+[.$H$2]+[.$I$2])" office:value-type="float" office:value="0.0000116446911866759" calcext:value-type="float">
            <text:p>1,16446911866759E-05</text:p>
          </table:table-cell>
          <table:table-cell table:formula="of:=ROUND([.$H$2]*[.D2];5)" office:value-type="float" office:value="0.11645" calcext:value-type="float">
            <text:p>0,11645</text:p>
          </table:table-cell>
          <table:table-cell/>
          <table:table-cell office:value-type="float" office:value="3.356" calcext:value-type="float">
            <text:p>3,356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(</text:p>
          </table:table-cell>
          <table:table-cell table:formula="of:=[.E2]" office:value-type="float" office:value="0.11645" calcext:value-type="float">
            <text:p>0,11645</text:p>
          </table:table-cell>
          <table:table-cell office:value-type="string" calcext:value-type="string">
            <text:p>;</text:p>
          </table:table-cell>
          <table:table-cell table:formula="of:=[.B2]" office:value-type="float" office:value="-40" calcext:value-type="float">
            <text:p>-4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277.2" calcext:value-type="float">
            <text:p>277,2</text:p>
          </table:table-cell>
          <table:table-cell table:formula="of:=[.S2]*1000" office:value-type="float" office:value="277200" calcext:value-type="float">
            <text:p>277200</text:p>
          </table:table-cell>
        </table:table-row>
        <table:table-row table:style-name="ro1">
          <table:table-cell table:style-name="ce2"/>
          <table:table-cell table:style-name="Default" office:value-type="float" office:value="-39" calcext:value-type="float">
            <text:p>-39</text:p>
          </table:table-cell>
          <table:table-cell table:style-name="ce2" office:value-type="float" office:value="263600" calcext:value-type="float">
            <text:p>263600</text:p>
          </table:table-cell>
          <table:table-cell table:formula="of:=[.$G$2]/([.C3]+[.$H$2]+[.$I$2])" office:value-type="float" office:value="0.0000122214129643117" calcext:value-type="float">
            <text:p>1,22214129643117E-05</text:p>
          </table:table-cell>
          <table:table-cell table:formula="of:=ROUND([.$H$2]*[.D3];5)" office:value-type="float" office:value="0.12221" calcext:value-type="float">
            <text:p>0,1222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3]" office:value-type="float" office:value="0.12221" calcext:value-type="float">
            <text:p>0,12221</text:p>
          </table:table-cell>
          <table:table-cell office:value-type="string" calcext:value-type="string">
            <text:p>;</text:p>
          </table:table-cell>
          <table:table-cell table:formula="of:=[.B3]" office:value-type="float" office:value="-39" calcext:value-type="float">
            <text:p>-3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263.6" calcext:value-type="float">
            <text:p>263,6</text:p>
          </table:table-cell>
          <table:table-cell table:formula="of:=[.S3]*1000" office:value-type="float" office:value="263600" calcext:value-type="float">
            <text:p>263600</text:p>
          </table:table-cell>
        </table:table-row>
        <table:table-row table:style-name="ro1">
          <table:table-cell table:style-name="ce2"/>
          <table:table-cell table:style-name="Default" office:value-type="float" office:value="-38" calcext:value-type="float">
            <text:p>-38</text:p>
          </table:table-cell>
          <table:table-cell table:style-name="ce2" office:value-type="float" office:value="250100" calcext:value-type="float">
            <text:p>250100</text:p>
          </table:table-cell>
          <table:table-cell table:formula="of:=[.$G$2]/([.C4]+[.$H$2]+[.$I$2])" office:value-type="float" office:value="0.0000128533129069322" calcext:value-type="float">
            <text:p>1,28533129069322E-05</text:p>
          </table:table-cell>
          <table:table-cell table:formula="of:=ROUND([.$H$2]*[.D4];5)" office:value-type="float" office:value="0.12853" calcext:value-type="float">
            <text:p>0,1285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4]" office:value-type="float" office:value="0.12853" calcext:value-type="float">
            <text:p>0,12853</text:p>
          </table:table-cell>
          <table:table-cell office:value-type="string" calcext:value-type="string">
            <text:p>;</text:p>
          </table:table-cell>
          <table:table-cell table:formula="of:=[.B4]" office:value-type="float" office:value="-38" calcext:value-type="float">
            <text:p>-3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250.1" calcext:value-type="float">
            <text:p>250,1</text:p>
          </table:table-cell>
          <table:table-cell table:formula="of:=[.S4]*1000" office:value-type="float" office:value="250100" calcext:value-type="float">
            <text:p>250100</text:p>
          </table:table-cell>
        </table:table-row>
        <table:table-row table:style-name="ro1">
          <table:table-cell table:style-name="ce2"/>
          <table:table-cell table:style-name="Default" office:value-type="float" office:value="-37" calcext:value-type="float">
            <text:p>-37</text:p>
          </table:table-cell>
          <table:table-cell table:style-name="ce2" office:value-type="float" office:value="236800" calcext:value-type="float">
            <text:p>236800</text:p>
          </table:table-cell>
          <table:table-cell table:formula="of:=[.$G$2]/([.C5]+[.$H$2]+[.$I$2])" office:value-type="float" office:value="0.0000135431799838579" calcext:value-type="float">
            <text:p>1,35431799838579E-05</text:p>
          </table:table-cell>
          <table:table-cell table:formula="of:=ROUND([.$H$2]*[.D5];5)" office:value-type="float" office:value="0.13543" calcext:value-type="float">
            <text:p>0,1354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5]" office:value-type="float" office:value="0.13543" calcext:value-type="float">
            <text:p>0,13543</text:p>
          </table:table-cell>
          <table:table-cell office:value-type="string" calcext:value-type="string">
            <text:p>;</text:p>
          </table:table-cell>
          <table:table-cell table:formula="of:=[.B5]" office:value-type="float" office:value="-37" calcext:value-type="float">
            <text:p>-3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236.8" calcext:value-type="float">
            <text:p>236,8</text:p>
          </table:table-cell>
          <table:table-cell table:formula="of:=[.S5]*1000" office:value-type="float" office:value="236800" calcext:value-type="float">
            <text:p>236800</text:p>
          </table:table-cell>
        </table:table-row>
        <table:table-row table:style-name="ro1">
          <table:table-cell table:style-name="ce2"/>
          <table:table-cell table:style-name="Default" office:value-type="float" office:value="-36" calcext:value-type="float">
            <text:p>-36</text:p>
          </table:table-cell>
          <table:table-cell table:style-name="ce2" office:value-type="float" office:value="224000" calcext:value-type="float">
            <text:p>224000</text:p>
          </table:table-cell>
          <table:table-cell table:formula="of:=[.$G$2]/([.C6]+[.$H$2]+[.$I$2])" office:value-type="float" office:value="0.0000142808510638298" calcext:value-type="float">
            <text:p>1,42808510638298E-05</text:p>
          </table:table-cell>
          <table:table-cell table:formula="of:=ROUND([.$H$2]*[.D6];5)" office:value-type="float" office:value="0.14281" calcext:value-type="float">
            <text:p>0,1428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6]" office:value-type="float" office:value="0.14281" calcext:value-type="float">
            <text:p>0,14281</text:p>
          </table:table-cell>
          <table:table-cell office:value-type="string" calcext:value-type="string">
            <text:p>;</text:p>
          </table:table-cell>
          <table:table-cell table:formula="of:=[.B6]" office:value-type="float" office:value="-36" calcext:value-type="float">
            <text:p>-3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224" calcext:value-type="float">
            <text:p>224</text:p>
          </table:table-cell>
          <table:table-cell table:formula="of:=[.S6]*1000" office:value-type="float" office:value="224000" calcext:value-type="float">
            <text:p>224000</text:p>
          </table:table-cell>
        </table:table-row>
        <table:table-row table:style-name="ro1">
          <table:table-cell table:style-name="ce2"/>
          <table:table-cell table:style-name="Default" office:value-type="float" office:value="-35" calcext:value-type="float">
            <text:p>-35</text:p>
          </table:table-cell>
          <table:table-cell table:style-name="ce2" office:value-type="float" office:value="211500" calcext:value-type="float">
            <text:p>211500</text:p>
          </table:table-cell>
          <table:table-cell table:formula="of:=[.$G$2]/([.C7]+[.$H$2]+[.$I$2])" office:value-type="float" office:value="0.0000150831460674157" calcext:value-type="float">
            <text:p>1,50831460674157E-05</text:p>
          </table:table-cell>
          <table:table-cell table:formula="of:=ROUND([.$H$2]*[.D7];5)" office:value-type="float" office:value="0.15083" calcext:value-type="float">
            <text:p>0,1508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7]" office:value-type="float" office:value="0.15083" calcext:value-type="float">
            <text:p>0,15083</text:p>
          </table:table-cell>
          <table:table-cell office:value-type="string" calcext:value-type="string">
            <text:p>;</text:p>
          </table:table-cell>
          <table:table-cell table:formula="of:=[.B7]" office:value-type="float" office:value="-35" calcext:value-type="float">
            <text:p>-3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211.5" calcext:value-type="float">
            <text:p>211,5</text:p>
          </table:table-cell>
          <table:table-cell table:formula="of:=[.S7]*1000" office:value-type="float" office:value="211500" calcext:value-type="float">
            <text:p>211500</text:p>
          </table:table-cell>
        </table:table-row>
        <table:table-row table:style-name="ro1">
          <table:table-cell table:style-name="ce2"/>
          <table:table-cell table:style-name="Default" office:value-type="float" office:value="-34" calcext:value-type="float">
            <text:p>-34</text:p>
          </table:table-cell>
          <table:table-cell table:style-name="ce2" office:value-type="float" office:value="199600" calcext:value-type="float">
            <text:p>199600</text:p>
          </table:table-cell>
          <table:table-cell table:formula="of:=[.$G$2]/([.C8]+[.$H$2]+[.$I$2])" office:value-type="float" office:value="0.0000159354226020893" calcext:value-type="float">
            <text:p>1,59354226020893E-05</text:p>
          </table:table-cell>
          <table:table-cell table:formula="of:=ROUND([.$H$2]*[.D8];5)" office:value-type="float" office:value="0.15935" calcext:value-type="float">
            <text:p>0,1593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8]" office:value-type="float" office:value="0.15935" calcext:value-type="float">
            <text:p>0,15935</text:p>
          </table:table-cell>
          <table:table-cell office:value-type="string" calcext:value-type="string">
            <text:p>;</text:p>
          </table:table-cell>
          <table:table-cell table:formula="of:=[.B8]" office:value-type="float" office:value="-34" calcext:value-type="float">
            <text:p>-3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199.6" calcext:value-type="float">
            <text:p>199,6</text:p>
          </table:table-cell>
          <table:table-cell table:formula="of:=[.S8]*1000" office:value-type="float" office:value="199600" calcext:value-type="float">
            <text:p>199600</text:p>
          </table:table-cell>
        </table:table-row>
        <table:table-row table:style-name="ro1">
          <table:table-cell table:style-name="ce2"/>
          <table:table-cell table:style-name="Default" office:value-type="float" office:value="-33" calcext:value-type="float">
            <text:p>-33</text:p>
          </table:table-cell>
          <table:table-cell table:style-name="ce2" office:value-type="float" office:value="188100" calcext:value-type="float">
            <text:p>188100</text:p>
          </table:table-cell>
          <table:table-cell table:formula="of:=[.$G$2]/([.C9]+[.$H$2]+[.$I$2])" office:value-type="float" office:value="0.0000168558513309895" calcext:value-type="float">
            <text:p>1,68558513309895E-05</text:p>
          </table:table-cell>
          <table:table-cell table:formula="of:=ROUND([.$H$2]*[.D9];5)" office:value-type="float" office:value="0.16856" calcext:value-type="float">
            <text:p>0,1685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9]" office:value-type="float" office:value="0.16856" calcext:value-type="float">
            <text:p>0,16856</text:p>
          </table:table-cell>
          <table:table-cell office:value-type="string" calcext:value-type="string">
            <text:p>;</text:p>
          </table:table-cell>
          <table:table-cell table:formula="of:=[.B9]" office:value-type="float" office:value="-33" calcext:value-type="float">
            <text:p>-3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188.1" calcext:value-type="float">
            <text:p>188,1</text:p>
          </table:table-cell>
          <table:table-cell table:formula="of:=[.S9]*1000" office:value-type="float" office:value="188100" calcext:value-type="float">
            <text:p>188100</text:p>
          </table:table-cell>
        </table:table-row>
        <table:table-row table:style-name="ro1">
          <table:table-cell table:style-name="ce2"/>
          <table:table-cell table:style-name="Default" office:value-type="float" office:value="-32" calcext:value-type="float">
            <text:p>-32</text:p>
          </table:table-cell>
          <table:table-cell table:style-name="ce2" office:value-type="float" office:value="177300" calcext:value-type="float">
            <text:p>177300</text:p>
          </table:table-cell>
          <table:table-cell table:formula="of:=[.$G$2]/([.C10]+[.$H$2]+[.$I$2])" office:value-type="float" office:value="0.0000178226234731811" calcext:value-type="float">
            <text:p>1,78226234731811E-05</text:p>
          </table:table-cell>
          <table:table-cell table:formula="of:=ROUND([.$H$2]*[.D10];5)" office:value-type="float" office:value="0.17823" calcext:value-type="float">
            <text:p>0,1782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0]" office:value-type="float" office:value="0.17823" calcext:value-type="float">
            <text:p>0,17823</text:p>
          </table:table-cell>
          <table:table-cell office:value-type="string" calcext:value-type="string">
            <text:p>;</text:p>
          </table:table-cell>
          <table:table-cell table:formula="of:=[.B10]" office:value-type="float" office:value="-32" calcext:value-type="float">
            <text:p>-3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177.3" calcext:value-type="float">
            <text:p>177,3</text:p>
          </table:table-cell>
          <table:table-cell table:formula="of:=[.S10]*1000" office:value-type="float" office:value="177300" calcext:value-type="float">
            <text:p>177300</text:p>
          </table:table-cell>
        </table:table-row>
        <table:table-row table:style-name="ro1">
          <table:table-cell table:style-name="ce2"/>
          <table:table-cell table:style-name="Default" office:value-type="float" office:value="-31" calcext:value-type="float">
            <text:p>-31</text:p>
          </table:table-cell>
          <table:table-cell table:style-name="ce2" office:value-type="float" office:value="167000" calcext:value-type="float">
            <text:p>167000</text:p>
          </table:table-cell>
          <table:table-cell table:formula="of:=[.$G$2]/([.C11]+[.$H$2]+[.$I$2])" office:value-type="float" office:value="0.0000188539325842697" calcext:value-type="float">
            <text:p>1,88539325842697E-05</text:p>
          </table:table-cell>
          <table:table-cell table:formula="of:=ROUND([.$H$2]*[.D11];5)" office:value-type="float" office:value="0.18854" calcext:value-type="float">
            <text:p>0,1885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1]" office:value-type="float" office:value="0.18854" calcext:value-type="float">
            <text:p>0,18854</text:p>
          </table:table-cell>
          <table:table-cell office:value-type="string" calcext:value-type="string">
            <text:p>;</text:p>
          </table:table-cell>
          <table:table-cell table:formula="of:=[.B11]" office:value-type="float" office:value="-31" calcext:value-type="float">
            <text:p>-3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office:value-type="float" office:value="167" calcext:value-type="float">
            <text:p>167</text:p>
          </table:table-cell>
          <table:table-cell table:formula="of:=[.S11]*1000" office:value-type="float" office:value="167000" calcext:value-type="float">
            <text:p>167000</text:p>
          </table:table-cell>
        </table:table-row>
        <table:table-row table:style-name="ro1">
          <table:table-cell table:style-name="ce2"/>
          <table:table-cell table:style-name="Default" office:value-type="float" office:value="-30" calcext:value-type="float">
            <text:p>-30</text:p>
          </table:table-cell>
          <table:table-cell table:style-name="ce2" office:value-type="float" office:value="157200" calcext:value-type="float">
            <text:p>157200</text:p>
          </table:table-cell>
          <table:table-cell table:formula="of:=[.$G$2]/([.C12]+[.$H$2]+[.$I$2])" office:value-type="float" office:value="0.0000199524375743163" calcext:value-type="float">
            <text:p>1,99524375743163E-05</text:p>
          </table:table-cell>
          <table:table-cell table:formula="of:=ROUND([.$H$2]*[.D12];5)" office:value-type="float" office:value="0.19952" calcext:value-type="float">
            <text:p>0,1995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2]" office:value-type="float" office:value="0.19952" calcext:value-type="float">
            <text:p>0,19952</text:p>
          </table:table-cell>
          <table:table-cell office:value-type="string" calcext:value-type="string">
            <text:p>;</text:p>
          </table:table-cell>
          <table:table-cell table:formula="of:=[.B12]" office:value-type="float" office:value="-30" calcext:value-type="float">
            <text:p>-3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157.2" calcext:value-type="float">
            <text:p>157,2</text:p>
          </table:table-cell>
          <table:table-cell table:formula="of:=[.S12]*1000" office:value-type="float" office:value="157200" calcext:value-type="float">
            <text:p>157200</text:p>
          </table:table-cell>
        </table:table-row>
        <table:table-row table:style-name="ro1">
          <table:table-cell table:style-name="ce2"/>
          <table:table-cell table:style-name="Default" office:value-type="float" office:value="-29" calcext:value-type="float">
            <text:p>-29</text:p>
          </table:table-cell>
          <table:table-cell table:style-name="ce2" office:value-type="float" office:value="148100" calcext:value-type="float">
            <text:p>148100</text:p>
          </table:table-cell>
          <table:table-cell table:formula="of:=[.$G$2]/([.C13]+[.$H$2]+[.$I$2])" office:value-type="float" office:value="0.0000210936517913262" calcext:value-type="float">
            <text:p>2,10936517913262E-05</text:p>
          </table:table-cell>
          <table:table-cell table:formula="of:=ROUND([.$H$2]*[.D13];5)" office:value-type="float" office:value="0.21094" calcext:value-type="float">
            <text:p>0,2109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3]" office:value-type="float" office:value="0.21094" calcext:value-type="float">
            <text:p>0,21094</text:p>
          </table:table-cell>
          <table:table-cell office:value-type="string" calcext:value-type="string">
            <text:p>;</text:p>
          </table:table-cell>
          <table:table-cell table:formula="of:=[.B13]" office:value-type="float" office:value="-29" calcext:value-type="float">
            <text:p>-2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148.1" calcext:value-type="float">
            <text:p>148,1</text:p>
          </table:table-cell>
          <table:table-cell table:formula="of:=[.S13]*1000" office:value-type="float" office:value="148100" calcext:value-type="float">
            <text:p>148100</text:p>
          </table:table-cell>
        </table:table-row>
        <table:table-row table:style-name="ro1">
          <table:table-cell table:style-name="ce2"/>
          <table:table-cell table:style-name="Default" office:value-type="float" office:value="-28" calcext:value-type="float">
            <text:p>-28</text:p>
          </table:table-cell>
          <table:table-cell table:style-name="ce2" office:value-type="float" office:value="139400" calcext:value-type="float">
            <text:p>139400</text:p>
          </table:table-cell>
          <table:table-cell table:formula="of:=[.$G$2]/([.C14]+[.$H$2]+[.$I$2])" office:value-type="float" office:value="0.000022313829787234" calcext:value-type="float">
            <text:p>2,2313829787234E-05</text:p>
          </table:table-cell>
          <table:table-cell table:formula="of:=ROUND([.$H$2]*[.D14];5)" office:value-type="float" office:value="0.22314" calcext:value-type="float">
            <text:p>0,2231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4]" office:value-type="float" office:value="0.22314" calcext:value-type="float">
            <text:p>0,22314</text:p>
          </table:table-cell>
          <table:table-cell office:value-type="string" calcext:value-type="string">
            <text:p>;</text:p>
          </table:table-cell>
          <table:table-cell table:formula="of:=[.B14]" office:value-type="float" office:value="-28" calcext:value-type="float">
            <text:p>-2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139.4" calcext:value-type="float">
            <text:p>139,4</text:p>
          </table:table-cell>
          <table:table-cell table:formula="of:=[.S14]*1000" office:value-type="float" office:value="139400" calcext:value-type="float">
            <text:p>139400</text:p>
          </table:table-cell>
        </table:table-row>
        <table:table-row table:style-name="ro1">
          <table:table-cell table:style-name="ce2"/>
          <table:table-cell table:style-name="Default" office:value-type="float" office:value="-27" calcext:value-type="float">
            <text:p>-27</text:p>
          </table:table-cell>
          <table:table-cell table:style-name="ce2" office:value-type="float" office:value="131300" calcext:value-type="float">
            <text:p>131300</text:p>
          </table:table-cell>
          <table:table-cell table:formula="of:=[.$G$2]/([.C15]+[.$H$2]+[.$I$2])" office:value-type="float" office:value="0.000023583977512298" calcext:value-type="float">
            <text:p>2,3583977512298E-05</text:p>
          </table:table-cell>
          <table:table-cell table:formula="of:=ROUND([.$H$2]*[.D15];5)" office:value-type="float" office:value="0.23584" calcext:value-type="float">
            <text:p>0,2358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5]" office:value-type="float" office:value="0.23584" calcext:value-type="float">
            <text:p>0,23584</text:p>
          </table:table-cell>
          <table:table-cell office:value-type="string" calcext:value-type="string">
            <text:p>;</text:p>
          </table:table-cell>
          <table:table-cell table:formula="of:=[.B15]" office:value-type="float" office:value="-27" calcext:value-type="float">
            <text:p>-2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131.3" calcext:value-type="float">
            <text:p>131,3</text:p>
          </table:table-cell>
          <table:table-cell table:formula="of:=[.S15]*1000" office:value-type="float" office:value="131300" calcext:value-type="float">
            <text:p>131300</text:p>
          </table:table-cell>
        </table:table-row>
        <table:table-row table:style-name="ro1">
          <table:table-cell table:style-name="ce2"/>
          <table:table-cell table:style-name="Default" office:value-type="float" office:value="-26" calcext:value-type="float">
            <text:p>-26</text:p>
          </table:table-cell>
          <table:table-cell table:style-name="ce2" office:value-type="float" office:value="123700" calcext:value-type="float">
            <text:p>123700</text:p>
          </table:table-cell>
          <table:table-cell table:formula="of:=[.$G$2]/([.C16]+[.$H$2]+[.$I$2])" office:value-type="float" office:value="0.0000249146250927988" calcext:value-type="float">
            <text:p>2,49146250927988E-05</text:p>
          </table:table-cell>
          <table:table-cell table:formula="of:=ROUND([.$H$2]*[.D16];5)" office:value-type="float" office:value="0.24915" calcext:value-type="float">
            <text:p>0,2491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6]" office:value-type="float" office:value="0.24915" calcext:value-type="float">
            <text:p>0,24915</text:p>
          </table:table-cell>
          <table:table-cell office:value-type="string" calcext:value-type="string">
            <text:p>;</text:p>
          </table:table-cell>
          <table:table-cell table:formula="of:=[.B16]" office:value-type="float" office:value="-26" calcext:value-type="float">
            <text:p>-2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123.7" calcext:value-type="float">
            <text:p>123,7</text:p>
          </table:table-cell>
          <table:table-cell table:formula="of:=[.S16]*1000" office:value-type="float" office:value="123700" calcext:value-type="float">
            <text:p>123700</text:p>
          </table:table-cell>
        </table:table-row>
        <table:table-row table:style-name="ro1">
          <table:table-cell table:style-name="ce2"/>
          <table:table-cell table:style-name="Default" office:value-type="float" office:value="-25" calcext:value-type="float">
            <text:p>-25</text:p>
          </table:table-cell>
          <table:table-cell table:style-name="ce2" office:value-type="float" office:value="116600" calcext:value-type="float">
            <text:p>116600</text:p>
          </table:table-cell>
          <table:table-cell table:formula="of:=[.$G$2]/([.C17]+[.$H$2]+[.$I$2])" office:value-type="float" office:value="0.0000263009404388715" calcext:value-type="float">
            <text:p>2,63009404388715E-05</text:p>
          </table:table-cell>
          <table:table-cell table:formula="of:=ROUND([.$H$2]*[.D17];5)" office:value-type="float" office:value="0.26301" calcext:value-type="float">
            <text:p>0,2630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7]" office:value-type="float" office:value="0.26301" calcext:value-type="float">
            <text:p>0,26301</text:p>
          </table:table-cell>
          <table:table-cell office:value-type="string" calcext:value-type="string">
            <text:p>;</text:p>
          </table:table-cell>
          <table:table-cell table:formula="of:=[.B17]" office:value-type="float" office:value="-25" calcext:value-type="float">
            <text:p>-2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116.6" calcext:value-type="float">
            <text:p>116,6</text:p>
          </table:table-cell>
          <table:table-cell table:formula="of:=[.S17]*1000" office:value-type="float" office:value="116600" calcext:value-type="float">
            <text:p>116600</text:p>
          </table:table-cell>
        </table:table-row>
        <table:table-row table:style-name="ro1">
          <table:table-cell table:style-name="ce2"/>
          <table:table-cell table:style-name="Default" office:value-type="float" office:value="-24" calcext:value-type="float">
            <text:p>-24</text:p>
          </table:table-cell>
          <table:table-cell table:style-name="ce2" office:value-type="float" office:value="110000" calcext:value-type="float">
            <text:p>110000</text:p>
          </table:table-cell>
          <table:table-cell table:formula="of:=[.$G$2]/([.C18]+[.$H$2]+[.$I$2])" office:value-type="float" office:value="0.0000277355371900826" calcext:value-type="float">
            <text:p>2,77355371900826E-05</text:p>
          </table:table-cell>
          <table:table-cell table:formula="of:=ROUND([.$H$2]*[.D18];5)" office:value-type="float" office:value="0.27736" calcext:value-type="float">
            <text:p>0,2773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8]" office:value-type="float" office:value="0.27736" calcext:value-type="float">
            <text:p>0,27736</text:p>
          </table:table-cell>
          <table:table-cell office:value-type="string" calcext:value-type="string">
            <text:p>;</text:p>
          </table:table-cell>
          <table:table-cell table:formula="of:=[.B18]" office:value-type="float" office:value="-24" calcext:value-type="float">
            <text:p>-2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10" calcext:value-type="float">
            <text:p>110</text:p>
          </table:table-cell>
          <table:table-cell table:formula="of:=[.S18]*1000" office:value-type="float" office:value="110000" calcext:value-type="float">
            <text:p>110000</text:p>
          </table:table-cell>
        </table:table-row>
        <table:table-row table:style-name="ro1">
          <table:table-cell table:style-name="ce2"/>
          <table:table-cell table:style-name="Default" office:value-type="float" office:value="-23" calcext:value-type="float">
            <text:p>-23</text:p>
          </table:table-cell>
          <table:table-cell table:style-name="ce2" office:value-type="float" office:value="103700" calcext:value-type="float">
            <text:p>103700</text:p>
          </table:table-cell>
          <table:table-cell table:formula="of:=[.$G$2]/([.C19]+[.$H$2]+[.$I$2])" office:value-type="float" office:value="0.0000292589363557105" calcext:value-type="float">
            <text:p>2,92589363557105E-05</text:p>
          </table:table-cell>
          <table:table-cell table:formula="of:=ROUND([.$H$2]*[.D19];5)" office:value-type="float" office:value="0.29259" calcext:value-type="float">
            <text:p>0,29259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9]" office:value-type="float" office:value="0.29259" calcext:value-type="float">
            <text:p>0,29259</text:p>
          </table:table-cell>
          <table:table-cell office:value-type="string" calcext:value-type="string">
            <text:p>;</text:p>
          </table:table-cell>
          <table:table-cell table:formula="of:=[.B19]" office:value-type="float" office:value="-23" calcext:value-type="float">
            <text:p>-2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03.7" calcext:value-type="float">
            <text:p>103,7</text:p>
          </table:table-cell>
          <table:table-cell table:formula="of:=[.S19]*1000" office:value-type="float" office:value="103700" calcext:value-type="float">
            <text:p>103700</text:p>
          </table:table-cell>
        </table:table-row>
        <table:table-row table:style-name="ro1">
          <table:table-cell table:style-name="ce2"/>
          <table:table-cell table:style-name="Default" office:value-type="float" office:value="-22" calcext:value-type="float">
            <text:p>-22</text:p>
          </table:table-cell>
          <table:table-cell table:style-name="ce2" office:value-type="float" office:value="97900" calcext:value-type="float">
            <text:p>97900</text:p>
          </table:table-cell>
          <table:table-cell table:formula="of:=[.$G$2]/([.C20]+[.$H$2]+[.$I$2])" office:value-type="float" office:value="0.0000308172635445363" calcext:value-type="float">
            <text:p>3,08172635445363E-05</text:p>
          </table:table-cell>
          <table:table-cell table:formula="of:=ROUND([.$H$2]*[.D20];5)" office:value-type="float" office:value="0.30817" calcext:value-type="float">
            <text:p>0,3081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20]" office:value-type="float" office:value="0.30817" calcext:value-type="float">
            <text:p>0,30817</text:p>
          </table:table-cell>
          <table:table-cell office:value-type="string" calcext:value-type="string">
            <text:p>;</text:p>
          </table:table-cell>
          <table:table-cell table:formula="of:=[.B20]" office:value-type="float" office:value="-22" calcext:value-type="float">
            <text:p>-2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97.9" calcext:value-type="float">
            <text:p>97,9</text:p>
          </table:table-cell>
          <table:table-cell table:formula="of:=[.S20]*1000" office:value-type="float" office:value="97900" calcext:value-type="float">
            <text:p>97900</text:p>
          </table:table-cell>
        </table:table-row>
        <table:table-row table:style-name="ro1">
          <table:table-cell table:style-name="ce2"/>
          <table:table-cell table:style-name="Default" office:value-type="float" office:value="-21" calcext:value-type="float">
            <text:p>-21</text:p>
          </table:table-cell>
          <table:table-cell table:style-name="ce2" office:value-type="float" office:value="92500" calcext:value-type="float">
            <text:p>92500</text:p>
          </table:table-cell>
          <table:table-cell table:formula="of:=[.$G$2]/([.C21]+[.$H$2]+[.$I$2])" office:value-type="float" office:value="0.0000324251207729469" calcext:value-type="float">
            <text:p>3,24251207729469E-05</text:p>
          </table:table-cell>
          <table:table-cell table:formula="of:=ROUND([.$H$2]*[.D21];5)" office:value-type="float" office:value="0.32425" calcext:value-type="float">
            <text:p>0,3242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21]" office:value-type="float" office:value="0.32425" calcext:value-type="float">
            <text:p>0,32425</text:p>
          </table:table-cell>
          <table:table-cell office:value-type="string" calcext:value-type="string">
            <text:p>;</text:p>
          </table:table-cell>
          <table:table-cell table:formula="of:=[.B21]" office:value-type="float" office:value="-21" calcext:value-type="float">
            <text:p>-2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92.5" calcext:value-type="float">
            <text:p>92,5</text:p>
          </table:table-cell>
          <table:table-cell table:formula="of:=[.S21]*1000" office:value-type="float" office:value="92500" calcext:value-type="float">
            <text:p>92500</text:p>
          </table:table-cell>
        </table:table-row>
        <table:table-row table:style-name="ro1">
          <table:table-cell table:style-name="ce2"/>
          <table:table-cell table:style-name="Default" office:value-type="float" office:value="-20" calcext:value-type="float">
            <text:p>-20</text:p>
          </table:table-cell>
          <table:table-cell table:style-name="ce2" office:value-type="float" office:value="87430" calcext:value-type="float">
            <text:p>87430</text:p>
          </table:table-cell>
          <table:table-cell table:formula="of:=[.$G$2]/([.C22]+[.$H$2]+[.$I$2])" office:value-type="float" office:value="0.0000340952961495479" calcext:value-type="float">
            <text:p>3,40952961495479E-05</text:p>
          </table:table-cell>
          <table:table-cell table:formula="of:=ROUND([.$H$2]*[.D22];5)" office:value-type="float" office:value="0.34095" calcext:value-type="float">
            <text:p>0,3409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22]" office:value-type="float" office:value="0.34095" calcext:value-type="float">
            <text:p>0,34095</text:p>
          </table:table-cell>
          <table:table-cell office:value-type="string" calcext:value-type="string">
            <text:p>;</text:p>
          </table:table-cell>
          <table:table-cell table:formula="of:=[.B22]" office:value-type="float" office:value="-20" calcext:value-type="float">
            <text:p>-2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87.43" calcext:value-type="float">
            <text:p>87,43</text:p>
          </table:table-cell>
          <table:table-cell table:formula="of:=[.S22]*1000" office:value-type="float" office:value="87430" calcext:value-type="float">
            <text:p>87430</text:p>
          </table:table-cell>
        </table:table-row>
        <table:table-row table:style-name="ro1">
          <table:table-cell table:style-name="ce2"/>
          <table:table-cell table:style-name="Default" office:value-type="float" office:value="-19" calcext:value-type="float">
            <text:p>-19</text:p>
          </table:table-cell>
          <table:table-cell table:style-name="ce2" office:value-type="float" office:value="82790" calcext:value-type="float">
            <text:p>82790</text:p>
          </table:table-cell>
          <table:table-cell table:formula="of:=[.$G$2]/([.C23]+[.$H$2]+[.$I$2])" office:value-type="float" office:value="0.0000357820663183708" calcext:value-type="float">
            <text:p>3,57820663183708E-05</text:p>
          </table:table-cell>
          <table:table-cell table:formula="of:=ROUND([.$H$2]*[.D23];5)" office:value-type="float" office:value="0.35782" calcext:value-type="float">
            <text:p>0,3578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23]" office:value-type="float" office:value="0.35782" calcext:value-type="float">
            <text:p>0,35782</text:p>
          </table:table-cell>
          <table:table-cell office:value-type="string" calcext:value-type="string">
            <text:p>;</text:p>
          </table:table-cell>
          <table:table-cell table:formula="of:=[.B23]" office:value-type="float" office:value="-19" calcext:value-type="float">
            <text:p>-1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82.79" calcext:value-type="float">
            <text:p>82,79</text:p>
          </table:table-cell>
          <table:table-cell table:formula="of:=[.S23]*1000" office:value-type="float" office:value="82790" calcext:value-type="float">
            <text:p>82790</text:p>
          </table:table-cell>
        </table:table-row>
        <table:table-row table:style-name="ro1">
          <table:table-cell table:style-name="ce2"/>
          <table:table-cell table:style-name="Default" office:value-type="float" office:value="-18" calcext:value-type="float">
            <text:p>-18</text:p>
          </table:table-cell>
          <table:table-cell table:style-name="ce2" office:value-type="float" office:value="78440" calcext:value-type="float">
            <text:p>78440</text:p>
          </table:table-cell>
          <table:table-cell table:formula="of:=[.$G$2]/([.C24]+[.$H$2]+[.$I$2])" office:value-type="float" office:value="0.0000375223613595707" calcext:value-type="float">
            <text:p>3,75223613595707E-05</text:p>
          </table:table-cell>
          <table:table-cell table:formula="of:=ROUND([.$H$2]*[.D24];5)" office:value-type="float" office:value="0.37522" calcext:value-type="float">
            <text:p>0,3752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24]" office:value-type="float" office:value="0.37522" calcext:value-type="float">
            <text:p>0,37522</text:p>
          </table:table-cell>
          <table:table-cell office:value-type="string" calcext:value-type="string">
            <text:p>;</text:p>
          </table:table-cell>
          <table:table-cell table:formula="of:=[.B24]" office:value-type="float" office:value="-18" calcext:value-type="float">
            <text:p>-1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78.44" calcext:value-type="float">
            <text:p>78,44</text:p>
          </table:table-cell>
          <table:table-cell table:formula="of:=[.S24]*1000" office:value-type="float" office:value="78440" calcext:value-type="float">
            <text:p>78440</text:p>
          </table:table-cell>
        </table:table-row>
        <table:table-row table:style-name="ro1">
          <table:table-cell table:style-name="ce2"/>
          <table:table-cell table:style-name="Default" office:value-type="float" office:value="-17" calcext:value-type="float">
            <text:p>-17</text:p>
          </table:table-cell>
          <table:table-cell table:style-name="ce2" office:value-type="float" office:value="74360" calcext:value-type="float">
            <text:p>74360</text:p>
          </table:table-cell>
          <table:table-cell table:formula="of:=[.$G$2]/([.C25]+[.$H$2]+[.$I$2])" office:value-type="float" office:value="0.0000393158388003749" calcext:value-type="float">
            <text:p>3,93158388003749E-05</text:p>
          </table:table-cell>
          <table:table-cell table:formula="of:=ROUND([.$H$2]*[.D25];5)" office:value-type="float" office:value="0.39316" calcext:value-type="float">
            <text:p>0,3931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25]" office:value-type="float" office:value="0.39316" calcext:value-type="float">
            <text:p>0,39316</text:p>
          </table:table-cell>
          <table:table-cell office:value-type="string" calcext:value-type="string">
            <text:p>;</text:p>
          </table:table-cell>
          <table:table-cell table:formula="of:=[.B25]" office:value-type="float" office:value="-17" calcext:value-type="float">
            <text:p>-1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74.36" calcext:value-type="float">
            <text:p>74,36</text:p>
          </table:table-cell>
          <table:table-cell table:formula="of:=[.S25]*1000" office:value-type="float" office:value="74360" calcext:value-type="float">
            <text:p>74360</text:p>
          </table:table-cell>
        </table:table-row>
        <table:table-row table:style-name="ro1">
          <table:table-cell table:style-name="ce2"/>
          <table:table-cell table:style-name="Default" office:value-type="float" office:value="-16" calcext:value-type="float">
            <text:p>-16</text:p>
          </table:table-cell>
          <table:table-cell table:style-name="ce2" office:value-type="float" office:value="70530" calcext:value-type="float">
            <text:p>70530</text:p>
          </table:table-cell>
          <table:table-cell table:formula="of:=[.$G$2]/([.C26]+[.$H$2]+[.$I$2])" office:value-type="float" office:value="0.0000411627621734331" calcext:value-type="float">
            <text:p>4,11627621734331E-05</text:p>
          </table:table-cell>
          <table:table-cell table:formula="of:=ROUND([.$H$2]*[.D26];5)" office:value-type="float" office:value="0.41163" calcext:value-type="float">
            <text:p>0,4116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26]" office:value-type="float" office:value="0.41163" calcext:value-type="float">
            <text:p>0,41163</text:p>
          </table:table-cell>
          <table:table-cell office:value-type="string" calcext:value-type="string">
            <text:p>;</text:p>
          </table:table-cell>
          <table:table-cell table:formula="of:=[.B26]" office:value-type="float" office:value="-16" calcext:value-type="float">
            <text:p>-1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70.53" calcext:value-type="float">
            <text:p>70,53</text:p>
          </table:table-cell>
          <table:table-cell table:formula="of:=[.S26]*1000" office:value-type="float" office:value="70530" calcext:value-type="float">
            <text:p>70530</text:p>
          </table:table-cell>
        </table:table-row>
        <table:table-row table:style-name="ro1">
          <table:table-cell table:style-name="ce2"/>
          <table:table-cell table:style-name="Default" office:value-type="float" office:value="-15" calcext:value-type="float">
            <text:p>-15</text:p>
          </table:table-cell>
          <table:table-cell table:style-name="ce2" office:value-type="float" office:value="66920" calcext:value-type="float">
            <text:p>66920</text:p>
          </table:table-cell>
          <table:table-cell table:formula="of:=[.$G$2]/([.C27]+[.$H$2]+[.$I$2])" office:value-type="float" office:value="0.0000430698151950719" calcext:value-type="float">
            <text:p>4,30698151950719E-05</text:p>
          </table:table-cell>
          <table:table-cell table:formula="of:=ROUND([.$H$2]*[.D27];5)" office:value-type="float" office:value="0.4307" calcext:value-type="float">
            <text:p>0,430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27]" office:value-type="float" office:value="0.4307" calcext:value-type="float">
            <text:p>0,4307</text:p>
          </table:table-cell>
          <table:table-cell office:value-type="string" calcext:value-type="string">
            <text:p>;</text:p>
          </table:table-cell>
          <table:table-cell table:formula="of:=[.B27]" office:value-type="float" office:value="-15" calcext:value-type="float">
            <text:p>-1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66.92" calcext:value-type="float">
            <text:p>66,92</text:p>
          </table:table-cell>
          <table:table-cell table:formula="of:=[.S27]*1000" office:value-type="float" office:value="66920" calcext:value-type="float">
            <text:p>66920</text:p>
          </table:table-cell>
        </table:table-row>
        <table:table-row table:style-name="ro1">
          <table:table-cell table:style-name="ce2"/>
          <table:table-cell table:style-name="Default" office:value-type="float" office:value="-14" calcext:value-type="float">
            <text:p>-14</text:p>
          </table:table-cell>
          <table:table-cell table:style-name="ce2" office:value-type="float" office:value="63540" calcext:value-type="float">
            <text:p>63540</text:p>
          </table:table-cell>
          <table:table-cell table:formula="of:=[.$G$2]/([.C28]+[.$H$2]+[.$I$2])" office:value-type="float" office:value="0.0000450228065468205" calcext:value-type="float">
            <text:p>4,50228065468205E-05</text:p>
          </table:table-cell>
          <table:table-cell table:formula="of:=ROUND([.$H$2]*[.D28];5)" office:value-type="float" office:value="0.45023" calcext:value-type="float">
            <text:p>0,4502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28]" office:value-type="float" office:value="0.45023" calcext:value-type="float">
            <text:p>0,45023</text:p>
          </table:table-cell>
          <table:table-cell office:value-type="string" calcext:value-type="string">
            <text:p>;</text:p>
          </table:table-cell>
          <table:table-cell table:formula="of:=[.B28]" office:value-type="float" office:value="-14" calcext:value-type="float">
            <text:p>-1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63.54" calcext:value-type="float">
            <text:p>63,54</text:p>
          </table:table-cell>
          <table:table-cell table:formula="of:=[.S28]*1000" office:value-type="float" office:value="63540" calcext:value-type="float">
            <text:p>63540</text:p>
          </table:table-cell>
        </table:table-row>
        <table:table-row table:style-name="ro1">
          <table:table-cell table:style-name="ce2"/>
          <table:table-cell table:style-name="Default" office:value-type="float" office:value="-13" calcext:value-type="float">
            <text:p>-13</text:p>
          </table:table-cell>
          <table:table-cell table:style-name="ce2" office:value-type="float" office:value="60340" calcext:value-type="float">
            <text:p>60340</text:p>
          </table:table-cell>
          <table:table-cell table:formula="of:=[.$G$2]/([.C29]+[.$H$2]+[.$I$2])" office:value-type="float" office:value="0.0000470423324922904" calcext:value-type="float">
            <text:p>4,70423324922904E-05</text:p>
          </table:table-cell>
          <table:table-cell table:formula="of:=ROUND([.$H$2]*[.D29];5)" office:value-type="float" office:value="0.47042" calcext:value-type="float">
            <text:p>0,4704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29]" office:value-type="float" office:value="0.47042" calcext:value-type="float">
            <text:p>0,47042</text:p>
          </table:table-cell>
          <table:table-cell office:value-type="string" calcext:value-type="string">
            <text:p>;</text:p>
          </table:table-cell>
          <table:table-cell table:formula="of:=[.B29]" office:value-type="float" office:value="-13" calcext:value-type="float">
            <text:p>-1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60.34" calcext:value-type="float">
            <text:p>60,34</text:p>
          </table:table-cell>
          <table:table-cell table:formula="of:=[.S29]*1000" office:value-type="float" office:value="60340" calcext:value-type="float">
            <text:p>60340</text:p>
          </table:table-cell>
        </table:table-row>
        <table:table-row table:style-name="ro1">
          <table:table-cell table:style-name="ce2"/>
          <table:table-cell table:style-name="Default" office:value-type="float" office:value="-12" calcext:value-type="float">
            <text:p>-12</text:p>
          </table:table-cell>
          <table:table-cell table:style-name="ce2" office:value-type="float" office:value="57330" calcext:value-type="float">
            <text:p>57330</text:p>
          </table:table-cell>
          <table:table-cell table:formula="of:=[.$G$2]/([.C30]+[.$H$2]+[.$I$2])" office:value-type="float" office:value="0.0000491145909556564" calcext:value-type="float">
            <text:p>4,91145909556564E-05</text:p>
          </table:table-cell>
          <table:table-cell table:formula="of:=ROUND([.$H$2]*[.D30];5)" office:value-type="float" office:value="0.49115" calcext:value-type="float">
            <text:p>0,4911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30]" office:value-type="float" office:value="0.49115" calcext:value-type="float">
            <text:p>0,49115</text:p>
          </table:table-cell>
          <table:table-cell office:value-type="string" calcext:value-type="string">
            <text:p>;</text:p>
          </table:table-cell>
          <table:table-cell table:formula="of:=[.B30]" office:value-type="float" office:value="-12" calcext:value-type="float">
            <text:p>-1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57.33" calcext:value-type="float">
            <text:p>57,33</text:p>
          </table:table-cell>
          <table:table-cell table:formula="of:=[.S30]*1000" office:value-type="float" office:value="57330" calcext:value-type="float">
            <text:p>57330</text:p>
          </table:table-cell>
        </table:table-row>
        <table:table-row table:style-name="ro1">
          <table:table-cell table:style-name="ce2"/>
          <table:table-cell table:style-name="Default" office:value-type="float" office:value="-11" calcext:value-type="float">
            <text:p>-11</text:p>
          </table:table-cell>
          <table:table-cell table:style-name="ce2" office:value-type="float" office:value="54500" calcext:value-type="float">
            <text:p>54500</text:p>
          </table:table-cell>
          <table:table-cell table:formula="of:=[.$G$2]/([.C31]+[.$H$2]+[.$I$2])" office:value-type="float" office:value="0.000051236641221374" calcext:value-type="float">
            <text:p>5,1236641221374E-05</text:p>
          </table:table-cell>
          <table:table-cell table:formula="of:=ROUND([.$H$2]*[.D31];5)" office:value-type="float" office:value="0.51237" calcext:value-type="float">
            <text:p>0,5123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31]" office:value-type="float" office:value="0.51237" calcext:value-type="float">
            <text:p>0,51237</text:p>
          </table:table-cell>
          <table:table-cell office:value-type="string" calcext:value-type="string">
            <text:p>;</text:p>
          </table:table-cell>
          <table:table-cell table:formula="of:=[.B31]" office:value-type="float" office:value="-11" calcext:value-type="float">
            <text:p>-1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54.5" calcext:value-type="float">
            <text:p>54,5</text:p>
          </table:table-cell>
          <table:table-cell table:formula="of:=[.S31]*1000" office:value-type="float" office:value="54500" calcext:value-type="float">
            <text:p>54500</text:p>
          </table:table-cell>
        </table:table-row>
        <table:table-row table:style-name="ro1">
          <table:table-cell table:style-name="ce2"/>
          <table:table-cell table:style-name="Default" office:value-type="float" office:value="-10" calcext:value-type="float">
            <text:p>-10</text:p>
          </table:table-cell>
          <table:table-cell table:style-name="ce2" office:value-type="float" office:value="51820" calcext:value-type="float">
            <text:p>51820</text:p>
          </table:table-cell>
          <table:table-cell table:formula="of:=[.$G$2]/([.C32]+[.$H$2]+[.$I$2])" office:value-type="float" office:value="0.0000534224769181789" calcext:value-type="float">
            <text:p>5,34224769181789E-05</text:p>
          </table:table-cell>
          <table:table-cell table:formula="of:=ROUND([.$H$2]*[.D32];5)" office:value-type="float" office:value="0.53422" calcext:value-type="float">
            <text:p>0,5342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32]" office:value-type="float" office:value="0.53422" calcext:value-type="float">
            <text:p>0,53422</text:p>
          </table:table-cell>
          <table:table-cell office:value-type="string" calcext:value-type="string">
            <text:p>;</text:p>
          </table:table-cell>
          <table:table-cell table:formula="of:=[.B32]" office:value-type="float" office:value="-10" calcext:value-type="float">
            <text:p>-1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51.82" calcext:value-type="float">
            <text:p>51,82</text:p>
          </table:table-cell>
          <table:table-cell table:formula="of:=[.S32]*1000" office:value-type="float" office:value="51820" calcext:value-type="float">
            <text:p>51820</text:p>
          </table:table-cell>
        </table:table-row>
        <table:table-row table:style-name="ro1">
          <table:table-cell table:style-name="ce2"/>
          <table:table-cell table:style-name="Default" office:value-type="float" office:value="-9" calcext:value-type="float">
            <text:p>-9</text:p>
          </table:table-cell>
          <table:table-cell table:style-name="ce2" office:value-type="float" office:value="49280" calcext:value-type="float">
            <text:p>49280</text:p>
          </table:table-cell>
          <table:table-cell table:formula="of:=[.$G$2]/([.C33]+[.$H$2]+[.$I$2])" office:value-type="float" office:value="0.0000556735235567352" calcext:value-type="float">
            <text:p>5,56735235567352E-05</text:p>
          </table:table-cell>
          <table:table-cell table:formula="of:=ROUND([.$H$2]*[.D33];5)" office:value-type="float" office:value="0.55674" calcext:value-type="float">
            <text:p>0,5567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33]" office:value-type="float" office:value="0.55674" calcext:value-type="float">
            <text:p>0,55674</text:p>
          </table:table-cell>
          <table:table-cell office:value-type="string" calcext:value-type="string">
            <text:p>;</text:p>
          </table:table-cell>
          <table:table-cell table:formula="of:=[.B33]" office:value-type="float" office:value="-9" calcext:value-type="float">
            <text:p>-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49.28" calcext:value-type="float">
            <text:p>49,28</text:p>
          </table:table-cell>
          <table:table-cell table:formula="of:=[.S33]*1000" office:value-type="float" office:value="49280" calcext:value-type="float">
            <text:p>49280</text:p>
          </table:table-cell>
        </table:table-row>
        <table:table-row table:style-name="ro1">
          <table:table-cell table:style-name="ce2"/>
          <table:table-cell table:style-name="Default" office:value-type="float" office:value="-8" calcext:value-type="float">
            <text:p>-8</text:p>
          </table:table-cell>
          <table:table-cell table:style-name="ce2" office:value-type="float" office:value="46890" calcext:value-type="float">
            <text:p>46890</text:p>
          </table:table-cell>
          <table:table-cell table:formula="of:=[.$G$2]/([.C34]+[.$H$2]+[.$I$2])" office:value-type="float" office:value="0.0000579720158922094" calcext:value-type="float">
            <text:p>5,79720158922094E-05</text:p>
          </table:table-cell>
          <table:table-cell table:formula="of:=ROUND([.$H$2]*[.D34];5)" office:value-type="float" office:value="0.57972" calcext:value-type="float">
            <text:p>0,5797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34]" office:value-type="float" office:value="0.57972" calcext:value-type="float">
            <text:p>0,57972</text:p>
          </table:table-cell>
          <table:table-cell office:value-type="string" calcext:value-type="string">
            <text:p>;</text:p>
          </table:table-cell>
          <table:table-cell table:formula="of:=[.B34]" office:value-type="float" office:value="-8" calcext:value-type="float">
            <text:p>-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46.89" calcext:value-type="float">
            <text:p>46,89</text:p>
          </table:table-cell>
          <table:table-cell table:formula="of:=[.S34]*1000" office:value-type="float" office:value="46890" calcext:value-type="float">
            <text:p>46890</text:p>
          </table:table-cell>
        </table:table-row>
        <table:table-row table:style-name="ro1">
          <table:table-cell table:style-name="ce2"/>
          <table:table-cell table:style-name="Default" office:value-type="float" office:value="-7" calcext:value-type="float">
            <text:p>-7</text:p>
          </table:table-cell>
          <table:table-cell table:style-name="ce2" office:value-type="float" office:value="44620" calcext:value-type="float">
            <text:p>44620</text:p>
          </table:table-cell>
          <table:table-cell table:formula="of:=[.$G$2]/([.C35]+[.$H$2]+[.$I$2])" office:value-type="float" office:value="0.0000603380079108234" calcext:value-type="float">
            <text:p>6,03380079108234E-05</text:p>
          </table:table-cell>
          <table:table-cell table:formula="of:=ROUND([.$H$2]*[.D35];5)" office:value-type="float" office:value="0.60338" calcext:value-type="float">
            <text:p>0,6033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35]" office:value-type="float" office:value="0.60338" calcext:value-type="float">
            <text:p>0,60338</text:p>
          </table:table-cell>
          <table:table-cell office:value-type="string" calcext:value-type="string">
            <text:p>;</text:p>
          </table:table-cell>
          <table:table-cell table:formula="of:=[.B35]" office:value-type="float" office:value="-7" calcext:value-type="float">
            <text:p>-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44.62" calcext:value-type="float">
            <text:p>44,62</text:p>
          </table:table-cell>
          <table:table-cell table:formula="of:=[.S35]*1000" office:value-type="float" office:value="44620" calcext:value-type="float">
            <text:p>44620</text:p>
          </table:table-cell>
        </table:table-row>
        <table:table-row table:style-name="ro1">
          <table:table-cell table:style-name="ce2"/>
          <table:table-cell table:style-name="Default" office:value-type="float" office:value="-6" calcext:value-type="float">
            <text:p>-6</text:p>
          </table:table-cell>
          <table:table-cell table:style-name="ce2" office:value-type="float" office:value="42480" calcext:value-type="float">
            <text:p>42480</text:p>
          </table:table-cell>
          <table:table-cell table:formula="of:=[.$G$2]/([.C36]+[.$H$2]+[.$I$2])" office:value-type="float" office:value="0.000062752430815258" calcext:value-type="float">
            <text:p>6,2752430815258E-05</text:p>
          </table:table-cell>
          <table:table-cell table:formula="of:=ROUND([.$H$2]*[.D36];5)" office:value-type="float" office:value="0.62752" calcext:value-type="float">
            <text:p>0,6275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36]" office:value-type="float" office:value="0.62752" calcext:value-type="float">
            <text:p>0,62752</text:p>
          </table:table-cell>
          <table:table-cell office:value-type="string" calcext:value-type="string">
            <text:p>;</text:p>
          </table:table-cell>
          <table:table-cell table:formula="of:=[.B36]" office:value-type="float" office:value="-6" calcext:value-type="float">
            <text:p>-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42.48" calcext:value-type="float">
            <text:p>42,48</text:p>
          </table:table-cell>
          <table:table-cell table:formula="of:=[.S36]*1000" office:value-type="float" office:value="42480" calcext:value-type="float">
            <text:p>42480</text:p>
          </table:table-cell>
        </table:table-row>
        <table:table-row table:style-name="ro1">
          <table:table-cell table:style-name="ce2"/>
          <table:table-cell table:style-name="Default" office:value-type="float" office:value="-5" calcext:value-type="float">
            <text:p>-5</text:p>
          </table:table-cell>
          <table:table-cell table:style-name="ce2" office:value-type="float" office:value="40450" calcext:value-type="float">
            <text:p>40450</text:p>
          </table:table-cell>
          <table:table-cell table:formula="of:=[.$G$2]/([.C37]+[.$H$2]+[.$I$2])" office:value-type="float" office:value="0.0000652283770651118" calcext:value-type="float">
            <text:p>6,52283770651118E-05</text:p>
          </table:table-cell>
          <table:table-cell table:formula="of:=ROUND([.$H$2]*[.D37];5)" office:value-type="float" office:value="0.65228" calcext:value-type="float">
            <text:p>0,6522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37]" office:value-type="float" office:value="0.65228" calcext:value-type="float">
            <text:p>0,65228</text:p>
          </table:table-cell>
          <table:table-cell office:value-type="string" calcext:value-type="string">
            <text:p>;</text:p>
          </table:table-cell>
          <table:table-cell table:formula="of:=[.B37]" office:value-type="float" office:value="-5" calcext:value-type="float">
            <text:p>-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40.45" calcext:value-type="float">
            <text:p>40,45</text:p>
          </table:table-cell>
          <table:table-cell table:formula="of:=[.S37]*1000" office:value-type="float" office:value="40450" calcext:value-type="float">
            <text:p>40450</text:p>
          </table:table-cell>
        </table:table-row>
        <table:table-row table:style-name="ro1">
          <table:table-cell table:style-name="ce2"/>
          <table:table-cell table:style-name="Default" office:value-type="float" office:value="-4" calcext:value-type="float">
            <text:p>-4</text:p>
          </table:table-cell>
          <table:table-cell table:style-name="ce2" office:value-type="float" office:value="38530" calcext:value-type="float">
            <text:p>38530</text:p>
          </table:table-cell>
          <table:table-cell table:formula="of:=[.$G$2]/([.C38]+[.$H$2]+[.$I$2])" office:value-type="float" office:value="0.0000677569150010095" calcext:value-type="float">
            <text:p>6,77569150010095E-05</text:p>
          </table:table-cell>
          <table:table-cell table:formula="of:=ROUND([.$H$2]*[.D38];5)" office:value-type="float" office:value="0.67757" calcext:value-type="float">
            <text:p>0,6775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38]" office:value-type="float" office:value="0.67757" calcext:value-type="float">
            <text:p>0,67757</text:p>
          </table:table-cell>
          <table:table-cell office:value-type="string" calcext:value-type="string">
            <text:p>;</text:p>
          </table:table-cell>
          <table:table-cell table:formula="of:=[.B38]" office:value-type="float" office:value="-4" calcext:value-type="float">
            <text:p>-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38.53" calcext:value-type="float">
            <text:p>38,53</text:p>
          </table:table-cell>
          <table:table-cell table:formula="of:=[.S38]*1000" office:value-type="float" office:value="38530" calcext:value-type="float">
            <text:p>38530</text:p>
          </table:table-cell>
        </table:table-row>
        <table:table-row table:style-name="ro1">
          <table:table-cell table:style-name="ce2"/>
          <table:table-cell table:style-name="Default" office:value-type="float" office:value="-3" calcext:value-type="float">
            <text:p>-3</text:p>
          </table:table-cell>
          <table:table-cell table:style-name="ce2" office:value-type="float" office:value="36700" calcext:value-type="float">
            <text:p>36700</text:p>
          </table:table-cell>
          <table:table-cell table:formula="of:=[.$G$2]/([.C39]+[.$H$2]+[.$I$2])" office:value-type="float" office:value="0.000070356394129979" calcext:value-type="float">
            <text:p>7,0356394129979E-05</text:p>
          </table:table-cell>
          <table:table-cell table:formula="of:=ROUND([.$H$2]*[.D39];5)" office:value-type="float" office:value="0.70356" calcext:value-type="float">
            <text:p>0,7035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39]" office:value-type="float" office:value="0.70356" calcext:value-type="float">
            <text:p>0,70356</text:p>
          </table:table-cell>
          <table:table-cell office:value-type="string" calcext:value-type="string">
            <text:p>;</text:p>
          </table:table-cell>
          <table:table-cell table:formula="of:=[.B39]" office:value-type="float" office:value="-3" calcext:value-type="float">
            <text:p>-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36.7" calcext:value-type="float">
            <text:p>36,7</text:p>
          </table:table-cell>
          <table:table-cell table:formula="of:=[.S39]*1000" office:value-type="float" office:value="36700" calcext:value-type="float">
            <text:p>36700</text:p>
          </table:table-cell>
        </table:table-row>
        <table:table-row table:style-name="ro1">
          <table:table-cell table:style-name="ce2"/>
          <table:table-cell table:style-name="Default" office:value-type="float" office:value="-2" calcext:value-type="float">
            <text:p>-2</text:p>
          </table:table-cell>
          <table:table-cell table:style-name="ce2" office:value-type="float" office:value="34970" calcext:value-type="float">
            <text:p>34970</text:p>
          </table:table-cell>
          <table:table-cell table:formula="of:=[.$G$2]/([.C40]+[.$H$2]+[.$I$2])" office:value-type="float" office:value="0.0000730041331303024" calcext:value-type="float">
            <text:p>7,30041331303024E-05</text:p>
          </table:table-cell>
          <table:table-cell table:formula="of:=ROUND([.$H$2]*[.D40];5)" office:value-type="float" office:value="0.73004" calcext:value-type="float">
            <text:p>0,7300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40]" office:value-type="float" office:value="0.73004" calcext:value-type="float">
            <text:p>0,73004</text:p>
          </table:table-cell>
          <table:table-cell office:value-type="string" calcext:value-type="string">
            <text:p>;</text:p>
          </table:table-cell>
          <table:table-cell table:formula="of:=[.B40]" office:value-type="float" office:value="-2" calcext:value-type="float">
            <text:p>-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34.97" calcext:value-type="float">
            <text:p>34,97</text:p>
          </table:table-cell>
          <table:table-cell table:formula="of:=[.S40]*1000" office:value-type="float" office:value="34970" calcext:value-type="float">
            <text:p>34970</text:p>
          </table:table-cell>
        </table:table-row>
        <table:table-row table:style-name="ro1">
          <table:table-cell table:style-name="ce2"/>
          <table:table-cell table:style-name="Default" office:value-type="float" office:value="-1" calcext:value-type="float">
            <text:p>-1</text:p>
          </table:table-cell>
          <table:table-cell table:style-name="ce2" office:value-type="float" office:value="33330" calcext:value-type="float">
            <text:p>33330</text:p>
          </table:table-cell>
          <table:table-cell table:formula="of:=[.$G$2]/([.C41]+[.$H$2]+[.$I$2])" office:value-type="float" office:value="0.0000757049402210693" calcext:value-type="float">
            <text:p>7,57049402210693E-05</text:p>
          </table:table-cell>
          <table:table-cell table:formula="of:=ROUND([.$H$2]*[.D41];5)" office:value-type="float" office:value="0.75705" calcext:value-type="float">
            <text:p>0,7570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41]" office:value-type="float" office:value="0.75705" calcext:value-type="float">
            <text:p>0,75705</text:p>
          </table:table-cell>
          <table:table-cell office:value-type="string" calcext:value-type="string">
            <text:p>;</text:p>
          </table:table-cell>
          <table:table-cell table:formula="of:=[.B41]" office:value-type="float" office:value="-1" calcext:value-type="float">
            <text:p>-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3.33" calcext:value-type="float">
            <text:p>33,33</text:p>
          </table:table-cell>
          <table:table-cell table:formula="of:=[.S41]*1000" office:value-type="float" office:value="33330" calcext:value-type="float">
            <text:p>33330</text:p>
          </table:table-cell>
        </table:table-row>
        <table:table-row table:style-name="ro1">
          <table:table-cell table:style-name="ce2"/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31770" calcext:value-type="float">
            <text:p>31770</text:p>
          </table:table-cell>
          <table:table-cell table:formula="of:=[.$G$2]/([.C42]+[.$H$2]+[.$I$2])" office:value-type="float" office:value="0.0000784662146364274" calcext:value-type="float">
            <text:p>7,84662146364274E-05</text:p>
          </table:table-cell>
          <table:table-cell table:formula="of:=ROUND([.$H$2]*[.D42];5)" office:value-type="float" office:value="0.78466" calcext:value-type="float">
            <text:p>0,7846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42]" office:value-type="float" office:value="0.78466" calcext:value-type="float">
            <text:p>0,78466</text:p>
          </table:table-cell>
          <table:table-cell office:value-type="string" calcext:value-type="string">
            <text:p>;</text:p>
          </table:table-cell>
          <table:table-cell table:formula="of:=[.B42]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77" calcext:value-type="float">
            <text:p>31,77</text:p>
          </table:table-cell>
          <table:table-cell table:formula="of:=[.S42]*1000" office:value-type="float" office:value="31770" calcext:value-type="float">
            <text:p>31770</text:p>
          </table:table-cell>
        </table:table-row>
        <table:table-row table:style-name="ro1">
          <table:table-cell table:style-name="ce2"/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30250" calcext:value-type="float">
            <text:p>30250</text:p>
          </table:table-cell>
          <table:table-cell table:formula="of:=[.$G$2]/([.C43]+[.$H$2]+[.$I$2])" office:value-type="float" office:value="0.0000813575757575758" calcext:value-type="float">
            <text:p>8,13575757575758E-05</text:p>
          </table:table-cell>
          <table:table-cell table:formula="of:=ROUND([.$H$2]*[.D43];5)" office:value-type="float" office:value="0.81358" calcext:value-type="float">
            <text:p>0,8135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43]" office:value-type="float" office:value="0.81358" calcext:value-type="float">
            <text:p>0,81358</text:p>
          </table:table-cell>
          <table:table-cell office:value-type="string" calcext:value-type="string">
            <text:p>;</text:p>
          </table:table-cell>
          <table:table-cell table:formula="of:=[.B43]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.25" calcext:value-type="float">
            <text:p>30,25</text:p>
          </table:table-cell>
          <table:table-cell table:formula="of:=[.S43]*1000" office:value-type="float" office:value="30250" calcext:value-type="float">
            <text:p>30250</text:p>
          </table:table-cell>
        </table:table-row>
        <table:table-row table:style-name="ro1">
          <table:table-cell table:style-name="ce2"/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28820" calcext:value-type="float">
            <text:p>28820</text:p>
          </table:table-cell>
          <table:table-cell table:formula="of:=[.$G$2]/([.C44]+[.$H$2]+[.$I$2])" office:value-type="float" office:value="0.0000842792566549473" calcext:value-type="float">
            <text:p>8,42792566549473E-05</text:p>
          </table:table-cell>
          <table:table-cell table:formula="of:=ROUND([.$H$2]*[.D44];5)" office:value-type="float" office:value="0.84279" calcext:value-type="float">
            <text:p>0,84279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44]" office:value-type="float" office:value="0.84279" calcext:value-type="float">
            <text:p>0,84279</text:p>
          </table:table-cell>
          <table:table-cell office:value-type="string" calcext:value-type="string">
            <text:p>;</text:p>
          </table:table-cell>
          <table:table-cell table:formula="of:=[.B44]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8.82" calcext:value-type="float">
            <text:p>28,82</text:p>
          </table:table-cell>
          <table:table-cell table:formula="of:=[.S44]*1000" office:value-type="float" office:value="28820" calcext:value-type="float">
            <text:p>28820</text:p>
          </table:table-cell>
        </table:table-row>
        <table:table-row table:style-name="ro1">
          <table:table-cell table:style-name="ce2"/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27450" calcext:value-type="float">
            <text:p>27450</text:p>
          </table:table-cell>
          <table:table-cell table:formula="of:=[.$G$2]/([.C45]+[.$H$2]+[.$I$2])" office:value-type="float" office:value="0.0000872821846553966" calcext:value-type="float">
            <text:p>8,72821846553966E-05</text:p>
          </table:table-cell>
          <table:table-cell table:formula="of:=ROUND([.$H$2]*[.D45];5)" office:value-type="float" office:value="0.87282" calcext:value-type="float">
            <text:p>0,8728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45]" office:value-type="float" office:value="0.87282" calcext:value-type="float">
            <text:p>0,87282</text:p>
          </table:table-cell>
          <table:table-cell office:value-type="string" calcext:value-type="string">
            <text:p>;</text:p>
          </table:table-cell>
          <table:table-cell table:formula="of:=[.B45]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.45" calcext:value-type="float">
            <text:p>27,45</text:p>
          </table:table-cell>
          <table:table-cell table:formula="of:=[.S45]*1000" office:value-type="float" office:value="27450" calcext:value-type="float">
            <text:p>27450</text:p>
          </table:table-cell>
        </table:table-row>
        <table:table-row table:style-name="ro1">
          <table:table-cell table:style-name="ce2"/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26160" calcext:value-type="float">
            <text:p>26160</text:p>
          </table:table-cell>
          <table:table-cell table:formula="of:=[.$G$2]/([.C46]+[.$H$2]+[.$I$2])" office:value-type="float" office:value="0.0000903121636167923" calcext:value-type="float">
            <text:p>9,03121636167923E-05</text:p>
          </table:table-cell>
          <table:table-cell table:formula="of:=ROUND([.$H$2]*[.D46];5)" office:value-type="float" office:value="0.90312" calcext:value-type="float">
            <text:p>0,9031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46]" office:value-type="float" office:value="0.90312" calcext:value-type="float">
            <text:p>0,90312</text:p>
          </table:table-cell>
          <table:table-cell office:value-type="string" calcext:value-type="string">
            <text:p>;</text:p>
          </table:table-cell>
          <table:table-cell table:formula="of:=[.B46]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6.16" calcext:value-type="float">
            <text:p>26,16</text:p>
          </table:table-cell>
          <table:table-cell table:formula="of:=[.S46]*1000" office:value-type="float" office:value="26160" calcext:value-type="float">
            <text:p>26160</text:p>
          </table:table-cell>
        </table:table-row>
        <table:table-row table:style-name="ro1">
          <table:table-cell table:style-name="ce2"/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24940" calcext:value-type="float">
            <text:p>24940</text:p>
          </table:table-cell>
          <table:table-cell table:formula="of:=[.$G$2]/([.C47]+[.$H$2]+[.$I$2])" office:value-type="float" office:value="0.0000933778519755147" calcext:value-type="float">
            <text:p>9,33778519755147E-05</text:p>
          </table:table-cell>
          <table:table-cell table:formula="of:=ROUND([.$H$2]*[.D47];5)" office:value-type="float" office:value="0.93378" calcext:value-type="float">
            <text:p>0,9337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47]" office:value-type="float" office:value="0.93378" calcext:value-type="float">
            <text:p>0,93378</text:p>
          </table:table-cell>
          <table:table-cell office:value-type="string" calcext:value-type="string">
            <text:p>;</text:p>
          </table:table-cell>
          <table:table-cell table:formula="of:=[.B47]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.94" calcext:value-type="float">
            <text:p>24,94</text:p>
          </table:table-cell>
          <table:table-cell table:formula="of:=[.S47]*1000" office:value-type="float" office:value="24940" calcext:value-type="float">
            <text:p>24940</text:p>
          </table:table-cell>
        </table:table-row>
        <table:table-row table:style-name="ro1">
          <table:table-cell table:style-name="ce2"/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23770" calcext:value-type="float">
            <text:p>23770</text:p>
          </table:table-cell>
          <table:table-cell table:formula="of:=[.$G$2]/([.C48]+[.$H$2]+[.$I$2])" office:value-type="float" office:value="0.0000965199884958297" calcext:value-type="float">
            <text:p>9,65199884958297E-05</text:p>
          </table:table-cell>
          <table:table-cell table:formula="of:=ROUND([.$H$2]*[.D48];5)" office:value-type="float" office:value="0.9652" calcext:value-type="float">
            <text:p>0,965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48]" office:value-type="float" office:value="0.9652" calcext:value-type="float">
            <text:p>0,9652</text:p>
          </table:table-cell>
          <table:table-cell office:value-type="string" calcext:value-type="string">
            <text:p>;</text:p>
          </table:table-cell>
          <table:table-cell table:formula="of:=[.B48]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.77" calcext:value-type="float">
            <text:p>23,77</text:p>
          </table:table-cell>
          <table:table-cell table:formula="of:=[.S48]*1000" office:value-type="float" office:value="23770" calcext:value-type="float">
            <text:p>23770</text:p>
          </table:table-cell>
        </table:table-row>
        <table:table-row table:style-name="ro1">
          <table:table-cell table:style-name="ce2"/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22670" calcext:value-type="float">
            <text:p>22670</text:p>
          </table:table-cell>
          <table:table-cell table:formula="of:=[.$G$2]/([.C49]+[.$H$2]+[.$I$2])" office:value-type="float" office:value="0.0000996732996732997" calcext:value-type="float">
            <text:p>0,0000996732996732997</text:p>
          </table:table-cell>
          <table:table-cell table:formula="of:=ROUND([.$H$2]*[.D49];5)" office:value-type="float" office:value="0.99673" calcext:value-type="float">
            <text:p>0,9967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49]" office:value-type="float" office:value="0.99673" calcext:value-type="float">
            <text:p>0,99673</text:p>
          </table:table-cell>
          <table:table-cell office:value-type="string" calcext:value-type="string">
            <text:p>;</text:p>
          </table:table-cell>
          <table:table-cell table:formula="of:=[.B49]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2.67" calcext:value-type="float">
            <text:p>22,67</text:p>
          </table:table-cell>
          <table:table-cell table:formula="of:=[.S49]*1000" office:value-type="float" office:value="22670" calcext:value-type="float">
            <text:p>22670</text:p>
          </table:table-cell>
        </table:table-row>
        <table:table-row table:style-name="ro1">
          <table:table-cell table:style-name="ce2"/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21620" calcext:value-type="float">
            <text:p>21620</text:p>
          </table:table-cell>
          <table:table-cell table:formula="of:=[.$G$2]/([.C50]+[.$H$2]+[.$I$2])" office:value-type="float" office:value="0.000102881667688535" calcext:value-type="float">
            <text:p>0,000102881667688535</text:p>
          </table:table-cell>
          <table:table-cell table:formula="of:=ROUND([.$H$2]*[.D50];5)" office:value-type="float" office:value="1.02882" calcext:value-type="float">
            <text:p>1,0288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50]" office:value-type="float" office:value="1.02882" calcext:value-type="float">
            <text:p>1,02882</text:p>
          </table:table-cell>
          <table:table-cell office:value-type="string" calcext:value-type="string">
            <text:p>;</text:p>
          </table:table-cell>
          <table:table-cell table:formula="of:=[.B50]"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.62" calcext:value-type="float">
            <text:p>21,62</text:p>
          </table:table-cell>
          <table:table-cell table:formula="of:=[.S50]*1000" office:value-type="float" office:value="21620" calcext:value-type="float">
            <text:p>21620</text:p>
          </table:table-cell>
        </table:table-row>
        <table:table-row table:style-name="ro1">
          <table:table-cell table:style-name="ce2"/>
          <table:table-cell table:style-name="Default" office:value-type="float" office:value="9" calcext:value-type="float">
            <text:p>9</text:p>
          </table:table-cell>
          <table:table-cell table:style-name="ce2" office:value-type="float" office:value="20630" calcext:value-type="float">
            <text:p>20630</text:p>
          </table:table-cell>
          <table:table-cell table:formula="of:=[.$G$2]/([.C51]+[.$H$2]+[.$I$2])" office:value-type="float" office:value="0.000106101802086627" calcext:value-type="float">
            <text:p>0,000106101802086627</text:p>
          </table:table-cell>
          <table:table-cell table:formula="of:=ROUND([.$H$2]*[.D51];5)" office:value-type="float" office:value="1.06102" calcext:value-type="float">
            <text:p>1,0610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51]" office:value-type="float" office:value="1.06102" calcext:value-type="float">
            <text:p>1,06102</text:p>
          </table:table-cell>
          <table:table-cell office:value-type="string" calcext:value-type="string">
            <text:p>;</text:p>
          </table:table-cell>
          <table:table-cell table:formula="of:=[.B51]"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.63" calcext:value-type="float">
            <text:p>20,63</text:p>
          </table:table-cell>
          <table:table-cell table:formula="of:=[.S51]*1000" office:value-type="float" office:value="20630" calcext:value-type="float">
            <text:p>20630</text:p>
          </table:table-cell>
        </table:table-row>
        <table:table-row table:style-name="ro1">
          <table:table-cell table:style-name="ce2"/>
          <table:table-cell table:style-name="Default" office:value-type="float" office:value="10" calcext:value-type="float">
            <text:p>10</text:p>
          </table:table-cell>
          <table:table-cell table:style-name="ce2" office:value-type="float" office:value="19680" calcext:value-type="float">
            <text:p>19680</text:p>
          </table:table-cell>
          <table:table-cell table:formula="of:=[.$G$2]/([.C52]+[.$H$2]+[.$I$2])" office:value-type="float" office:value="0.000109387222946545" calcext:value-type="float">
            <text:p>0,000109387222946545</text:p>
          </table:table-cell>
          <table:table-cell table:formula="of:=ROUND([.$H$2]*[.D52];5)" office:value-type="float" office:value="1.09387" calcext:value-type="float">
            <text:p>1,0938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52]" office:value-type="float" office:value="1.09387" calcext:value-type="float">
            <text:p>1,09387</text:p>
          </table:table-cell>
          <table:table-cell office:value-type="string" calcext:value-type="string">
            <text:p>;</text:p>
          </table:table-cell>
          <table:table-cell table:formula="of:=[.B52]"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.68" calcext:value-type="float">
            <text:p>19,68</text:p>
          </table:table-cell>
          <table:table-cell table:formula="of:=[.S52]*1000" office:value-type="float" office:value="19680" calcext:value-type="float">
            <text:p>19680</text:p>
          </table:table-cell>
        </table:table-row>
        <table:table-row table:style-name="ro1">
          <table:table-cell table:style-name="ce2"/>
          <table:table-cell table:style-name="Default" office:value-type="float" office:value="11" calcext:value-type="float">
            <text:p>11</text:p>
          </table:table-cell>
          <table:table-cell table:style-name="ce2" office:value-type="float" office:value="18780" calcext:value-type="float">
            <text:p>18780</text:p>
          </table:table-cell>
          <table:table-cell table:formula="of:=[.$G$2]/([.C53]+[.$H$2]+[.$I$2])" office:value-type="float" office:value="0.000112693082605776" calcext:value-type="float">
            <text:p>0,000112693082605776</text:p>
          </table:table-cell>
          <table:table-cell table:formula="of:=ROUND([.$H$2]*[.D53];5)" office:value-type="float" office:value="1.12693" calcext:value-type="float">
            <text:p>1,1269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53]" office:value-type="float" office:value="1.12693" calcext:value-type="float">
            <text:p>1,12693</text:p>
          </table:table-cell>
          <table:table-cell office:value-type="string" calcext:value-type="string">
            <text:p>;</text:p>
          </table:table-cell>
          <table:table-cell table:formula="of:=[.B53]"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.78" calcext:value-type="float">
            <text:p>18,78</text:p>
          </table:table-cell>
          <table:table-cell table:formula="of:=[.S53]*1000" office:value-type="float" office:value="18780" calcext:value-type="float">
            <text:p>18780</text:p>
          </table:table-cell>
        </table:table-row>
        <table:table-row table:style-name="ro1">
          <table:table-cell table:style-name="ce2"/>
          <table:table-cell table:style-name="Default" office:value-type="float" office:value="12" calcext:value-type="float">
            <text:p>12</text:p>
          </table:table-cell>
          <table:table-cell table:style-name="ce2" office:value-type="float" office:value="17930" calcext:value-type="float">
            <text:p>17930</text:p>
          </table:table-cell>
          <table:table-cell table:formula="of:=[.$G$2]/([.C54]+[.$H$2]+[.$I$2])" office:value-type="float" office:value="0.000116004147943311" calcext:value-type="float">
            <text:p>0,000116004147943311</text:p>
          </table:table-cell>
          <table:table-cell table:formula="of:=ROUND([.$H$2]*[.D54];5)" office:value-type="float" office:value="1.16004" calcext:value-type="float">
            <text:p>1,1600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54]" office:value-type="float" office:value="1.16004" calcext:value-type="float">
            <text:p>1,16004</text:p>
          </table:table-cell>
          <table:table-cell office:value-type="string" calcext:value-type="string">
            <text:p>;</text:p>
          </table:table-cell>
          <table:table-cell table:formula="of:=[.B54]"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.93" calcext:value-type="float">
            <text:p>17,93</text:p>
          </table:table-cell>
          <table:table-cell table:formula="of:=[.S54]*1000" office:value-type="float" office:value="17930" calcext:value-type="float">
            <text:p>17930</text:p>
          </table:table-cell>
        </table:table-row>
        <table:table-row table:style-name="ro1">
          <table:table-cell table:style-name="ce2"/>
          <table:table-cell table:style-name="Default" office:value-type="float" office:value="13" calcext:value-type="float">
            <text:p>13</text:p>
          </table:table-cell>
          <table:table-cell table:style-name="ce2" office:value-type="float" office:value="17120" calcext:value-type="float">
            <text:p>17120</text:p>
          </table:table-cell>
          <table:table-cell table:formula="of:=[.$G$2]/([.C55]+[.$H$2]+[.$I$2])" office:value-type="float" office:value="0.000119345661450925" calcext:value-type="float">
            <text:p>0,000119345661450925</text:p>
          </table:table-cell>
          <table:table-cell table:formula="of:=ROUND([.$H$2]*[.D55];5)" office:value-type="float" office:value="1.19346" calcext:value-type="float">
            <text:p>1,1934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55]" office:value-type="float" office:value="1.19346" calcext:value-type="float">
            <text:p>1,19346</text:p>
          </table:table-cell>
          <table:table-cell office:value-type="string" calcext:value-type="string">
            <text:p>;</text:p>
          </table:table-cell>
          <table:table-cell table:formula="of:=[.B55]"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.12" calcext:value-type="float">
            <text:p>17,12</text:p>
          </table:table-cell>
          <table:table-cell table:formula="of:=[.S55]*1000" office:value-type="float" office:value="17120" calcext:value-type="float">
            <text:p>17120</text:p>
          </table:table-cell>
        </table:table-row>
        <table:table-row table:style-name="ro1">
          <table:table-cell table:style-name="ce2"/>
          <table:table-cell table:style-name="Default" office:value-type="float" office:value="14" calcext:value-type="float">
            <text:p>14</text:p>
          </table:table-cell>
          <table:table-cell table:style-name="ce2" office:value-type="float" office:value="16350" calcext:value-type="float">
            <text:p>16350</text:p>
          </table:table-cell>
          <table:table-cell table:formula="of:=[.$G$2]/([.C56]+[.$H$2]+[.$I$2])" office:value-type="float" office:value="0.000122705667276051" calcext:value-type="float">
            <text:p>0,000122705667276051</text:p>
          </table:table-cell>
          <table:table-cell table:formula="of:=ROUND([.$H$2]*[.D56];5)" office:value-type="float" office:value="1.22706" calcext:value-type="float">
            <text:p>1,2270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56]" office:value-type="float" office:value="1.22706" calcext:value-type="float">
            <text:p>1,22706</text:p>
          </table:table-cell>
          <table:table-cell office:value-type="string" calcext:value-type="string">
            <text:p>;</text:p>
          </table:table-cell>
          <table:table-cell table:formula="of:=[.B56]"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.35" calcext:value-type="float">
            <text:p>16,35</text:p>
          </table:table-cell>
          <table:table-cell table:formula="of:=[.S56]*1000" office:value-type="float" office:value="16350" calcext:value-type="float">
            <text:p>16350</text:p>
          </table:table-cell>
        </table:table-row>
        <table:table-row table:style-name="ro1">
          <table:table-cell table:style-name="ce2"/>
          <table:table-cell table:style-name="Default" office:value-type="float" office:value="15" calcext:value-type="float">
            <text:p>15</text:p>
          </table:table-cell>
          <table:table-cell table:style-name="ce2" office:value-type="float" office:value="15620" calcext:value-type="float">
            <text:p>15620</text:p>
          </table:table-cell>
          <table:table-cell table:formula="of:=[.$G$2]/([.C57]+[.$H$2]+[.$I$2])" office:value-type="float" office:value="0.000126070623591285" calcext:value-type="float">
            <text:p>0,000126070623591285</text:p>
          </table:table-cell>
          <table:table-cell table:formula="of:=ROUND([.$H$2]*[.D57];5)" office:value-type="float" office:value="1.26071" calcext:value-type="float">
            <text:p>1,2607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57]" office:value-type="float" office:value="1.26071" calcext:value-type="float">
            <text:p>1,26071</text:p>
          </table:table-cell>
          <table:table-cell office:value-type="string" calcext:value-type="string">
            <text:p>;</text:p>
          </table:table-cell>
          <table:table-cell table:formula="of:=[.B57]" office:value-type="float" office:value="15" calcext:value-type="float">
            <text:p>1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62" calcext:value-type="float">
            <text:p>15,62</text:p>
          </table:table-cell>
          <table:table-cell table:formula="of:=[.S57]*1000" office:value-type="float" office:value="15620" calcext:value-type="float">
            <text:p>15620</text:p>
          </table:table-cell>
        </table:table-row>
        <table:table-row table:style-name="ro1">
          <table:table-cell table:style-name="ce2"/>
          <table:table-cell table:style-name="Default" office:value-type="float" office:value="16" calcext:value-type="float">
            <text:p>16</text:p>
          </table:table-cell>
          <table:table-cell table:style-name="ce2" office:value-type="float" office:value="14930" calcext:value-type="float">
            <text:p>14930</text:p>
          </table:table-cell>
          <table:table-cell table:formula="of:=[.$G$2]/([.C58]+[.$H$2]+[.$I$2])" office:value-type="float" office:value="0.000129425376012341" calcext:value-type="float">
            <text:p>0,000129425376012341</text:p>
          </table:table-cell>
          <table:table-cell table:formula="of:=ROUND([.$H$2]*[.D58];5)" office:value-type="float" office:value="1.29425" calcext:value-type="float">
            <text:p>1,2942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58]" office:value-type="float" office:value="1.29425" calcext:value-type="float">
            <text:p>1,29425</text:p>
          </table:table-cell>
          <table:table-cell office:value-type="string" calcext:value-type="string">
            <text:p>;</text:p>
          </table:table-cell>
          <table:table-cell table:formula="of:=[.B58]" office:value-type="float" office:value="16" calcext:value-type="float">
            <text:p>1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.93" calcext:value-type="float">
            <text:p>14,93</text:p>
          </table:table-cell>
          <table:table-cell table:formula="of:=[.S58]*1000" office:value-type="float" office:value="14930" calcext:value-type="float">
            <text:p>14930</text:p>
          </table:table-cell>
        </table:table-row>
        <table:table-row table:style-name="ro1">
          <table:table-cell table:style-name="ce2"/>
          <table:table-cell table:style-name="Default" office:value-type="float" office:value="17" calcext:value-type="float">
            <text:p>17</text:p>
          </table:table-cell>
          <table:table-cell table:style-name="ce2" office:value-type="float" office:value="14260" calcext:value-type="float">
            <text:p>14260</text:p>
          </table:table-cell>
          <table:table-cell table:formula="of:=[.$G$2]/([.C59]+[.$H$2]+[.$I$2])" office:value-type="float" office:value="0.000132858273950911" calcext:value-type="float">
            <text:p>0,000132858273950911</text:p>
          </table:table-cell>
          <table:table-cell table:formula="of:=ROUND([.$H$2]*[.D59];5)" office:value-type="float" office:value="1.32858" calcext:value-type="float">
            <text:p>1,3285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59]" office:value-type="float" office:value="1.32858" calcext:value-type="float">
            <text:p>1,32858</text:p>
          </table:table-cell>
          <table:table-cell office:value-type="string" calcext:value-type="string">
            <text:p>;</text:p>
          </table:table-cell>
          <table:table-cell table:formula="of:=[.B59]"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.26" calcext:value-type="float">
            <text:p>14,26</text:p>
          </table:table-cell>
          <table:table-cell table:formula="of:=[.S59]*1000" office:value-type="float" office:value="14260" calcext:value-type="float">
            <text:p>14260</text:p>
          </table:table-cell>
        </table:table-row>
        <table:table-row table:style-name="ro1">
          <table:table-cell table:style-name="ce2"/>
          <table:table-cell table:style-name="Default" office:value-type="float" office:value="18" calcext:value-type="float">
            <text:p>18</text:p>
          </table:table-cell>
          <table:table-cell table:style-name="ce2" office:value-type="float" office:value="13630" calcext:value-type="float">
            <text:p>13630</text:p>
          </table:table-cell>
          <table:table-cell table:formula="of:=[.$G$2]/([.C60]+[.$H$2]+[.$I$2])" office:value-type="float" office:value="0.000136256597645148" calcext:value-type="float">
            <text:p>0,000136256597645148</text:p>
          </table:table-cell>
          <table:table-cell table:formula="of:=ROUND([.$H$2]*[.D60];5)" office:value-type="float" office:value="1.36257" calcext:value-type="float">
            <text:p>1,3625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60]" office:value-type="float" office:value="1.36257" calcext:value-type="float">
            <text:p>1,36257</text:p>
          </table:table-cell>
          <table:table-cell office:value-type="string" calcext:value-type="string">
            <text:p>;</text:p>
          </table:table-cell>
          <table:table-cell table:formula="of:=[.B60]" office:value-type="float" office:value="18" calcext:value-type="float">
            <text:p>1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.63" calcext:value-type="float">
            <text:p>13,63</text:p>
          </table:table-cell>
          <table:table-cell table:formula="of:=[.S60]*1000" office:value-type="float" office:value="13630" calcext:value-type="float">
            <text:p>13630</text:p>
          </table:table-cell>
        </table:table-row>
        <table:table-row table:style-name="ro1">
          <table:table-cell table:style-name="ce2"/>
          <table:table-cell table:style-name="Default" office:value-type="float" office:value="19" calcext:value-type="float">
            <text:p>19</text:p>
          </table:table-cell>
          <table:table-cell table:style-name="ce2" office:value-type="float" office:value="13040" calcext:value-type="float">
            <text:p>13040</text:p>
          </table:table-cell>
          <table:table-cell table:formula="of:=[.$G$2]/([.C61]+[.$H$2]+[.$I$2])" office:value-type="float" office:value="0.000139600665557404" calcext:value-type="float">
            <text:p>0,000139600665557404</text:p>
          </table:table-cell>
          <table:table-cell table:formula="of:=ROUND([.$H$2]*[.D61];5)" office:value-type="float" office:value="1.39601" calcext:value-type="float">
            <text:p>1,3960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61]" office:value-type="float" office:value="1.39601" calcext:value-type="float">
            <text:p>1,39601</text:p>
          </table:table-cell>
          <table:table-cell office:value-type="string" calcext:value-type="string">
            <text:p>;</text:p>
          </table:table-cell>
          <table:table-cell table:formula="of:=[.B61]" office:value-type="float" office:value="19" calcext:value-type="float">
            <text:p>1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.04" calcext:value-type="float">
            <text:p>13,04</text:p>
          </table:table-cell>
          <table:table-cell table:formula="of:=[.S61]*1000" office:value-type="float" office:value="13040" calcext:value-type="float">
            <text:p>13040</text:p>
          </table:table-cell>
        </table:table-row>
        <table:table-row table:style-name="ro1">
          <table:table-cell table:style-name="ce2"/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12470" calcext:value-type="float">
            <text:p>12470</text:p>
          </table:table-cell>
          <table:table-cell table:formula="of:=[.$G$2]/([.C62]+[.$H$2]+[.$I$2])" office:value-type="float" office:value="0.000142991052407329" calcext:value-type="float">
            <text:p>0,000142991052407329</text:p>
          </table:table-cell>
          <table:table-cell table:formula="of:=ROUND([.$H$2]*[.D62];5)" office:value-type="float" office:value="1.42991" calcext:value-type="float">
            <text:p>1,4299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62]" office:value-type="float" office:value="1.42991" calcext:value-type="float">
            <text:p>1,42991</text:p>
          </table:table-cell>
          <table:table-cell office:value-type="string" calcext:value-type="string">
            <text:p>;</text:p>
          </table:table-cell>
          <table:table-cell table:formula="of:=[.B62]"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.47" calcext:value-type="float">
            <text:p>12,47</text:p>
          </table:table-cell>
          <table:table-cell table:formula="of:=[.S62]*1000" office:value-type="float" office:value="12470" calcext:value-type="float">
            <text:p>12470</text:p>
          </table:table-cell>
        </table:table-row>
        <table:table-row table:style-name="ro1">
          <table:table-cell table:style-name="ce2"/>
          <table:table-cell table:style-name="Default" office:value-type="float" office:value="21" calcext:value-type="float">
            <text:p>21</text:p>
          </table:table-cell>
          <table:table-cell table:style-name="ce2" office:value-type="float" office:value="11920" calcext:value-type="float">
            <text:p>11920</text:p>
          </table:table-cell>
          <table:table-cell table:formula="of:=[.$G$2]/([.C63]+[.$H$2]+[.$I$2])" office:value-type="float" office:value="0.000146422338568935" calcext:value-type="float">
            <text:p>0,000146422338568935</text:p>
          </table:table-cell>
          <table:table-cell table:formula="of:=ROUND([.$H$2]*[.D63];5)" office:value-type="float" office:value="1.46422" calcext:value-type="float">
            <text:p>1,4642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63]" office:value-type="float" office:value="1.46422" calcext:value-type="float">
            <text:p>1,46422</text:p>
          </table:table-cell>
          <table:table-cell office:value-type="string" calcext:value-type="string">
            <text:p>;</text:p>
          </table:table-cell>
          <table:table-cell table:formula="of:=[.B63]" office:value-type="float" office:value="21" calcext:value-type="float">
            <text:p>2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.92" calcext:value-type="float">
            <text:p>11,92</text:p>
          </table:table-cell>
          <table:table-cell table:formula="of:=[.S63]*1000" office:value-type="float" office:value="11920" calcext:value-type="float">
            <text:p>11920</text:p>
          </table:table-cell>
        </table:table-row>
        <table:table-row table:style-name="ro1">
          <table:table-cell table:style-name="ce2"/>
          <table:table-cell table:style-name="Default" office:value-type="float" office:value="22" calcext:value-type="float">
            <text:p>22</text:p>
          </table:table-cell>
          <table:table-cell table:style-name="ce2" office:value-type="float" office:value="11410" calcext:value-type="float">
            <text:p>11410</text:p>
          </table:table-cell>
          <table:table-cell table:formula="of:=[.$G$2]/([.C64]+[.$H$2]+[.$I$2])" office:value-type="float" office:value="0.000149754573850959" calcext:value-type="float">
            <text:p>0,000149754573850959</text:p>
          </table:table-cell>
          <table:table-cell table:formula="of:=ROUND([.$H$2]*[.D64];5)" office:value-type="float" office:value="1.49755" calcext:value-type="float">
            <text:p>1,4975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64]" office:value-type="float" office:value="1.49755" calcext:value-type="float">
            <text:p>1,49755</text:p>
          </table:table-cell>
          <table:table-cell office:value-type="string" calcext:value-type="string">
            <text:p>;</text:p>
          </table:table-cell>
          <table:table-cell table:formula="of:=[.B64]" office:value-type="float" office:value="22" calcext:value-type="float">
            <text:p>2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.41" calcext:value-type="float">
            <text:p>11,41</text:p>
          </table:table-cell>
          <table:table-cell table:formula="of:=[.S64]*1000" office:value-type="float" office:value="11410" calcext:value-type="float">
            <text:p>11410</text:p>
          </table:table-cell>
        </table:table-row>
        <table:table-row table:style-name="ro1">
          <table:table-cell table:style-name="ce2"/>
          <table:table-cell table:style-name="Default" office:value-type="float" office:value="23" calcext:value-type="float">
            <text:p>23</text:p>
          </table:table-cell>
          <table:table-cell table:style-name="ce2" office:value-type="float" office:value="10910" calcext:value-type="float">
            <text:p>10910</text:p>
          </table:table-cell>
          <table:table-cell table:formula="of:=[.$G$2]/([.C65]+[.$H$2]+[.$I$2])" office:value-type="float" office:value="0.000153172067549064" calcext:value-type="float">
            <text:p>0,000153172067549064</text:p>
          </table:table-cell>
          <table:table-cell table:formula="of:=ROUND([.$H$2]*[.D65];5)" office:value-type="float" office:value="1.53172" calcext:value-type="float">
            <text:p>1,5317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65]" office:value-type="float" office:value="1.53172" calcext:value-type="float">
            <text:p>1,53172</text:p>
          </table:table-cell>
          <table:table-cell office:value-type="string" calcext:value-type="string">
            <text:p>;</text:p>
          </table:table-cell>
          <table:table-cell table:formula="of:=[.B65]" office:value-type="float" office:value="23" calcext:value-type="float">
            <text:p>2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.91" calcext:value-type="float">
            <text:p>10,91</text:p>
          </table:table-cell>
          <table:table-cell table:formula="of:=[.S65]*1000" office:value-type="float" office:value="10910" calcext:value-type="float">
            <text:p>10910</text:p>
          </table:table-cell>
        </table:table-row>
        <table:table-row table:style-name="ro1">
          <table:table-cell table:style-name="ce2"/>
          <table:table-cell table:style-name="Default" office:value-type="float" office:value="24" calcext:value-type="float">
            <text:p>24</text:p>
          </table:table-cell>
          <table:table-cell table:style-name="ce2" office:value-type="float" office:value="10450" calcext:value-type="float">
            <text:p>10450</text:p>
          </table:table-cell>
          <table:table-cell table:formula="of:=[.$G$2]/([.C66]+[.$H$2]+[.$I$2])" office:value-type="float" office:value="0.000156456876456876" calcext:value-type="float">
            <text:p>0,000156456876456876</text:p>
          </table:table-cell>
          <table:table-cell table:formula="of:=ROUND([.$H$2]*[.D66];5)" office:value-type="float" office:value="1.56457" calcext:value-type="float">
            <text:p>1,5645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66]" office:value-type="float" office:value="1.56457" calcext:value-type="float">
            <text:p>1,56457</text:p>
          </table:table-cell>
          <table:table-cell office:value-type="string" calcext:value-type="string">
            <text:p>;</text:p>
          </table:table-cell>
          <table:table-cell table:formula="of:=[.B66]" office:value-type="float" office:value="24" calcext:value-type="float">
            <text:p>2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0.45" calcext:value-type="float">
            <text:p>10,45</text:p>
          </table:table-cell>
          <table:table-cell table:formula="of:=[.S66]*1000" office:value-type="float" office:value="10450" calcext:value-type="float">
            <text:p>10450</text:p>
          </table:table-cell>
        </table:table-row>
        <table:table-row table:style-name="ro1">
          <table:table-cell table:style-name="ce2"/>
          <table:table-cell table:style-name="ce11" office:value-type="float" office:value="25" calcext:value-type="float">
            <text:p>2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5" table:formula="of:=[.$G$2]/([.C67]+[.$H$2]+[.$I$2])" office:value-type="float" office:value="0.000159809523809524" calcext:value-type="float">
            <text:p>0,000159809523809524</text:p>
          </table:table-cell>
          <table:table-cell table:style-name="ce5" table:formula="of:=ROUND([.$H$2]*[.D67];5)" office:value-type="float" office:value="1.5981" calcext:value-type="float">
            <text:p>1,598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67]" office:value-type="float" office:value="1.5981" calcext:value-type="float">
            <text:p>1,5981</text:p>
          </table:table-cell>
          <table:table-cell office:value-type="string" calcext:value-type="string">
            <text:p>;</text:p>
          </table:table-cell>
          <table:table-cell table:formula="of:=[.B67]" office:value-type="float" office:value="25" calcext:value-type="float">
            <text:p>2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S67]*1000" office:value-type="float" office:value="10000" calcext:value-type="float">
            <text:p>10000</text:p>
          </table:table-cell>
        </table:table-row>
        <table:table-row table:style-name="ro1">
          <table:table-cell table:style-name="ce2"/>
          <table:table-cell table:style-name="Default" office:value-type="float" office:value="26" calcext:value-type="float">
            <text:p>26</text:p>
          </table:table-cell>
          <table:table-cell table:style-name="ce2" office:value-type="float" office:value="9575" calcext:value-type="float">
            <text:p>9575</text:p>
          </table:table-cell>
          <table:table-cell table:formula="of:=[.$G$2]/([.C68]+[.$H$2]+[.$I$2])" office:value-type="float" office:value="0.000163110571081409" calcext:value-type="float">
            <text:p>0,000163110571081409</text:p>
          </table:table-cell>
          <table:table-cell table:formula="of:=ROUND([.$H$2]*[.D68];5)" office:value-type="float" office:value="1.63111" calcext:value-type="float">
            <text:p>1,6311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68]" office:value-type="float" office:value="1.63111" calcext:value-type="float">
            <text:p>1,63111</text:p>
          </table:table-cell>
          <table:table-cell office:value-type="string" calcext:value-type="string">
            <text:p>;</text:p>
          </table:table-cell>
          <table:table-cell table:formula="of:=[.B68]" office:value-type="float" office:value="26" calcext:value-type="float">
            <text:p>2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9.575" calcext:value-type="float">
            <text:p>9,575</text:p>
          </table:table-cell>
          <table:table-cell table:formula="of:=[.S68]*1000" office:value-type="float" office:value="9575" calcext:value-type="float">
            <text:p>9575</text:p>
          </table:table-cell>
        </table:table-row>
        <table:table-row table:style-name="ro1">
          <table:table-cell table:style-name="ce2"/>
          <table:table-cell table:style-name="Default" office:value-type="float" office:value="27" calcext:value-type="float">
            <text:p>27</text:p>
          </table:table-cell>
          <table:table-cell table:style-name="ce2" office:value-type="float" office:value="9170" calcext:value-type="float">
            <text:p>9170</text:p>
          </table:table-cell>
          <table:table-cell table:formula="of:=[.$G$2]/([.C69]+[.$H$2]+[.$I$2])" office:value-type="float" office:value="0.000166385721368369" calcext:value-type="float">
            <text:p>0,000166385721368369</text:p>
          </table:table-cell>
          <table:table-cell table:formula="of:=ROUND([.$H$2]*[.D69];5)" office:value-type="float" office:value="1.66386" calcext:value-type="float">
            <text:p>1,6638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69]" office:value-type="float" office:value="1.66386" calcext:value-type="float">
            <text:p>1,66386</text:p>
          </table:table-cell>
          <table:table-cell office:value-type="string" calcext:value-type="string">
            <text:p>;</text:p>
          </table:table-cell>
          <table:table-cell table:formula="of:=[.B69]" office:value-type="float" office:value="27" calcext:value-type="float">
            <text:p>2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9.17" calcext:value-type="float">
            <text:p>9,17</text:p>
          </table:table-cell>
          <table:table-cell table:formula="of:=[.S69]*1000" office:value-type="float" office:value="9170" calcext:value-type="float">
            <text:p>9170</text:p>
          </table:table-cell>
        </table:table-row>
        <table:table-row table:style-name="ro1">
          <table:table-cell table:style-name="ce2"/>
          <table:table-cell table:style-name="Default" office:value-type="float" office:value="28" calcext:value-type="float">
            <text:p>28</text:p>
          </table:table-cell>
          <table:table-cell table:style-name="ce2" office:value-type="float" office:value="8784" calcext:value-type="float">
            <text:p>8784</text:p>
          </table:table-cell>
          <table:table-cell table:formula="of:=[.$G$2]/([.C70]+[.$H$2]+[.$I$2])" office:value-type="float" office:value="0.000169632025879499" calcext:value-type="float">
            <text:p>0,000169632025879499</text:p>
          </table:table-cell>
          <table:table-cell table:formula="of:=ROUND([.$H$2]*[.D70];5)" office:value-type="float" office:value="1.69632" calcext:value-type="float">
            <text:p>1,6963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70]" office:value-type="float" office:value="1.69632" calcext:value-type="float">
            <text:p>1,69632</text:p>
          </table:table-cell>
          <table:table-cell office:value-type="string" calcext:value-type="string">
            <text:p>;</text:p>
          </table:table-cell>
          <table:table-cell table:formula="of:=[.B70]" office:value-type="float" office:value="28" calcext:value-type="float">
            <text:p>2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8.784" calcext:value-type="float">
            <text:p>8,784</text:p>
          </table:table-cell>
          <table:table-cell table:formula="of:=[.S70]*1000" office:value-type="float" office:value="8784" calcext:value-type="float">
            <text:p>8784</text:p>
          </table:table-cell>
        </table:table-row>
        <table:table-row table:style-name="ro1">
          <table:table-cell table:style-name="ce2"/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8416" calcext:value-type="float">
            <text:p>8416</text:p>
          </table:table-cell>
          <table:table-cell table:formula="of:=[.$G$2]/([.C71]+[.$H$2]+[.$I$2])" office:value-type="float" office:value="0.000172847136382365" calcext:value-type="float">
            <text:p>0,000172847136382365</text:p>
          </table:table-cell>
          <table:table-cell table:formula="of:=ROUND([.$H$2]*[.D71];5)" office:value-type="float" office:value="1.72847" calcext:value-type="float">
            <text:p>1,7284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71]" office:value-type="float" office:value="1.72847" calcext:value-type="float">
            <text:p>1,72847</text:p>
          </table:table-cell>
          <table:table-cell office:value-type="string" calcext:value-type="string">
            <text:p>;</text:p>
          </table:table-cell>
          <table:table-cell table:formula="of:=[.B71]" office:value-type="float" office:value="29" calcext:value-type="float">
            <text:p>2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.416" calcext:value-type="float">
            <text:p>8,416</text:p>
          </table:table-cell>
          <table:table-cell table:formula="of:=[.S71]*1000" office:value-type="float" office:value="8416" calcext:value-type="float">
            <text:p>8416</text:p>
          </table:table-cell>
        </table:table-row>
        <table:table-row table:style-name="ro1">
          <table:table-cell table:style-name="ce2"/>
          <table:table-cell table:style-name="Default" office:value-type="float" office:value="30" calcext:value-type="float">
            <text:p>30</text:p>
          </table:table-cell>
          <table:table-cell table:style-name="ce2" office:value-type="float" office:value="8064" calcext:value-type="float">
            <text:p>8064</text:p>
          </table:table-cell>
          <table:table-cell table:formula="of:=[.$G$2]/([.C72]+[.$H$2]+[.$I$2])" office:value-type="float" office:value="0.000176038606798154" calcext:value-type="float">
            <text:p>0,000176038606798154</text:p>
          </table:table-cell>
          <table:table-cell table:formula="of:=ROUND([.$H$2]*[.D72];5)" office:value-type="float" office:value="1.76039" calcext:value-type="float">
            <text:p>1,76039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72]" office:value-type="float" office:value="1.76039" calcext:value-type="float">
            <text:p>1,76039</text:p>
          </table:table-cell>
          <table:table-cell office:value-type="string" calcext:value-type="string">
            <text:p>;</text:p>
          </table:table-cell>
          <table:table-cell table:formula="of:=[.B72]" office:value-type="float" office:value="30" calcext:value-type="float">
            <text:p>3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.064" calcext:value-type="float">
            <text:p>8,064</text:p>
          </table:table-cell>
          <table:table-cell table:formula="of:=[.S72]*1000" office:value-type="float" office:value="8064" calcext:value-type="float">
            <text:p>8064</text:p>
          </table:table-cell>
        </table:table-row>
        <table:table-row table:style-name="ro1">
          <table:table-cell table:style-name="ce2"/>
          <table:table-cell table:style-name="Default" office:value-type="float" office:value="31" calcext:value-type="float">
            <text:p>31</text:p>
          </table:table-cell>
          <table:table-cell table:style-name="ce2" office:value-type="float" office:value="7730" calcext:value-type="float">
            <text:p>7730</text:p>
          </table:table-cell>
          <table:table-cell table:formula="of:=[.$G$2]/([.C73]+[.$H$2]+[.$I$2])" office:value-type="float" office:value="0.000179177789642285" calcext:value-type="float">
            <text:p>0,000179177789642285</text:p>
          </table:table-cell>
          <table:table-cell table:formula="of:=ROUND([.$H$2]*[.D73];5)" office:value-type="float" office:value="1.79178" calcext:value-type="float">
            <text:p>1,7917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73]" office:value-type="float" office:value="1.79178" calcext:value-type="float">
            <text:p>1,79178</text:p>
          </table:table-cell>
          <table:table-cell office:value-type="string" calcext:value-type="string">
            <text:p>;</text:p>
          </table:table-cell>
          <table:table-cell table:formula="of:=[.B73]" office:value-type="float" office:value="31" calcext:value-type="float">
            <text:p>3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7.73" calcext:value-type="float">
            <text:p>7,73</text:p>
          </table:table-cell>
          <table:table-cell table:formula="of:=[.S73]*1000" office:value-type="float" office:value="7730" calcext:value-type="float">
            <text:p>7730</text:p>
          </table:table-cell>
        </table:table-row>
        <table:table-row table:style-name="ro1">
          <table:table-cell table:style-name="ce2"/>
          <table:table-cell table:style-name="Default" office:value-type="float" office:value="32" calcext:value-type="float">
            <text:p>32</text:p>
          </table:table-cell>
          <table:table-cell table:style-name="ce2" office:value-type="float" office:value="7410" calcext:value-type="float">
            <text:p>7410</text:p>
          </table:table-cell>
          <table:table-cell table:formula="of:=[.$G$2]/([.C74]+[.$H$2]+[.$I$2])" office:value-type="float" office:value="0.000182292232482347" calcext:value-type="float">
            <text:p>0,000182292232482347</text:p>
          </table:table-cell>
          <table:table-cell table:formula="of:=ROUND([.$H$2]*[.D74];5)" office:value-type="float" office:value="1.82292" calcext:value-type="float">
            <text:p>1,8229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74]" office:value-type="float" office:value="1.82292" calcext:value-type="float">
            <text:p>1,82292</text:p>
          </table:table-cell>
          <table:table-cell office:value-type="string" calcext:value-type="string">
            <text:p>;</text:p>
          </table:table-cell>
          <table:table-cell table:formula="of:=[.B74]" office:value-type="float" office:value="32" calcext:value-type="float">
            <text:p>3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7.41" calcext:value-type="float">
            <text:p>7,41</text:p>
          </table:table-cell>
          <table:table-cell table:formula="of:=[.S74]*1000" office:value-type="float" office:value="7410" calcext:value-type="float">
            <text:p>7410</text:p>
          </table:table-cell>
        </table:table-row>
        <table:table-row table:style-name="ro1">
          <table:table-cell table:style-name="ce2"/>
          <table:table-cell table:style-name="Default" office:value-type="float" office:value="33" calcext:value-type="float">
            <text:p>33</text:p>
          </table:table-cell>
          <table:table-cell table:style-name="ce2" office:value-type="float" office:value="7106" calcext:value-type="float">
            <text:p>7106</text:p>
          </table:table-cell>
          <table:table-cell table:formula="of:=[.$G$2]/([.C75]+[.$H$2]+[.$I$2])" office:value-type="float" office:value="0.00018535292168342" calcext:value-type="float">
            <text:p>0,00018535292168342</text:p>
          </table:table-cell>
          <table:table-cell table:formula="of:=ROUND([.$H$2]*[.D75];5)" office:value-type="float" office:value="1.85353" calcext:value-type="float">
            <text:p>1,8535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75]" office:value-type="float" office:value="1.85353" calcext:value-type="float">
            <text:p>1,85353</text:p>
          </table:table-cell>
          <table:table-cell office:value-type="string" calcext:value-type="string">
            <text:p>;</text:p>
          </table:table-cell>
          <table:table-cell table:formula="of:=[.B75]" office:value-type="float" office:value="33" calcext:value-type="float">
            <text:p>3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.106" calcext:value-type="float">
            <text:p>7,106</text:p>
          </table:table-cell>
          <table:table-cell table:formula="of:=[.S75]*1000" office:value-type="float" office:value="7106" calcext:value-type="float">
            <text:p>7106</text:p>
          </table:table-cell>
        </table:table-row>
        <table:table-row table:style-name="ro1">
          <table:table-cell table:style-name="ce2"/>
          <table:table-cell table:style-name="Default" office:value-type="float" office:value="34" calcext:value-type="float">
            <text:p>34</text:p>
          </table:table-cell>
          <table:table-cell table:style-name="ce2" office:value-type="float" office:value="6815" calcext:value-type="float">
            <text:p>6815</text:p>
          </table:table-cell>
          <table:table-cell table:formula="of:=[.$G$2]/([.C76]+[.$H$2]+[.$I$2])" office:value-type="float" office:value="0.000188380578164468" calcext:value-type="float">
            <text:p>0,000188380578164468</text:p>
          </table:table-cell>
          <table:table-cell table:formula="of:=ROUND([.$H$2]*[.D76];5)" office:value-type="float" office:value="1.88381" calcext:value-type="float">
            <text:p>1,8838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76]" office:value-type="float" office:value="1.88381" calcext:value-type="float">
            <text:p>1,88381</text:p>
          </table:table-cell>
          <table:table-cell office:value-type="string" calcext:value-type="string">
            <text:p>;</text:p>
          </table:table-cell>
          <table:table-cell table:formula="of:=[.B76]"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.815" calcext:value-type="float">
            <text:p>6,815</text:p>
          </table:table-cell>
          <table:table-cell table:formula="of:=[.S76]*1000" office:value-type="float" office:value="6815" calcext:value-type="float">
            <text:p>6815</text:p>
          </table:table-cell>
        </table:table-row>
        <table:table-row table:style-name="ro1">
          <table:table-cell table:style-name="ce2"/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6538" calcext:value-type="float">
            <text:p>6538</text:p>
          </table:table-cell>
          <table:table-cell table:formula="of:=[.$G$2]/([.C77]+[.$H$2]+[.$I$2])" office:value-type="float" office:value="0.0001913559128749" calcext:value-type="float">
            <text:p>0,0001913559128749</text:p>
          </table:table-cell>
          <table:table-cell table:formula="of:=ROUND([.$H$2]*[.D77];5)" office:value-type="float" office:value="1.91356" calcext:value-type="float">
            <text:p>1,9135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77]" office:value-type="float" office:value="1.91356" calcext:value-type="float">
            <text:p>1,91356</text:p>
          </table:table-cell>
          <table:table-cell office:value-type="string" calcext:value-type="string">
            <text:p>;</text:p>
          </table:table-cell>
          <table:table-cell table:formula="of:=[.B77]" office:value-type="float" office:value="35" calcext:value-type="float">
            <text:p>3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.538" calcext:value-type="float">
            <text:p>6,538</text:p>
          </table:table-cell>
          <table:table-cell table:formula="of:=[.S77]*1000" office:value-type="float" office:value="6538" calcext:value-type="float">
            <text:p>6538</text:p>
          </table:table-cell>
        </table:table-row>
        <table:table-row table:style-name="ro1">
          <table:table-cell table:style-name="ce2"/>
          <table:table-cell table:style-name="Default" office:value-type="float" office:value="36" calcext:value-type="float">
            <text:p>36</text:p>
          </table:table-cell>
          <table:table-cell table:style-name="ce2" office:value-type="float" office:value="6273" calcext:value-type="float">
            <text:p>6273</text:p>
          </table:table-cell>
          <table:table-cell table:formula="of:=[.$G$2]/([.C78]+[.$H$2]+[.$I$2])" office:value-type="float" office:value="0.000194291669078909" calcext:value-type="float">
            <text:p>0,000194291669078909</text:p>
          </table:table-cell>
          <table:table-cell table:formula="of:=ROUND([.$H$2]*[.D78];5)" office:value-type="float" office:value="1.94292" calcext:value-type="float">
            <text:p>1,9429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78]" office:value-type="float" office:value="1.94292" calcext:value-type="float">
            <text:p>1,94292</text:p>
          </table:table-cell>
          <table:table-cell office:value-type="string" calcext:value-type="string">
            <text:p>;</text:p>
          </table:table-cell>
          <table:table-cell table:formula="of:=[.B78]"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.273" calcext:value-type="float">
            <text:p>6,273</text:p>
          </table:table-cell>
          <table:table-cell table:formula="of:=[.S78]*1000" office:value-type="float" office:value="6273" calcext:value-type="float">
            <text:p>6273</text:p>
          </table:table-cell>
        </table:table-row>
        <table:table-row table:style-name="ro1">
          <table:table-cell table:style-name="ce2"/>
          <table:table-cell table:style-name="Default" office:value-type="float" office:value="37" calcext:value-type="float">
            <text:p>37</text:p>
          </table:table-cell>
          <table:table-cell table:style-name="ce2" office:value-type="float" office:value="6020" calcext:value-type="float">
            <text:p>6020</text:p>
          </table:table-cell>
          <table:table-cell table:formula="of:=[.$G$2]/([.C79]+[.$H$2]+[.$I$2])" office:value-type="float" office:value="0.000197179788484136" calcext:value-type="float">
            <text:p>0,000197179788484136</text:p>
          </table:table-cell>
          <table:table-cell table:formula="of:=ROUND([.$H$2]*[.D79];5)" office:value-type="float" office:value="1.9718" calcext:value-type="float">
            <text:p>1,971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79]" office:value-type="float" office:value="1.9718" calcext:value-type="float">
            <text:p>1,9718</text:p>
          </table:table-cell>
          <table:table-cell office:value-type="string" calcext:value-type="string">
            <text:p>;</text:p>
          </table:table-cell>
          <table:table-cell table:formula="of:=[.B79]" office:value-type="float" office:value="37" calcext:value-type="float">
            <text:p>3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.02" calcext:value-type="float">
            <text:p>6,02</text:p>
          </table:table-cell>
          <table:table-cell table:formula="of:=[.S79]*1000" office:value-type="float" office:value="6020" calcext:value-type="float">
            <text:p>6020</text:p>
          </table:table-cell>
        </table:table-row>
        <table:table-row table:style-name="ro1">
          <table:table-cell table:style-name="ce2"/>
          <table:table-cell table:style-name="Default" office:value-type="float" office:value="38" calcext:value-type="float">
            <text:p>38</text:p>
          </table:table-cell>
          <table:table-cell table:style-name="ce2" office:value-type="float" office:value="5778" calcext:value-type="float">
            <text:p>5778</text:p>
          </table:table-cell>
          <table:table-cell table:formula="of:=[.$G$2]/([.C80]+[.$H$2]+[.$I$2])" office:value-type="float" office:value="0.000200023840743831" calcext:value-type="float">
            <text:p>0,000200023840743831</text:p>
          </table:table-cell>
          <table:table-cell table:formula="of:=ROUND([.$H$2]*[.D80];5)" office:value-type="float" office:value="2.00024" calcext:value-type="float">
            <text:p>2,0002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80]" office:value-type="float" office:value="2.00024" calcext:value-type="float">
            <text:p>2,00024</text:p>
          </table:table-cell>
          <table:table-cell office:value-type="string" calcext:value-type="string">
            <text:p>;</text:p>
          </table:table-cell>
          <table:table-cell table:formula="of:=[.B80]"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.778" calcext:value-type="float">
            <text:p>5,778</text:p>
          </table:table-cell>
          <table:table-cell table:formula="of:=[.S80]*1000" office:value-type="float" office:value="5778" calcext:value-type="float">
            <text:p>5778</text:p>
          </table:table-cell>
        </table:table-row>
        <table:table-row table:style-name="ro1">
          <table:table-cell table:style-name="ce2"/>
          <table:table-cell table:style-name="Default" office:value-type="float" office:value="39" calcext:value-type="float">
            <text:p>39</text:p>
          </table:table-cell>
          <table:table-cell table:style-name="ce2" office:value-type="float" office:value="5548" calcext:value-type="float">
            <text:p>5548</text:p>
          </table:table-cell>
          <table:table-cell table:formula="of:=[.$G$2]/([.C81]+[.$H$2]+[.$I$2])" office:value-type="float" office:value="0.000202803964225284" calcext:value-type="float">
            <text:p>0,000202803964225284</text:p>
          </table:table-cell>
          <table:table-cell table:formula="of:=ROUND([.$H$2]*[.D81];5)" office:value-type="float" office:value="2.02804" calcext:value-type="float">
            <text:p>2,0280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81]" office:value-type="float" office:value="2.02804" calcext:value-type="float">
            <text:p>2,02804</text:p>
          </table:table-cell>
          <table:table-cell office:value-type="string" calcext:value-type="string">
            <text:p>;</text:p>
          </table:table-cell>
          <table:table-cell table:formula="of:=[.B81]" office:value-type="float" office:value="39" calcext:value-type="float">
            <text:p>3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.548" calcext:value-type="float">
            <text:p>5,548</text:p>
          </table:table-cell>
          <table:table-cell table:formula="of:=[.S81]*1000" office:value-type="float" office:value="5548" calcext:value-type="float">
            <text:p>5548</text:p>
          </table:table-cell>
        </table:table-row>
        <table:table-row table:style-name="ro1">
          <table:table-cell table:style-name="ce2"/>
          <table:table-cell table:style-name="Default" office:value-type="float" office:value="40" calcext:value-type="float">
            <text:p>40</text:p>
          </table:table-cell>
          <table:table-cell table:style-name="ce2" office:value-type="float" office:value="5327" calcext:value-type="float">
            <text:p>5327</text:p>
          </table:table-cell>
          <table:table-cell table:formula="of:=[.$G$2]/([.C82]+[.$H$2]+[.$I$2])" office:value-type="float" office:value="0.000205549090463649" calcext:value-type="float">
            <text:p>0,000205549090463649</text:p>
          </table:table-cell>
          <table:table-cell table:formula="of:=ROUND([.$H$2]*[.D82];5)" office:value-type="float" office:value="2.05549" calcext:value-type="float">
            <text:p>2,05549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82]" office:value-type="float" office:value="2.05549" calcext:value-type="float">
            <text:p>2,05549</text:p>
          </table:table-cell>
          <table:table-cell office:value-type="string" calcext:value-type="string">
            <text:p>;</text:p>
          </table:table-cell>
          <table:table-cell table:formula="of:=[.B82]" office:value-type="float" office:value="40" calcext:value-type="float">
            <text:p>4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.327" calcext:value-type="float">
            <text:p>5,327</text:p>
          </table:table-cell>
          <table:table-cell table:formula="of:=[.S82]*1000" office:value-type="float" office:value="5327" calcext:value-type="float">
            <text:p>5327</text:p>
          </table:table-cell>
        </table:table-row>
        <table:table-row table:style-name="ro1">
          <table:table-cell table:style-name="ce2"/>
          <table:table-cell table:style-name="Default" office:value-type="float" office:value="41" calcext:value-type="float">
            <text:p>41</text:p>
          </table:table-cell>
          <table:table-cell table:style-name="ce2" office:value-type="float" office:value="5117" calcext:value-type="float">
            <text:p>5117</text:p>
          </table:table-cell>
          <table:table-cell table:formula="of:=[.$G$2]/([.C83]+[.$H$2]+[.$I$2])" office:value-type="float" office:value="0.000208227337593845" calcext:value-type="float">
            <text:p>0,000208227337593845</text:p>
          </table:table-cell>
          <table:table-cell table:formula="of:=ROUND([.$H$2]*[.D83];5)" office:value-type="float" office:value="2.08227" calcext:value-type="float">
            <text:p>2,0822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83]" office:value-type="float" office:value="2.08227" calcext:value-type="float">
            <text:p>2,08227</text:p>
          </table:table-cell>
          <table:table-cell office:value-type="string" calcext:value-type="string">
            <text:p>;</text:p>
          </table:table-cell>
          <table:table-cell table:formula="of:=[.B83]"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.117" calcext:value-type="float">
            <text:p>5,117</text:p>
          </table:table-cell>
          <table:table-cell table:formula="of:=[.S83]*1000" office:value-type="float" office:value="5117" calcext:value-type="float">
            <text:p>5117</text:p>
          </table:table-cell>
        </table:table-row>
        <table:table-row table:style-name="ro1">
          <table:table-cell table:style-name="ce2"/>
          <table:table-cell table:style-name="Default" office:value-type="float" office:value="42" calcext:value-type="float">
            <text:p>42</text:p>
          </table:table-cell>
          <table:table-cell table:style-name="ce2" office:value-type="float" office:value="4915" calcext:value-type="float">
            <text:p>4915</text:p>
          </table:table-cell>
          <table:table-cell table:formula="of:=[.$G$2]/([.C84]+[.$H$2]+[.$I$2])" office:value-type="float" office:value="0.000210870248193528" calcext:value-type="float">
            <text:p>0,000210870248193528</text:p>
          </table:table-cell>
          <table:table-cell table:formula="of:=ROUND([.$H$2]*[.D84];5)" office:value-type="float" office:value="2.1087" calcext:value-type="float">
            <text:p>2,108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84]" office:value-type="float" office:value="2.1087" calcext:value-type="float">
            <text:p>2,1087</text:p>
          </table:table-cell>
          <table:table-cell office:value-type="string" calcext:value-type="string">
            <text:p>;</text:p>
          </table:table-cell>
          <table:table-cell table:formula="of:=[.B84]" office:value-type="float" office:value="42" calcext:value-type="float">
            <text:p>4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.915" calcext:value-type="float">
            <text:p>4,915</text:p>
          </table:table-cell>
          <table:table-cell table:formula="of:=[.S84]*1000" office:value-type="float" office:value="4915" calcext:value-type="float">
            <text:p>4915</text:p>
          </table:table-cell>
        </table:table-row>
        <table:table-row table:style-name="ro1">
          <table:table-cell table:style-name="ce2"/>
          <table:table-cell table:style-name="Default" office:value-type="float" office:value="43" calcext:value-type="float">
            <text:p>43</text:p>
          </table:table-cell>
          <table:table-cell table:style-name="ce2" office:value-type="float" office:value="4723" calcext:value-type="float">
            <text:p>4723</text:p>
          </table:table-cell>
          <table:table-cell table:formula="of:=[.$G$2]/([.C85]+[.$H$2]+[.$I$2])" office:value-type="float" office:value="0.000213445271258666" calcext:value-type="float">
            <text:p>0,000213445271258666</text:p>
          </table:table-cell>
          <table:table-cell table:formula="of:=ROUND([.$H$2]*[.D85];5)" office:value-type="float" office:value="2.13445" calcext:value-type="float">
            <text:p>2,1344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85]" office:value-type="float" office:value="2.13445" calcext:value-type="float">
            <text:p>2,13445</text:p>
          </table:table-cell>
          <table:table-cell office:value-type="string" calcext:value-type="string">
            <text:p>;</text:p>
          </table:table-cell>
          <table:table-cell table:formula="of:=[.B85]" office:value-type="float" office:value="43" calcext:value-type="float">
            <text:p>4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.723" calcext:value-type="float">
            <text:p>4,723</text:p>
          </table:table-cell>
          <table:table-cell table:formula="of:=[.S85]*1000" office:value-type="float" office:value="4723" calcext:value-type="float">
            <text:p>4723</text:p>
          </table:table-cell>
        </table:table-row>
        <table:table-row table:style-name="ro1">
          <table:table-cell table:style-name="ce2"/>
          <table:table-cell table:style-name="Default" office:value-type="float" office:value="44" calcext:value-type="float">
            <text:p>44</text:p>
          </table:table-cell>
          <table:table-cell table:style-name="ce2" office:value-type="float" office:value="4539" calcext:value-type="float">
            <text:p>4539</text:p>
          </table:table-cell>
          <table:table-cell table:formula="of:=[.$G$2]/([.C86]+[.$H$2]+[.$I$2])" office:value-type="float" office:value="0.000215972713816848" calcext:value-type="float">
            <text:p>0,000215972713816848</text:p>
          </table:table-cell>
          <table:table-cell table:formula="of:=ROUND([.$H$2]*[.D86];5)" office:value-type="float" office:value="2.15973" calcext:value-type="float">
            <text:p>2,1597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86]" office:value-type="float" office:value="2.15973" calcext:value-type="float">
            <text:p>2,15973</text:p>
          </table:table-cell>
          <table:table-cell office:value-type="string" calcext:value-type="string">
            <text:p>;</text:p>
          </table:table-cell>
          <table:table-cell table:formula="of:=[.B86]" office:value-type="float" office:value="44" calcext:value-type="float">
            <text:p>4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.539" calcext:value-type="float">
            <text:p>4,539</text:p>
          </table:table-cell>
          <table:table-cell table:formula="of:=[.S86]*1000" office:value-type="float" office:value="4539" calcext:value-type="float">
            <text:p>4539</text:p>
          </table:table-cell>
        </table:table-row>
        <table:table-row table:style-name="ro1">
          <table:table-cell table:style-name="ce2"/>
          <table:table-cell table:style-name="Default" office:value-type="float" office:value="45" calcext:value-type="float">
            <text:p>45</text:p>
          </table:table-cell>
          <table:table-cell table:style-name="ce2" office:value-type="float" office:value="4363" calcext:value-type="float">
            <text:p>4363</text:p>
          </table:table-cell>
          <table:table-cell table:formula="of:=[.$G$2]/([.C87]+[.$H$2]+[.$I$2])" office:value-type="float" office:value="0.000218446917919677" calcext:value-type="float">
            <text:p>0,000218446917919677</text:p>
          </table:table-cell>
          <table:table-cell table:formula="of:=ROUND([.$H$2]*[.D87];5)" office:value-type="float" office:value="2.18447" calcext:value-type="float">
            <text:p>2,1844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87]" office:value-type="float" office:value="2.18447" calcext:value-type="float">
            <text:p>2,18447</text:p>
          </table:table-cell>
          <table:table-cell office:value-type="string" calcext:value-type="string">
            <text:p>;</text:p>
          </table:table-cell>
          <table:table-cell table:formula="of:=[.B87]" office:value-type="float" office:value="45" calcext:value-type="float">
            <text:p>4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.363" calcext:value-type="float">
            <text:p>4,363</text:p>
          </table:table-cell>
          <table:table-cell table:formula="of:=[.S87]*1000" office:value-type="float" office:value="4363" calcext:value-type="float">
            <text:p>4363</text:p>
          </table:table-cell>
        </table:table-row>
        <table:table-row table:style-name="ro1">
          <table:table-cell table:style-name="ce2"/>
          <table:table-cell table:style-name="Default" office:value-type="float" office:value="46" calcext:value-type="float">
            <text:p>46</text:p>
          </table:table-cell>
          <table:table-cell table:style-name="ce2" office:value-type="float" office:value="4195" calcext:value-type="float">
            <text:p>4195</text:p>
          </table:table-cell>
          <table:table-cell table:formula="of:=[.$G$2]/([.C88]+[.$H$2]+[.$I$2])" office:value-type="float" office:value="0.000220862125699243" calcext:value-type="float">
            <text:p>0,000220862125699243</text:p>
          </table:table-cell>
          <table:table-cell table:formula="of:=ROUND([.$H$2]*[.D88];5)" office:value-type="float" office:value="2.20862" calcext:value-type="float">
            <text:p>2,2086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88]" office:value-type="float" office:value="2.20862" calcext:value-type="float">
            <text:p>2,20862</text:p>
          </table:table-cell>
          <table:table-cell office:value-type="string" calcext:value-type="string">
            <text:p>;</text:p>
          </table:table-cell>
          <table:table-cell table:formula="of:=[.B88]" office:value-type="float" office:value="46" calcext:value-type="float">
            <text:p>4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.195" calcext:value-type="float">
            <text:p>4,195</text:p>
          </table:table-cell>
          <table:table-cell table:formula="of:=[.S88]*1000" office:value-type="float" office:value="4195" calcext:value-type="float">
            <text:p>4195</text:p>
          </table:table-cell>
        </table:table-row>
        <table:table-row table:style-name="ro1">
          <table:table-cell table:style-name="ce2"/>
          <table:table-cell table:style-name="Default" office:value-type="float" office:value="47" calcext:value-type="float">
            <text:p>47</text:p>
          </table:table-cell>
          <table:table-cell table:style-name="ce2" office:value-type="float" office:value="4034" calcext:value-type="float">
            <text:p>4034</text:p>
          </table:table-cell>
          <table:table-cell table:formula="of:=[.$G$2]/([.C89]+[.$H$2]+[.$I$2])" office:value-type="float" office:value="0.00022322735133697" calcext:value-type="float">
            <text:p>0,00022322735133697</text:p>
          </table:table-cell>
          <table:table-cell table:formula="of:=ROUND([.$H$2]*[.D89];5)" office:value-type="float" office:value="2.23227" calcext:value-type="float">
            <text:p>2,2322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89]" office:value-type="float" office:value="2.23227" calcext:value-type="float">
            <text:p>2,23227</text:p>
          </table:table-cell>
          <table:table-cell office:value-type="string" calcext:value-type="string">
            <text:p>;</text:p>
          </table:table-cell>
          <table:table-cell table:formula="of:=[.B89]" office:value-type="float" office:value="47" calcext:value-type="float">
            <text:p>4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.034" calcext:value-type="float">
            <text:p>4,034</text:p>
          </table:table-cell>
          <table:table-cell table:formula="of:=[.S89]*1000" office:value-type="float" office:value="4034" calcext:value-type="float">
            <text:p>4034</text:p>
          </table:table-cell>
        </table:table-row>
        <table:table-row table:style-name="ro1">
          <table:table-cell table:style-name="ce2"/>
          <table:table-cell table:style-name="Default" office:value-type="float" office:value="48" calcext:value-type="float">
            <text:p>48</text:p>
          </table:table-cell>
          <table:table-cell table:style-name="ce2" office:value-type="float" office:value="3880" calcext:value-type="float">
            <text:p>3880</text:p>
          </table:table-cell>
          <table:table-cell table:formula="of:=[.$G$2]/([.C90]+[.$H$2]+[.$I$2])" office:value-type="float" office:value="0.000225537634408602" calcext:value-type="float">
            <text:p>0,000225537634408602</text:p>
          </table:table-cell>
          <table:table-cell table:formula="of:=ROUND([.$H$2]*[.D90];5)" office:value-type="float" office:value="2.25538" calcext:value-type="float">
            <text:p>2,2553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90]" office:value-type="float" office:value="2.25538" calcext:value-type="float">
            <text:p>2,25538</text:p>
          </table:table-cell>
          <table:table-cell office:value-type="string" calcext:value-type="string">
            <text:p>;</text:p>
          </table:table-cell>
          <table:table-cell table:formula="of:=[.B90]" office:value-type="float" office:value="48" calcext:value-type="float">
            <text:p>4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.88" calcext:value-type="float">
            <text:p>3,88</text:p>
          </table:table-cell>
          <table:table-cell table:formula="of:=[.S90]*1000" office:value-type="float" office:value="3880" calcext:value-type="float">
            <text:p>3880</text:p>
          </table:table-cell>
        </table:table-row>
        <table:table-row table:style-name="ro1">
          <table:table-cell table:style-name="ce2"/>
          <table:table-cell table:style-name="Default" office:value-type="float" office:value="49" calcext:value-type="float">
            <text:p>49</text:p>
          </table:table-cell>
          <table:table-cell table:style-name="ce2" office:value-type="float" office:value="3733" calcext:value-type="float">
            <text:p>3733</text:p>
          </table:table-cell>
          <table:table-cell table:formula="of:=[.$G$2]/([.C91]+[.$H$2]+[.$I$2])" office:value-type="float" office:value="0.000227787959003597" calcext:value-type="float">
            <text:p>0,000227787959003597</text:p>
          </table:table-cell>
          <table:table-cell table:formula="of:=ROUND([.$H$2]*[.D91];5)" office:value-type="float" office:value="2.27788" calcext:value-type="float">
            <text:p>2,2778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91]" office:value-type="float" office:value="2.27788" calcext:value-type="float">
            <text:p>2,27788</text:p>
          </table:table-cell>
          <table:table-cell office:value-type="string" calcext:value-type="string">
            <text:p>;</text:p>
          </table:table-cell>
          <table:table-cell table:formula="of:=[.B91]" office:value-type="float" office:value="49" calcext:value-type="float">
            <text:p>4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.733" calcext:value-type="float">
            <text:p>3,733</text:p>
          </table:table-cell>
          <table:table-cell table:formula="of:=[.S91]*1000" office:value-type="float" office:value="3733" calcext:value-type="float">
            <text:p>3733</text:p>
          </table:table-cell>
        </table:table-row>
        <table:table-row table:style-name="ro1">
          <table:table-cell table:style-name="ce2"/>
          <table:table-cell table:style-name="Default" office:value-type="float" office:value="50" calcext:value-type="float">
            <text:p>50</text:p>
          </table:table-cell>
          <table:table-cell table:style-name="ce2" office:value-type="float" office:value="3592" calcext:value-type="float">
            <text:p>3592</text:p>
          </table:table-cell>
          <table:table-cell table:formula="of:=[.$G$2]/([.C92]+[.$H$2]+[.$I$2])" office:value-type="float" office:value="0.000229989035087719" calcext:value-type="float">
            <text:p>0,000229989035087719</text:p>
          </table:table-cell>
          <table:table-cell table:formula="of:=ROUND([.$H$2]*[.D92];5)" office:value-type="float" office:value="2.29989" calcext:value-type="float">
            <text:p>2,29989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92]" office:value-type="float" office:value="2.29989" calcext:value-type="float">
            <text:p>2,29989</text:p>
          </table:table-cell>
          <table:table-cell office:value-type="string" calcext:value-type="string">
            <text:p>;</text:p>
          </table:table-cell>
          <table:table-cell table:formula="of:=[.B92]" office:value-type="float" office:value="50" calcext:value-type="float">
            <text:p>5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.592" calcext:value-type="float">
            <text:p>3,592</text:p>
          </table:table-cell>
          <table:table-cell table:formula="of:=[.S92]*1000" office:value-type="float" office:value="3592" calcext:value-type="float">
            <text:p>3592</text:p>
          </table:table-cell>
        </table:table-row>
        <table:table-row table:style-name="ro1">
          <table:table-cell table:style-name="ce2"/>
          <table:table-cell table:style-name="Default" office:value-type="float" office:value="51" calcext:value-type="float">
            <text:p>51</text:p>
          </table:table-cell>
          <table:table-cell table:style-name="ce2" office:value-type="float" office:value="3457" calcext:value-type="float">
            <text:p>3457</text:p>
          </table:table-cell>
          <table:table-cell table:formula="of:=[.$G$2]/([.C93]+[.$H$2]+[.$I$2])" office:value-type="float" office:value="0.000232136681192502" calcext:value-type="float">
            <text:p>0,000232136681192502</text:p>
          </table:table-cell>
          <table:table-cell table:formula="of:=ROUND([.$H$2]*[.D93];5)" office:value-type="float" office:value="2.32137" calcext:value-type="float">
            <text:p>2,3213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93]" office:value-type="float" office:value="2.32137" calcext:value-type="float">
            <text:p>2,32137</text:p>
          </table:table-cell>
          <table:table-cell office:value-type="string" calcext:value-type="string">
            <text:p>;</text:p>
          </table:table-cell>
          <table:table-cell table:formula="of:=[.B93]" office:value-type="float" office:value="51" calcext:value-type="float">
            <text:p>5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.457" calcext:value-type="float">
            <text:p>3,457</text:p>
          </table:table-cell>
          <table:table-cell table:formula="of:=[.S93]*1000" office:value-type="float" office:value="3457" calcext:value-type="float">
            <text:p>3457</text:p>
          </table:table-cell>
        </table:table-row>
        <table:table-row table:style-name="ro1">
          <table:table-cell table:style-name="ce2"/>
          <table:table-cell table:style-name="Default" office:value-type="float" office:value="52" calcext:value-type="float">
            <text:p>52</text:p>
          </table:table-cell>
          <table:table-cell table:style-name="ce2" office:value-type="float" office:value="3328" calcext:value-type="float">
            <text:p>3328</text:p>
          </table:table-cell>
          <table:table-cell table:formula="of:=[.$G$2]/([.C94]+[.$H$2]+[.$I$2])" office:value-type="float" office:value="0.000234226689000558" calcext:value-type="float">
            <text:p>0,000234226689000558</text:p>
          </table:table-cell>
          <table:table-cell table:formula="of:=ROUND([.$H$2]*[.D94];5)" office:value-type="float" office:value="2.34227" calcext:value-type="float">
            <text:p>2,3422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94]" office:value-type="float" office:value="2.34227" calcext:value-type="float">
            <text:p>2,34227</text:p>
          </table:table-cell>
          <table:table-cell office:value-type="string" calcext:value-type="string">
            <text:p>;</text:p>
          </table:table-cell>
          <table:table-cell table:formula="of:=[.B94]" office:value-type="float" office:value="52" calcext:value-type="float">
            <text:p>5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.328" calcext:value-type="float">
            <text:p>3,328</text:p>
          </table:table-cell>
          <table:table-cell table:formula="of:=[.S94]*1000" office:value-type="float" office:value="3328" calcext:value-type="float">
            <text:p>3328</text:p>
          </table:table-cell>
        </table:table-row>
        <table:table-row table:style-name="ro1">
          <table:table-cell table:style-name="ce2"/>
          <table:table-cell table:style-name="Default" office:value-type="float" office:value="53" calcext:value-type="float">
            <text:p>53</text:p>
          </table:table-cell>
          <table:table-cell table:style-name="ce2" office:value-type="float" office:value="3204" calcext:value-type="float">
            <text:p>3204</text:p>
          </table:table-cell>
          <table:table-cell table:formula="of:=[.$G$2]/([.C95]+[.$H$2]+[.$I$2])" office:value-type="float" office:value="0.000236271472824556" calcext:value-type="float">
            <text:p>0,000236271472824556</text:p>
          </table:table-cell>
          <table:table-cell table:formula="of:=ROUND([.$H$2]*[.D95];5)" office:value-type="float" office:value="2.36271" calcext:value-type="float">
            <text:p>2,3627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95]" office:value-type="float" office:value="2.36271" calcext:value-type="float">
            <text:p>2,36271</text:p>
          </table:table-cell>
          <table:table-cell office:value-type="string" calcext:value-type="string">
            <text:p>;</text:p>
          </table:table-cell>
          <table:table-cell table:formula="of:=[.B95]" office:value-type="float" office:value="53" calcext:value-type="float">
            <text:p>5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.204" calcext:value-type="float">
            <text:p>3,204</text:p>
          </table:table-cell>
          <table:table-cell table:formula="of:=[.S95]*1000" office:value-type="float" office:value="3204" calcext:value-type="float">
            <text:p>3204</text:p>
          </table:table-cell>
        </table:table-row>
        <table:table-row table:style-name="ro1">
          <table:table-cell table:style-name="ce2"/>
          <table:table-cell table:style-name="Default" office:value-type="float" office:value="54" calcext:value-type="float">
            <text:p>54</text:p>
          </table:table-cell>
          <table:table-cell table:style-name="ce2" office:value-type="float" office:value="3086" calcext:value-type="float">
            <text:p>3086</text:p>
          </table:table-cell>
          <table:table-cell table:formula="of:=[.$G$2]/([.C96]+[.$H$2]+[.$I$2])" office:value-type="float" office:value="0.000238250745420985" calcext:value-type="float">
            <text:p>0,000238250745420985</text:p>
          </table:table-cell>
          <table:table-cell table:formula="of:=ROUND([.$H$2]*[.D96];5)" office:value-type="float" office:value="2.38251" calcext:value-type="float">
            <text:p>2,3825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96]" office:value-type="float" office:value="2.38251" calcext:value-type="float">
            <text:p>2,38251</text:p>
          </table:table-cell>
          <table:table-cell office:value-type="string" calcext:value-type="string">
            <text:p>;</text:p>
          </table:table-cell>
          <table:table-cell table:formula="of:=[.B96]" office:value-type="float" office:value="54" calcext:value-type="float">
            <text:p>5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.086" calcext:value-type="float">
            <text:p>3,086</text:p>
          </table:table-cell>
          <table:table-cell table:formula="of:=[.S96]*1000" office:value-type="float" office:value="3086" calcext:value-type="float">
            <text:p>3086</text:p>
          </table:table-cell>
        </table:table-row>
        <table:table-row table:style-name="ro1">
          <table:table-cell table:style-name="ce2"/>
          <table:table-cell table:style-name="Default" office:value-type="float" office:value="55" calcext:value-type="float">
            <text:p>55</text:p>
          </table:table-cell>
          <table:table-cell table:style-name="ce2" office:value-type="float" office:value="2972" calcext:value-type="float">
            <text:p>2972</text:p>
          </table:table-cell>
          <table:table-cell table:formula="of:=[.$G$2]/([.C97]+[.$H$2]+[.$I$2])" office:value-type="float" office:value="0.000240194675064415" calcext:value-type="float">
            <text:p>0,000240194675064415</text:p>
          </table:table-cell>
          <table:table-cell table:formula="of:=ROUND([.$H$2]*[.D97];5)" office:value-type="float" office:value="2.40195" calcext:value-type="float">
            <text:p>2,4019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97]" office:value-type="float" office:value="2.40195" calcext:value-type="float">
            <text:p>2,40195</text:p>
          </table:table-cell>
          <table:table-cell office:value-type="string" calcext:value-type="string">
            <text:p>;</text:p>
          </table:table-cell>
          <table:table-cell table:formula="of:=[.B97]" office:value-type="float" office:value="55" calcext:value-type="float">
            <text:p>5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.972" calcext:value-type="float">
            <text:p>2,972</text:p>
          </table:table-cell>
          <table:table-cell table:formula="of:=[.S97]*1000" office:value-type="float" office:value="2972" calcext:value-type="float">
            <text:p>2972</text:p>
          </table:table-cell>
        </table:table-row>
        <table:table-row table:style-name="ro1">
          <table:table-cell table:style-name="ce2"/>
          <table:table-cell table:style-name="Default" office:value-type="float" office:value="56" calcext:value-type="float">
            <text:p>56</text:p>
          </table:table-cell>
          <table:table-cell table:style-name="ce2" office:value-type="float" office:value="2863" calcext:value-type="float">
            <text:p>2863</text:p>
          </table:table-cell>
          <table:table-cell table:formula="of:=[.$G$2]/([.C98]+[.$H$2]+[.$I$2])" office:value-type="float" office:value="0.00024208324316526" calcext:value-type="float">
            <text:p>0,00024208324316526</text:p>
          </table:table-cell>
          <table:table-cell table:formula="of:=ROUND([.$H$2]*[.D98];5)" office:value-type="float" office:value="2.42083" calcext:value-type="float">
            <text:p>2,4208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98]" office:value-type="float" office:value="2.42083" calcext:value-type="float">
            <text:p>2,42083</text:p>
          </table:table-cell>
          <table:table-cell office:value-type="string" calcext:value-type="string">
            <text:p>;</text:p>
          </table:table-cell>
          <table:table-cell table:formula="of:=[.B98]" office:value-type="float" office:value="56" calcext:value-type="float">
            <text:p>5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.863" calcext:value-type="float">
            <text:p>2,863</text:p>
          </table:table-cell>
          <table:table-cell table:formula="of:=[.S98]*1000" office:value-type="float" office:value="2863" calcext:value-type="float">
            <text:p>2863</text:p>
          </table:table-cell>
        </table:table-row>
        <table:table-row table:style-name="ro1">
          <table:table-cell table:style-name="ce2"/>
          <table:table-cell table:style-name="Default" office:value-type="float" office:value="57" calcext:value-type="float">
            <text:p>57</text:p>
          </table:table-cell>
          <table:table-cell table:style-name="ce2" office:value-type="float" office:value="2759" calcext:value-type="float">
            <text:p>2759</text:p>
          </table:table-cell>
          <table:table-cell table:formula="of:=[.$G$2]/([.C99]+[.$H$2]+[.$I$2])" office:value-type="float" office:value="0.000243913075078131" calcext:value-type="float">
            <text:p>0,000243913075078131</text:p>
          </table:table-cell>
          <table:table-cell table:formula="of:=ROUND([.$H$2]*[.D99];5)" office:value-type="float" office:value="2.43913" calcext:value-type="float">
            <text:p>2,4391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99]" office:value-type="float" office:value="2.43913" calcext:value-type="float">
            <text:p>2,43913</text:p>
          </table:table-cell>
          <table:table-cell office:value-type="string" calcext:value-type="string">
            <text:p>;</text:p>
          </table:table-cell>
          <table:table-cell table:formula="of:=[.B99]" office:value-type="float" office:value="57" calcext:value-type="float">
            <text:p>5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.759" calcext:value-type="float">
            <text:p>2,759</text:p>
          </table:table-cell>
          <table:table-cell table:formula="of:=[.S99]*1000" office:value-type="float" office:value="2759" calcext:value-type="float">
            <text:p>2759</text:p>
          </table:table-cell>
        </table:table-row>
        <table:table-row table:style-name="ro1">
          <table:table-cell table:style-name="ce2"/>
          <table:table-cell table:style-name="Default" office:value-type="float" office:value="58" calcext:value-type="float">
            <text:p>58</text:p>
          </table:table-cell>
          <table:table-cell table:style-name="ce2" office:value-type="float" office:value="2659" calcext:value-type="float">
            <text:p>2659</text:p>
          </table:table-cell>
          <table:table-cell table:formula="of:=[.$G$2]/([.C100]+[.$H$2]+[.$I$2])" office:value-type="float" office:value="0.000245698806647632" calcext:value-type="float">
            <text:p>0,000245698806647632</text:p>
          </table:table-cell>
          <table:table-cell table:formula="of:=ROUND([.$H$2]*[.D100];5)" office:value-type="float" office:value="2.45699" calcext:value-type="float">
            <text:p>2,45699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00]" office:value-type="float" office:value="2.45699" calcext:value-type="float">
            <text:p>2,45699</text:p>
          </table:table-cell>
          <table:table-cell office:value-type="string" calcext:value-type="string">
            <text:p>;</text:p>
          </table:table-cell>
          <table:table-cell table:formula="of:=[.B100]" office:value-type="float" office:value="58" calcext:value-type="float">
            <text:p>5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.659" calcext:value-type="float">
            <text:p>2,659</text:p>
          </table:table-cell>
          <table:table-cell table:formula="of:=[.S100]*1000" office:value-type="float" office:value="2659" calcext:value-type="float">
            <text:p>2659</text:p>
          </table:table-cell>
        </table:table-row>
        <table:table-row table:style-name="ro1">
          <table:table-cell table:style-name="ce2"/>
          <table:table-cell table:style-name="Default" office:value-type="float" office:value="59" calcext:value-type="float">
            <text:p>59</text:p>
          </table:table-cell>
          <table:table-cell table:style-name="ce2" office:value-type="float" office:value="2564" calcext:value-type="float">
            <text:p>2564</text:p>
          </table:table-cell>
          <table:table-cell table:formula="of:=[.$G$2]/([.C101]+[.$H$2]+[.$I$2])" office:value-type="float" office:value="0.000247419640224123" calcext:value-type="float">
            <text:p>0,000247419640224123</text:p>
          </table:table-cell>
          <table:table-cell table:formula="of:=ROUND([.$H$2]*[.D101];5)" office:value-type="float" office:value="2.4742" calcext:value-type="float">
            <text:p>2,474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01]" office:value-type="float" office:value="2.4742" calcext:value-type="float">
            <text:p>2,4742</text:p>
          </table:table-cell>
          <table:table-cell office:value-type="string" calcext:value-type="string">
            <text:p>;</text:p>
          </table:table-cell>
          <table:table-cell table:formula="of:=[.B101]" office:value-type="float" office:value="59" calcext:value-type="float">
            <text:p>5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.564" calcext:value-type="float">
            <text:p>2,564</text:p>
          </table:table-cell>
          <table:table-cell table:formula="of:=[.S101]*1000" office:value-type="float" office:value="2564" calcext:value-type="float">
            <text:p>2564</text:p>
          </table:table-cell>
        </table:table-row>
        <table:table-row table:style-name="ro1">
          <table:table-cell table:style-name="ce2"/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2472" calcext:value-type="float">
            <text:p>2472</text:p>
          </table:table-cell>
          <table:table-cell table:formula="of:=[.$G$2]/([.C102]+[.$H$2]+[.$I$2])" office:value-type="float" office:value="0.000249109263657957" calcext:value-type="float">
            <text:p>0,000249109263657957</text:p>
          </table:table-cell>
          <table:table-cell table:formula="of:=ROUND([.$H$2]*[.D102];5)" office:value-type="float" office:value="2.49109" calcext:value-type="float">
            <text:p>2,49109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02]" office:value-type="float" office:value="2.49109" calcext:value-type="float">
            <text:p>2,49109</text:p>
          </table:table-cell>
          <table:table-cell office:value-type="string" calcext:value-type="string">
            <text:p>;</text:p>
          </table:table-cell>
          <table:table-cell table:formula="of:=[.B102]" office:value-type="float" office:value="60" calcext:value-type="float">
            <text:p>6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472" calcext:value-type="float">
            <text:p>2,472</text:p>
          </table:table-cell>
          <table:table-cell table:formula="of:=[.S102]*1000" office:value-type="float" office:value="2472" calcext:value-type="float">
            <text:p>2472</text:p>
          </table:table-cell>
        </table:table-row>
        <table:table-row table:style-name="ro1">
          <table:table-cell table:style-name="ce2"/>
          <table:table-cell table:style-name="Default" office:value-type="float" office:value="61" calcext:value-type="float">
            <text:p>61</text:p>
          </table:table-cell>
          <table:table-cell table:style-name="ce2" office:value-type="float" office:value="2384" calcext:value-type="float">
            <text:p>2384</text:p>
          </table:table-cell>
          <table:table-cell table:formula="of:=[.$G$2]/([.C103]+[.$H$2]+[.$I$2])" office:value-type="float" office:value="0.000250747160789002" calcext:value-type="float">
            <text:p>0,000250747160789002</text:p>
          </table:table-cell>
          <table:table-cell table:formula="of:=ROUND([.$H$2]*[.D103];5)" office:value-type="float" office:value="2.50747" calcext:value-type="float">
            <text:p>2,5074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03]" office:value-type="float" office:value="2.50747" calcext:value-type="float">
            <text:p>2,50747</text:p>
          </table:table-cell>
          <table:table-cell office:value-type="string" calcext:value-type="string">
            <text:p>;</text:p>
          </table:table-cell>
          <table:table-cell table:formula="of:=[.B103]" office:value-type="float" office:value="61" calcext:value-type="float">
            <text:p>6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2.384" calcext:value-type="float">
            <text:p>2,384</text:p>
          </table:table-cell>
          <table:table-cell table:formula="of:=[.S103]*1000" office:value-type="float" office:value="2384" calcext:value-type="float">
            <text:p>2384</text:p>
          </table:table-cell>
        </table:table-row>
        <table:table-row table:style-name="ro1">
          <table:table-cell table:style-name="ce2"/>
          <table:table-cell table:style-name="Default" office:value-type="float" office:value="62" calcext:value-type="float">
            <text:p>62</text:p>
          </table:table-cell>
          <table:table-cell table:style-name="ce2" office:value-type="float" office:value="2299" calcext:value-type="float">
            <text:p>2299</text:p>
          </table:table-cell>
          <table:table-cell table:formula="of:=[.$G$2]/([.C104]+[.$H$2]+[.$I$2])" office:value-type="float" office:value="0.000252349800736898" calcext:value-type="float">
            <text:p>0,000252349800736898</text:p>
          </table:table-cell>
          <table:table-cell table:formula="of:=ROUND([.$H$2]*[.D104];5)" office:value-type="float" office:value="2.5235" calcext:value-type="float">
            <text:p>2,523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04]" office:value-type="float" office:value="2.5235" calcext:value-type="float">
            <text:p>2,5235</text:p>
          </table:table-cell>
          <table:table-cell office:value-type="string" calcext:value-type="string">
            <text:p>;</text:p>
          </table:table-cell>
          <table:table-cell table:formula="of:=[.B104]" office:value-type="float" office:value="62" calcext:value-type="float">
            <text:p>6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.299" calcext:value-type="float">
            <text:p>2,299</text:p>
          </table:table-cell>
          <table:table-cell table:formula="of:=[.S104]*1000" office:value-type="float" office:value="2299" calcext:value-type="float">
            <text:p>2299</text:p>
          </table:table-cell>
        </table:table-row>
        <table:table-row table:style-name="ro1">
          <table:table-cell table:style-name="ce2"/>
          <table:table-cell table:style-name="Default" office:value-type="float" office:value="63" calcext:value-type="float">
            <text:p>63</text:p>
          </table:table-cell>
          <table:table-cell table:style-name="ce2" office:value-type="float" office:value="2218" calcext:value-type="float">
            <text:p>2218</text:p>
          </table:table-cell>
          <table:table-cell table:formula="of:=[.$G$2]/([.C105]+[.$H$2]+[.$I$2])" office:value-type="float" office:value="0.000253896202148585" calcext:value-type="float">
            <text:p>0,000253896202148585</text:p>
          </table:table-cell>
          <table:table-cell table:formula="of:=ROUND([.$H$2]*[.D105];5)" office:value-type="float" office:value="2.53896" calcext:value-type="float">
            <text:p>2,5389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05]" office:value-type="float" office:value="2.53896" calcext:value-type="float">
            <text:p>2,53896</text:p>
          </table:table-cell>
          <table:table-cell office:value-type="string" calcext:value-type="string">
            <text:p>;</text:p>
          </table:table-cell>
          <table:table-cell table:formula="of:=[.B105]" office:value-type="float" office:value="63" calcext:value-type="float">
            <text:p>6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.218" calcext:value-type="float">
            <text:p>2,218</text:p>
          </table:table-cell>
          <table:table-cell table:formula="of:=[.S105]*1000" office:value-type="float" office:value="2218" calcext:value-type="float">
            <text:p>2218</text:p>
          </table:table-cell>
        </table:table-row>
        <table:table-row table:style-name="ro1">
          <table:table-cell table:style-name="ce2"/>
          <table:table-cell table:style-name="Default" office:value-type="float" office:value="64" calcext:value-type="float">
            <text:p>64</text:p>
          </table:table-cell>
          <table:table-cell table:style-name="ce2" office:value-type="float" office:value="2141" calcext:value-type="float">
            <text:p>2141</text:p>
          </table:table-cell>
          <table:table-cell table:formula="of:=[.$G$2]/([.C106]+[.$H$2]+[.$I$2])" office:value-type="float" office:value="0.00025538391294422" calcext:value-type="float">
            <text:p>0,00025538391294422</text:p>
          </table:table-cell>
          <table:table-cell table:formula="of:=ROUND([.$H$2]*[.D106];5)" office:value-type="float" office:value="2.55384" calcext:value-type="float">
            <text:p>2,5538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06]" office:value-type="float" office:value="2.55384" calcext:value-type="float">
            <text:p>2,55384</text:p>
          </table:table-cell>
          <table:table-cell office:value-type="string" calcext:value-type="string">
            <text:p>;</text:p>
          </table:table-cell>
          <table:table-cell table:formula="of:=[.B106]" office:value-type="float" office:value="64" calcext:value-type="float">
            <text:p>6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.141" calcext:value-type="float">
            <text:p>2,141</text:p>
          </table:table-cell>
          <table:table-cell table:formula="of:=[.S106]*1000" office:value-type="float" office:value="2141" calcext:value-type="float">
            <text:p>2141</text:p>
          </table:table-cell>
        </table:table-row>
        <table:table-row table:style-name="ro1">
          <table:table-cell table:style-name="ce2"/>
          <table:table-cell table:style-name="Default" office:value-type="float" office:value="65" calcext:value-type="float">
            <text:p>65</text:p>
          </table:table-cell>
          <table:table-cell table:style-name="ce2" office:value-type="float" office:value="2066" calcext:value-type="float">
            <text:p>2066</text:p>
          </table:table-cell>
          <table:table-cell table:formula="of:=[.$G$2]/([.C107]+[.$H$2]+[.$I$2])" office:value-type="float" office:value="0.000256849839277514" calcext:value-type="float">
            <text:p>0,000256849839277514</text:p>
          </table:table-cell>
          <table:table-cell table:formula="of:=ROUND([.$H$2]*[.D107];5)" office:value-type="float" office:value="2.5685" calcext:value-type="float">
            <text:p>2,568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07]" office:value-type="float" office:value="2.5685" calcext:value-type="float">
            <text:p>2,5685</text:p>
          </table:table-cell>
          <table:table-cell office:value-type="string" calcext:value-type="string">
            <text:p>;</text:p>
          </table:table-cell>
          <table:table-cell table:formula="of:=[.B107]" office:value-type="float" office:value="65" calcext:value-type="float">
            <text:p>6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.066" calcext:value-type="float">
            <text:p>2,066</text:p>
          </table:table-cell>
          <table:table-cell table:formula="of:=[.S107]*1000" office:value-type="float" office:value="2066" calcext:value-type="float">
            <text:p>2066</text:p>
          </table:table-cell>
        </table:table-row>
        <table:table-row table:style-name="ro1">
          <table:table-cell table:style-name="ce2"/>
          <table:table-cell table:style-name="Default" office:value-type="float" office:value="66" calcext:value-type="float">
            <text:p>66</text:p>
          </table:table-cell>
          <table:table-cell table:style-name="ce2" office:value-type="float" office:value="1994" calcext:value-type="float">
            <text:p>1994</text:p>
          </table:table-cell>
          <table:table-cell table:formula="of:=[.$G$2]/([.C108]+[.$H$2]+[.$I$2])" office:value-type="float" office:value="0.000258273049099584" calcext:value-type="float">
            <text:p>0,000258273049099584</text:p>
          </table:table-cell>
          <table:table-cell table:formula="of:=ROUND([.$H$2]*[.D108];5)" office:value-type="float" office:value="2.58273" calcext:value-type="float">
            <text:p>2,5827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08]" office:value-type="float" office:value="2.58273" calcext:value-type="float">
            <text:p>2,58273</text:p>
          </table:table-cell>
          <table:table-cell office:value-type="string" calcext:value-type="string">
            <text:p>;</text:p>
          </table:table-cell>
          <table:table-cell table:formula="of:=[.B108]" office:value-type="float" office:value="66" calcext:value-type="float">
            <text:p>6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.994" calcext:value-type="float">
            <text:p>1,994</text:p>
          </table:table-cell>
          <table:table-cell table:formula="of:=[.S108]*1000" office:value-type="float" office:value="1994" calcext:value-type="float">
            <text:p>1994</text:p>
          </table:table-cell>
        </table:table-row>
        <table:table-row table:style-name="ro1">
          <table:table-cell table:style-name="ce2"/>
          <table:table-cell table:style-name="Default" office:value-type="float" office:value="67" calcext:value-type="float">
            <text:p>67</text:p>
          </table:table-cell>
          <table:table-cell table:style-name="ce2" office:value-type="float" office:value="1926" calcext:value-type="float">
            <text:p>1926</text:p>
          </table:table-cell>
          <table:table-cell table:formula="of:=[.$G$2]/([.C109]+[.$H$2]+[.$I$2])" office:value-type="float" office:value="0.000259631749961318" calcext:value-type="float">
            <text:p>0,000259631749961318</text:p>
          </table:table-cell>
          <table:table-cell table:formula="of:=ROUND([.$H$2]*[.D109];5)" office:value-type="float" office:value="2.59632" calcext:value-type="float">
            <text:p>2,5963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09]" office:value-type="float" office:value="2.59632" calcext:value-type="float">
            <text:p>2,59632</text:p>
          </table:table-cell>
          <table:table-cell office:value-type="string" calcext:value-type="string">
            <text:p>;</text:p>
          </table:table-cell>
          <table:table-cell table:formula="of:=[.B109]" office:value-type="float" office:value="67" calcext:value-type="float">
            <text:p>6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.926" calcext:value-type="float">
            <text:p>1,926</text:p>
          </table:table-cell>
          <table:table-cell table:formula="of:=[.S109]*1000" office:value-type="float" office:value="1926" calcext:value-type="float">
            <text:p>1926</text:p>
          </table:table-cell>
        </table:table-row>
        <table:table-row table:style-name="ro1">
          <table:table-cell table:style-name="ce2"/>
          <table:table-cell table:style-name="Default" office:value-type="float" office:value="68" calcext:value-type="float">
            <text:p>68</text:p>
          </table:table-cell>
          <table:table-cell table:style-name="ce2" office:value-type="float" office:value="1860" calcext:value-type="float">
            <text:p>1860</text:p>
          </table:table-cell>
          <table:table-cell table:formula="of:=[.$G$2]/([.C110]+[.$H$2]+[.$I$2])" office:value-type="float" office:value="0.000260964230171073" calcext:value-type="float">
            <text:p>0,000260964230171073</text:p>
          </table:table-cell>
          <table:table-cell table:formula="of:=ROUND([.$H$2]*[.D110];5)" office:value-type="float" office:value="2.60964" calcext:value-type="float">
            <text:p>2,6096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10]" office:value-type="float" office:value="2.60964" calcext:value-type="float">
            <text:p>2,60964</text:p>
          </table:table-cell>
          <table:table-cell office:value-type="string" calcext:value-type="string">
            <text:p>;</text:p>
          </table:table-cell>
          <table:table-cell table:formula="of:=[.B110]" office:value-type="float" office:value="68" calcext:value-type="float">
            <text:p>6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.86" calcext:value-type="float">
            <text:p>1,86</text:p>
          </table:table-cell>
          <table:table-cell table:formula="of:=[.S110]*1000" office:value-type="float" office:value="1860" calcext:value-type="float">
            <text:p>1860</text:p>
          </table:table-cell>
        </table:table-row>
        <table:table-row table:style-name="ro1">
          <table:table-cell table:style-name="ce2"/>
          <table:table-cell table:style-name="Default" office:value-type="float" office:value="69" calcext:value-type="float">
            <text:p>69</text:p>
          </table:table-cell>
          <table:table-cell table:style-name="ce2" office:value-type="float" office:value="1796" calcext:value-type="float">
            <text:p>1796</text:p>
          </table:table-cell>
          <table:table-cell table:formula="of:=[.$G$2]/([.C111]+[.$H$2]+[.$I$2])" office:value-type="float" office:value="0.000262269459206002" calcext:value-type="float">
            <text:p>0,000262269459206002</text:p>
          </table:table-cell>
          <table:table-cell table:formula="of:=ROUND([.$H$2]*[.D111];5)" office:value-type="float" office:value="2.62269" calcext:value-type="float">
            <text:p>2,62269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11]" office:value-type="float" office:value="2.62269" calcext:value-type="float">
            <text:p>2,62269</text:p>
          </table:table-cell>
          <table:table-cell office:value-type="string" calcext:value-type="string">
            <text:p>;</text:p>
          </table:table-cell>
          <table:table-cell table:formula="of:=[.B111]" office:value-type="float" office:value="69" calcext:value-type="float">
            <text:p>6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796" calcext:value-type="float">
            <text:p>1,796</text:p>
          </table:table-cell>
          <table:table-cell table:formula="of:=[.S111]*1000" office:value-type="float" office:value="1796" calcext:value-type="float">
            <text:p>1796</text:p>
          </table:table-cell>
        </table:table-row>
        <table:table-row table:style-name="ro1">
          <table:table-cell table:style-name="ce2"/>
          <table:table-cell table:style-name="Default" office:value-type="float" office:value="70" calcext:value-type="float">
            <text:p>70</text:p>
          </table:table-cell>
          <table:table-cell table:style-name="ce2" office:value-type="float" office:value="1735" calcext:value-type="float">
            <text:p>1735</text:p>
          </table:table-cell>
          <table:table-cell table:formula="of:=[.$G$2]/([.C112]+[.$H$2]+[.$I$2])" office:value-type="float" office:value="0.00026352571652925" calcext:value-type="float">
            <text:p>0,00026352571652925</text:p>
          </table:table-cell>
          <table:table-cell table:formula="of:=ROUND([.$H$2]*[.D112];5)" office:value-type="float" office:value="2.63526" calcext:value-type="float">
            <text:p>2,6352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12]" office:value-type="float" office:value="2.63526" calcext:value-type="float">
            <text:p>2,63526</text:p>
          </table:table-cell>
          <table:table-cell office:value-type="string" calcext:value-type="string">
            <text:p>;</text:p>
          </table:table-cell>
          <table:table-cell table:formula="of:=[.B112]" office:value-type="float" office:value="70" calcext:value-type="float">
            <text:p>7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.735" calcext:value-type="float">
            <text:p>1,735</text:p>
          </table:table-cell>
          <table:table-cell table:formula="of:=[.S112]*1000" office:value-type="float" office:value="1735" calcext:value-type="float">
            <text:p>1735</text:p>
          </table:table-cell>
        </table:table-row>
        <table:table-row table:style-name="ro1">
          <table:table-cell table:style-name="ce2"/>
          <table:table-cell table:style-name="Default" office:value-type="float" office:value="71" calcext:value-type="float">
            <text:p>71</text:p>
          </table:table-cell>
          <table:table-cell table:style-name="ce2" office:value-type="float" office:value="1677" calcext:value-type="float">
            <text:p>1677</text:p>
          </table:table-cell>
          <table:table-cell table:formula="of:=[.$G$2]/([.C113]+[.$H$2]+[.$I$2])" office:value-type="float" office:value="0.000264731403328863" calcext:value-type="float">
            <text:p>0,000264731403328863</text:p>
          </table:table-cell>
          <table:table-cell table:formula="of:=ROUND([.$H$2]*[.D113];5)" office:value-type="float" office:value="2.64731" calcext:value-type="float">
            <text:p>2,6473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13]" office:value-type="float" office:value="2.64731" calcext:value-type="float">
            <text:p>2,64731</text:p>
          </table:table-cell>
          <table:table-cell office:value-type="string" calcext:value-type="string">
            <text:p>;</text:p>
          </table:table-cell>
          <table:table-cell table:formula="of:=[.B113]" office:value-type="float" office:value="71" calcext:value-type="float">
            <text:p>7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.677" calcext:value-type="float">
            <text:p>1,677</text:p>
          </table:table-cell>
          <table:table-cell table:formula="of:=[.S113]*1000" office:value-type="float" office:value="1677" calcext:value-type="float">
            <text:p>1677</text:p>
          </table:table-cell>
        </table:table-row>
        <table:table-row table:style-name="ro1">
          <table:table-cell table:style-name="ce2"/>
          <table:table-cell table:style-name="Default" office:value-type="float" office:value="72" calcext:value-type="float">
            <text:p>72</text:p>
          </table:table-cell>
          <table:table-cell table:style-name="ce2" office:value-type="float" office:value="1621" calcext:value-type="float">
            <text:p>1621</text:p>
          </table:table-cell>
          <table:table-cell table:formula="of:=[.$G$2]/([.C114]+[.$H$2]+[.$I$2])" office:value-type="float" office:value="0.000265906029633151" calcext:value-type="float">
            <text:p>0,000265906029633151</text:p>
          </table:table-cell>
          <table:table-cell table:formula="of:=ROUND([.$H$2]*[.D114];5)" office:value-type="float" office:value="2.65906" calcext:value-type="float">
            <text:p>2,6590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14]" office:value-type="float" office:value="2.65906" calcext:value-type="float">
            <text:p>2,65906</text:p>
          </table:table-cell>
          <table:table-cell office:value-type="string" calcext:value-type="string">
            <text:p>;</text:p>
          </table:table-cell>
          <table:table-cell table:formula="of:=[.B114]" office:value-type="float" office:value="72" calcext:value-type="float">
            <text:p>7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.621" calcext:value-type="float">
            <text:p>1,621</text:p>
          </table:table-cell>
          <table:table-cell table:formula="of:=[.S114]*1000" office:value-type="float" office:value="1621" calcext:value-type="float">
            <text:p>1621</text:p>
          </table:table-cell>
        </table:table-row>
        <table:table-row table:style-name="ro1">
          <table:table-cell table:style-name="ce2"/>
          <table:table-cell table:style-name="Default" office:value-type="float" office:value="73" calcext:value-type="float">
            <text:p>73</text:p>
          </table:table-cell>
          <table:table-cell table:style-name="ce2" office:value-type="float" office:value="1567" calcext:value-type="float">
            <text:p>1567</text:p>
          </table:table-cell>
          <table:table-cell table:formula="of:=[.$G$2]/([.C115]+[.$H$2]+[.$I$2])" office:value-type="float" office:value="0.000267048619400016" calcext:value-type="float">
            <text:p>0,000267048619400016</text:p>
          </table:table-cell>
          <table:table-cell table:formula="of:=ROUND([.$H$2]*[.D115];5)" office:value-type="float" office:value="2.67049" calcext:value-type="float">
            <text:p>2,67049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15]" office:value-type="float" office:value="2.67049" calcext:value-type="float">
            <text:p>2,67049</text:p>
          </table:table-cell>
          <table:table-cell office:value-type="string" calcext:value-type="string">
            <text:p>;</text:p>
          </table:table-cell>
          <table:table-cell table:formula="of:=[.B115]" office:value-type="float" office:value="73" calcext:value-type="float">
            <text:p>7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.567" calcext:value-type="float">
            <text:p>1,567</text:p>
          </table:table-cell>
          <table:table-cell table:formula="of:=[.S115]*1000" office:value-type="float" office:value="1567" calcext:value-type="float">
            <text:p>1567</text:p>
          </table:table-cell>
        </table:table-row>
        <table:table-row table:style-name="ro1">
          <table:table-cell table:style-name="ce2"/>
          <table:table-cell table:style-name="Default" office:value-type="float" office:value="74" calcext:value-type="float">
            <text:p>74</text:p>
          </table:table-cell>
          <table:table-cell table:style-name="ce2" office:value-type="float" office:value="1515" calcext:value-type="float">
            <text:p>1515</text:p>
          </table:table-cell>
          <table:table-cell table:formula="of:=[.$G$2]/([.C116]+[.$H$2]+[.$I$2])" office:value-type="float" office:value="0.000268158210147823" calcext:value-type="float">
            <text:p>0,000268158210147823</text:p>
          </table:table-cell>
          <table:table-cell table:formula="of:=ROUND([.$H$2]*[.D116];5)" office:value-type="float" office:value="2.68158" calcext:value-type="float">
            <text:p>2,6815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16]" office:value-type="float" office:value="2.68158" calcext:value-type="float">
            <text:p>2,68158</text:p>
          </table:table-cell>
          <table:table-cell office:value-type="string" calcext:value-type="string">
            <text:p>;</text:p>
          </table:table-cell>
          <table:table-cell table:formula="of:=[.B116]" office:value-type="float" office:value="74" calcext:value-type="float">
            <text:p>7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.515" calcext:value-type="float">
            <text:p>1,515</text:p>
          </table:table-cell>
          <table:table-cell table:formula="of:=[.S116]*1000" office:value-type="float" office:value="1515" calcext:value-type="float">
            <text:p>1515</text:p>
          </table:table-cell>
        </table:table-row>
        <table:table-row table:style-name="ro1">
          <table:table-cell table:style-name="ce2"/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1465" calcext:value-type="float">
            <text:p>1465</text:p>
          </table:table-cell>
          <table:table-cell table:formula="of:=[.$G$2]/([.C117]+[.$H$2]+[.$I$2])" office:value-type="float" office:value="0.000269233854793422" calcext:value-type="float">
            <text:p>0,000269233854793422</text:p>
          </table:table-cell>
          <table:table-cell table:formula="of:=ROUND([.$H$2]*[.D117];5)" office:value-type="float" office:value="2.69234" calcext:value-type="float">
            <text:p>2,6923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17]" office:value-type="float" office:value="2.69234" calcext:value-type="float">
            <text:p>2,69234</text:p>
          </table:table-cell>
          <table:table-cell office:value-type="string" calcext:value-type="string">
            <text:p>;</text:p>
          </table:table-cell>
          <table:table-cell table:formula="of:=[.B117]" office:value-type="float" office:value="75" calcext:value-type="float">
            <text:p>7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.465" calcext:value-type="float">
            <text:p>1,465</text:p>
          </table:table-cell>
          <table:table-cell table:formula="of:=[.S117]*1000" office:value-type="float" office:value="1465" calcext:value-type="float">
            <text:p>1465</text:p>
          </table:table-cell>
        </table:table-row>
        <table:table-row table:style-name="ro1">
          <table:table-cell table:style-name="ce2"/>
          <table:table-cell table:style-name="Default" office:value-type="float" office:value="76" calcext:value-type="float">
            <text:p>76</text:p>
          </table:table-cell>
          <table:table-cell table:style-name="ce2" office:value-type="float" office:value="1417" calcext:value-type="float">
            <text:p>1417</text:p>
          </table:table-cell>
          <table:table-cell table:formula="of:=[.$G$2]/([.C118]+[.$H$2]+[.$I$2])" office:value-type="float" office:value="0.00027027462350004" calcext:value-type="float">
            <text:p>0,00027027462350004</text:p>
          </table:table-cell>
          <table:table-cell table:formula="of:=ROUND([.$H$2]*[.D118];5)" office:value-type="float" office:value="2.70275" calcext:value-type="float">
            <text:p>2,7027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18]" office:value-type="float" office:value="2.70275" calcext:value-type="float">
            <text:p>2,70275</text:p>
          </table:table-cell>
          <table:table-cell office:value-type="string" calcext:value-type="string">
            <text:p>;</text:p>
          </table:table-cell>
          <table:table-cell table:formula="of:=[.B118]" office:value-type="float" office:value="76" calcext:value-type="float">
            <text:p>7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417" calcext:value-type="float">
            <text:p>1,417</text:p>
          </table:table-cell>
          <table:table-cell table:formula="of:=[.S118]*1000" office:value-type="float" office:value="1417" calcext:value-type="float">
            <text:p>1417</text:p>
          </table:table-cell>
        </table:table-row>
        <table:table-row table:style-name="ro1">
          <table:table-cell table:style-name="ce3"/>
          <table:table-cell table:style-name="Default" office:value-type="float" office:value="77" calcext:value-type="float">
            <text:p>77</text:p>
          </table:table-cell>
          <table:table-cell table:style-name="ce2" office:value-type="float" office:value="1371" calcext:value-type="float">
            <text:p>1371</text:p>
          </table:table-cell>
          <table:table-cell table:formula="of:=[.$G$2]/([.C119]+[.$H$2]+[.$I$2])" office:value-type="float" office:value="0.00027127960552906" calcext:value-type="float">
            <text:p>0,00027127960552906</text:p>
          </table:table-cell>
          <table:table-cell table:style-name="ce12" table:formula="of:=ROUND([.$H$2]*[.D119];5)" office:value-type="float" office:value="2.7128" calcext:value-type="float">
            <text:p>2,712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19]" office:value-type="float" office:value="2.7128" calcext:value-type="float">
            <text:p>2,7128</text:p>
          </table:table-cell>
          <table:table-cell office:value-type="string" calcext:value-type="string">
            <text:p>;</text:p>
          </table:table-cell>
          <table:table-cell table:formula="of:=[.B119]" office:value-type="float" office:value="77" calcext:value-type="float">
            <text:p>7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.371" calcext:value-type="float">
            <text:p>1,371</text:p>
          </table:table-cell>
          <table:table-cell table:formula="of:=[.S119]*1000" office:value-type="float" office:value="1371" calcext:value-type="float">
            <text:p>1371</text:p>
          </table:table-cell>
        </table:table-row>
        <table:table-row table:style-name="ro1">
          <table:table-cell table:style-name="ce2"/>
          <table:table-cell table:style-name="Default" office:value-type="float" office:value="78" calcext:value-type="float">
            <text:p>78</text:p>
          </table:table-cell>
          <table:table-cell table:style-name="ce2" office:value-type="float" office:value="1326" calcext:value-type="float">
            <text:p>1326</text:p>
          </table:table-cell>
          <table:table-cell table:formula="of:=[.$G$2]/([.C120]+[.$H$2]+[.$I$2])" office:value-type="float" office:value="0.000272269998377414" calcext:value-type="float">
            <text:p>0,000272269998377414</text:p>
          </table:table-cell>
          <table:table-cell table:formula="of:=ROUND([.$H$2]*[.D120];5)" office:value-type="float" office:value="2.7227" calcext:value-type="float">
            <text:p>2,722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20]" office:value-type="float" office:value="2.7227" calcext:value-type="float">
            <text:p>2,7227</text:p>
          </table:table-cell>
          <table:table-cell office:value-type="string" calcext:value-type="string">
            <text:p>;</text:p>
          </table:table-cell>
          <table:table-cell table:formula="of:=[.B120]" office:value-type="float" office:value="78" calcext:value-type="float">
            <text:p>7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.326" calcext:value-type="float">
            <text:p>1,326</text:p>
          </table:table-cell>
          <table:table-cell table:formula="of:=[.S120]*1000" office:value-type="float" office:value="1326" calcext:value-type="float">
            <text:p>1326</text:p>
          </table:table-cell>
        </table:table-row>
        <table:table-row table:style-name="ro1">
          <table:table-cell table:style-name="ce2"/>
          <table:table-cell table:style-name="Default" office:value-type="float" office:value="79" calcext:value-type="float">
            <text:p>79</text:p>
          </table:table-cell>
          <table:table-cell table:style-name="ce2" office:value-type="float" office:value="1284" calcext:value-type="float">
            <text:p>1284</text:p>
          </table:table-cell>
          <table:table-cell table:formula="of:=[.$G$2]/([.C121]+[.$H$2]+[.$I$2])" office:value-type="float" office:value="0.000273200911755129" calcext:value-type="float">
            <text:p>0,000273200911755129</text:p>
          </table:table-cell>
          <table:table-cell table:formula="of:=ROUND([.$H$2]*[.D121];5)" office:value-type="float" office:value="2.73201" calcext:value-type="float">
            <text:p>2,7320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21]" office:value-type="float" office:value="2.73201" calcext:value-type="float">
            <text:p>2,73201</text:p>
          </table:table-cell>
          <table:table-cell office:value-type="string" calcext:value-type="string">
            <text:p>;</text:p>
          </table:table-cell>
          <table:table-cell table:formula="of:=[.B121]" office:value-type="float" office:value="79" calcext:value-type="float">
            <text:p>7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.284" calcext:value-type="float">
            <text:p>1,284</text:p>
          </table:table-cell>
          <table:table-cell table:formula="of:=[.S121]*1000" office:value-type="float" office:value="1284" calcext:value-type="float">
            <text:p>1284</text:p>
          </table:table-cell>
        </table:table-row>
        <table:table-row table:style-name="ro1">
          <table:table-cell table:style-name="ce2"/>
          <table:table-cell table:style-name="Default" office:value-type="float" office:value="80" calcext:value-type="float">
            <text:p>80</text:p>
          </table:table-cell>
          <table:table-cell table:style-name="ce2" office:value-type="float" office:value="1243" calcext:value-type="float">
            <text:p>1243</text:p>
          </table:table-cell>
          <table:table-cell table:formula="of:=[.$G$2]/([.C122]+[.$H$2]+[.$I$2])" office:value-type="float" office:value="0.000274115821285633" calcext:value-type="float">
            <text:p>0,000274115821285633</text:p>
          </table:table-cell>
          <table:table-cell table:formula="of:=ROUND([.$H$2]*[.D122];5)" office:value-type="float" office:value="2.74116" calcext:value-type="float">
            <text:p>2,7411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22]" office:value-type="float" office:value="2.74116" calcext:value-type="float">
            <text:p>2,74116</text:p>
          </table:table-cell>
          <table:table-cell office:value-type="string" calcext:value-type="string">
            <text:p>;</text:p>
          </table:table-cell>
          <table:table-cell table:formula="of:=[.B122]" office:value-type="float" office:value="80" calcext:value-type="float">
            <text:p>8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.243" calcext:value-type="float">
            <text:p>1,243</text:p>
          </table:table-cell>
          <table:table-cell table:formula="of:=[.S122]*1000" office:value-type="float" office:value="1243" calcext:value-type="float">
            <text:p>1243</text:p>
          </table:table-cell>
        </table:table-row>
        <table:table-row table:style-name="ro1">
          <table:table-cell table:style-name="ce2"/>
          <table:table-cell table:style-name="Default" office:value-type="float" office:value="81" calcext:value-type="float">
            <text:p>81</text:p>
          </table:table-cell>
          <table:table-cell table:style-name="ce2" office:value-type="float" office:value="1203" calcext:value-type="float">
            <text:p>1203</text:p>
          </table:table-cell>
          <table:table-cell table:formula="of:=[.$G$2]/([.C123]+[.$H$2]+[.$I$2])" office:value-type="float" office:value="0.000275014340735885" calcext:value-type="float">
            <text:p>0,000275014340735885</text:p>
          </table:table-cell>
          <table:table-cell table:formula="of:=ROUND([.$H$2]*[.D123];5)" office:value-type="float" office:value="2.75014" calcext:value-type="float">
            <text:p>2,75014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23]" office:value-type="float" office:value="2.75014" calcext:value-type="float">
            <text:p>2,75014</text:p>
          </table:table-cell>
          <table:table-cell office:value-type="string" calcext:value-type="string">
            <text:p>;</text:p>
          </table:table-cell>
          <table:table-cell table:formula="of:=[.B123]" office:value-type="float" office:value="81" calcext:value-type="float">
            <text:p>8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.203" calcext:value-type="float">
            <text:p>1,203</text:p>
          </table:table-cell>
          <table:table-cell table:formula="of:=[.S123]*1000" office:value-type="float" office:value="1203" calcext:value-type="float">
            <text:p>1203</text:p>
          </table:table-cell>
        </table:table-row>
        <table:table-row table:style-name="ro1">
          <table:table-cell table:style-name="ce2"/>
          <table:table-cell table:style-name="Default" office:value-type="float" office:value="82" calcext:value-type="float">
            <text:p>82</text:p>
          </table:table-cell>
          <table:table-cell table:style-name="ce2" office:value-type="float" office:value="1165" calcext:value-type="float">
            <text:p>1165</text:p>
          </table:table-cell>
          <table:table-cell table:formula="of:=[.$G$2]/([.C124]+[.$H$2]+[.$I$2])" office:value-type="float" office:value="0.000275873407316071" calcext:value-type="float">
            <text:p>0,000275873407316071</text:p>
          </table:table-cell>
          <table:table-cell table:formula="of:=ROUND([.$H$2]*[.D124];5)" office:value-type="float" office:value="2.75873" calcext:value-type="float">
            <text:p>2,7587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24]" office:value-type="float" office:value="2.75873" calcext:value-type="float">
            <text:p>2,75873</text:p>
          </table:table-cell>
          <table:table-cell office:value-type="string" calcext:value-type="string">
            <text:p>;</text:p>
          </table:table-cell>
          <table:table-cell table:formula="of:=[.B124]" office:value-type="float" office:value="82" calcext:value-type="float">
            <text:p>8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165" calcext:value-type="float">
            <text:p>1,165</text:p>
          </table:table-cell>
          <table:table-cell table:formula="of:=[.S124]*1000" office:value-type="float" office:value="1165" calcext:value-type="float">
            <text:p>1165</text:p>
          </table:table-cell>
        </table:table-row>
        <table:table-row table:style-name="ro1">
          <table:table-cell table:style-name="ce2"/>
          <table:table-cell table:style-name="Default" office:value-type="float" office:value="83" calcext:value-type="float">
            <text:p>83</text:p>
          </table:table-cell>
          <table:table-cell table:style-name="ce2" office:value-type="float" office:value="1128" calcext:value-type="float">
            <text:p>1128</text:p>
          </table:table-cell>
          <table:table-cell table:formula="of:=[.$G$2]/([.C125]+[.$H$2]+[.$I$2])" office:value-type="float" office:value="0.000276715039577836" calcext:value-type="float">
            <text:p>0,000276715039577836</text:p>
          </table:table-cell>
          <table:table-cell table:formula="of:=ROUND([.$H$2]*[.D125];5)" office:value-type="float" office:value="2.76715" calcext:value-type="float">
            <text:p>2,7671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25]" office:value-type="float" office:value="2.76715" calcext:value-type="float">
            <text:p>2,76715</text:p>
          </table:table-cell>
          <table:table-cell office:value-type="string" calcext:value-type="string">
            <text:p>;</text:p>
          </table:table-cell>
          <table:table-cell table:formula="of:=[.B125]" office:value-type="float" office:value="83" calcext:value-type="float">
            <text:p>8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.128" calcext:value-type="float">
            <text:p>1,128</text:p>
          </table:table-cell>
          <table:table-cell table:formula="of:=[.S125]*1000" office:value-type="float" office:value="1128" calcext:value-type="float">
            <text:p>1128</text:p>
          </table:table-cell>
        </table:table-row>
        <table:table-row table:style-name="ro1">
          <table:table-cell table:style-name="ce2"/>
          <table:table-cell table:style-name="Default" office:value-type="float" office:value="84" calcext:value-type="float">
            <text:p>84</text:p>
          </table:table-cell>
          <table:table-cell table:style-name="ce2" office:value-type="float" office:value="1093" calcext:value-type="float">
            <text:p>1093</text:p>
          </table:table-cell>
          <table:table-cell table:formula="of:=[.$G$2]/([.C126]+[.$H$2]+[.$I$2])" office:value-type="float" office:value="0.000277515918299843" calcext:value-type="float">
            <text:p>0,000277515918299843</text:p>
          </table:table-cell>
          <table:table-cell table:formula="of:=ROUND([.$H$2]*[.D126];5)" office:value-type="float" office:value="2.77516" calcext:value-type="float">
            <text:p>2,7751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26]" office:value-type="float" office:value="2.77516" calcext:value-type="float">
            <text:p>2,77516</text:p>
          </table:table-cell>
          <table:table-cell office:value-type="string" calcext:value-type="string">
            <text:p>;</text:p>
          </table:table-cell>
          <table:table-cell table:formula="of:=[.B126]" office:value-type="float" office:value="84" calcext:value-type="float">
            <text:p>8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.093" calcext:value-type="float">
            <text:p>1,093</text:p>
          </table:table-cell>
          <table:table-cell table:formula="of:=[.S126]*1000" office:value-type="float" office:value="1093" calcext:value-type="float">
            <text:p>1093</text:p>
          </table:table-cell>
        </table:table-row>
        <table:table-row table:style-name="ro1">
          <table:table-cell table:style-name="ce2"/>
          <table:table-cell table:style-name="Default" office:value-type="float" office:value="85" calcext:value-type="float">
            <text:p>85</text:p>
          </table:table-cell>
          <table:table-cell table:style-name="ce2" office:value-type="float" office:value="1059" calcext:value-type="float">
            <text:p>1059</text:p>
          </table:table-cell>
          <table:table-cell table:formula="of:=[.$G$2]/([.C127]+[.$H$2]+[.$I$2])" office:value-type="float" office:value="0.00027829836636537" calcext:value-type="float">
            <text:p>0,00027829836636537</text:p>
          </table:table-cell>
          <table:table-cell table:formula="of:=ROUND([.$H$2]*[.D127];5)" office:value-type="float" office:value="2.78298" calcext:value-type="float">
            <text:p>2,78298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27]" office:value-type="float" office:value="2.78298" calcext:value-type="float">
            <text:p>2,78298</text:p>
          </table:table-cell>
          <table:table-cell office:value-type="string" calcext:value-type="string">
            <text:p>;</text:p>
          </table:table-cell>
          <table:table-cell table:formula="of:=[.B127]" office:value-type="float" office:value="85" calcext:value-type="float">
            <text:p>8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.059" calcext:value-type="float">
            <text:p>1,059</text:p>
          </table:table-cell>
          <table:table-cell table:formula="of:=[.S127]*1000" office:value-type="float" office:value="1059" calcext:value-type="float">
            <text:p>1059</text:p>
          </table:table-cell>
        </table:table-row>
        <table:table-row table:style-name="ro1">
          <table:table-cell table:style-name="ce2"/>
          <table:table-cell table:style-name="Default" office:value-type="float" office:value="86" calcext:value-type="float">
            <text:p>86</text:p>
          </table:table-cell>
          <table:table-cell table:style-name="ce2" office:value-type="float" office:value="1027" calcext:value-type="float">
            <text:p>1027</text:p>
          </table:table-cell>
          <table:table-cell table:formula="of:=[.$G$2]/([.C128]+[.$H$2]+[.$I$2])" office:value-type="float" office:value="0.00027903882930074" calcext:value-type="float">
            <text:p>0,00027903882930074</text:p>
          </table:table-cell>
          <table:table-cell table:formula="of:=ROUND([.$H$2]*[.D128];5)" office:value-type="float" office:value="2.79039" calcext:value-type="float">
            <text:p>2,79039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28]" office:value-type="float" office:value="2.79039" calcext:value-type="float">
            <text:p>2,79039</text:p>
          </table:table-cell>
          <table:table-cell office:value-type="string" calcext:value-type="string">
            <text:p>;</text:p>
          </table:table-cell>
          <table:table-cell table:formula="of:=[.B128]" office:value-type="float" office:value="86" calcext:value-type="float">
            <text:p>8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027" calcext:value-type="float">
            <text:p>1,027</text:p>
          </table:table-cell>
          <table:table-cell table:formula="of:=[.S128]*1000" office:value-type="float" office:value="1027" calcext:value-type="float">
            <text:p>1027</text:p>
          </table:table-cell>
        </table:table-row>
        <table:table-row table:style-name="ro1">
          <table:table-cell table:style-name="ce2"/>
          <table:table-cell table:style-name="Default" office:value-type="float" office:value="87" calcext:value-type="float">
            <text:p>87</text:p>
          </table:table-cell>
          <table:table-cell table:style-name="ce2" office:value-type="float" office:value="995.5" calcext:value-type="float">
            <text:p>995,5</text:p>
          </table:table-cell>
          <table:table-cell table:formula="of:=[.$G$2]/([.C129]+[.$H$2]+[.$I$2])" office:value-type="float" office:value="0.000279771581009545" calcext:value-type="float">
            <text:p>0,000279771581009545</text:p>
          </table:table-cell>
          <table:table-cell table:formula="of:=ROUND([.$H$2]*[.D129];5)" office:value-type="float" office:value="2.79772" calcext:value-type="float">
            <text:p>2,7977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29]" office:value-type="float" office:value="2.79772" calcext:value-type="float">
            <text:p>2,79772</text:p>
          </table:table-cell>
          <table:table-cell office:value-type="string" calcext:value-type="string">
            <text:p>;</text:p>
          </table:table-cell>
          <table:table-cell table:formula="of:=[.B129]" office:value-type="float" office:value="87" calcext:value-type="float">
            <text:p>8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9955" calcext:value-type="float">
            <text:p>0,9955</text:p>
          </table:table-cell>
          <table:table-cell table:formula="of:=[.S129]*1000" office:value-type="float" office:value="995.5" calcext:value-type="float">
            <text:p>995,5</text:p>
          </table:table-cell>
        </table:table-row>
        <table:table-row table:style-name="ro1">
          <table:table-cell table:style-name="ce2"/>
          <table:table-cell table:style-name="Default" office:value-type="float" office:value="88" calcext:value-type="float">
            <text:p>88</text:p>
          </table:table-cell>
          <table:table-cell table:style-name="ce2" office:value-type="float" office:value="965.4" calcext:value-type="float">
            <text:p>965,4</text:p>
          </table:table-cell>
          <table:table-cell table:formula="of:=[.$G$2]/([.C130]+[.$H$2]+[.$I$2])" office:value-type="float" office:value="0.000280475370652047" calcext:value-type="float">
            <text:p>0,000280475370652047</text:p>
          </table:table-cell>
          <table:table-cell table:formula="of:=ROUND([.$H$2]*[.D130];5)" office:value-type="float" office:value="2.80475" calcext:value-type="float">
            <text:p>2,8047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30]" office:value-type="float" office:value="2.80475" calcext:value-type="float">
            <text:p>2,80475</text:p>
          </table:table-cell>
          <table:table-cell office:value-type="string" calcext:value-type="string">
            <text:p>;</text:p>
          </table:table-cell>
          <table:table-cell table:formula="of:=[.B130]" office:value-type="float" office:value="88" calcext:value-type="float">
            <text:p>8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9654" calcext:value-type="float">
            <text:p>0,9654</text:p>
          </table:table-cell>
          <table:table-cell table:formula="of:=[.S130]*1000" office:value-type="float" office:value="965.4" calcext:value-type="float">
            <text:p>965,4</text:p>
          </table:table-cell>
        </table:table-row>
        <table:table-row table:style-name="ro1">
          <table:table-cell table:style-name="ce2"/>
          <table:table-cell table:style-name="Default" office:value-type="float" office:value="89" calcext:value-type="float">
            <text:p>89</text:p>
          </table:table-cell>
          <table:table-cell table:style-name="ce2" office:value-type="float" office:value="936.3" calcext:value-type="float">
            <text:p>936,3</text:p>
          </table:table-cell>
          <table:table-cell table:formula="of:=[.$G$2]/([.C131]+[.$H$2]+[.$I$2])" office:value-type="float" office:value="0.000281159153171418" calcext:value-type="float">
            <text:p>0,000281159153171418</text:p>
          </table:table-cell>
          <table:table-cell table:formula="of:=ROUND([.$H$2]*[.D131];5)" office:value-type="float" office:value="2.81159" calcext:value-type="float">
            <text:p>2,81159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31]" office:value-type="float" office:value="2.81159" calcext:value-type="float">
            <text:p>2,81159</text:p>
          </table:table-cell>
          <table:table-cell office:value-type="string" calcext:value-type="string">
            <text:p>;</text:p>
          </table:table-cell>
          <table:table-cell table:formula="of:=[.B131]" office:value-type="float" office:value="89" calcext:value-type="float">
            <text:p>8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9363" calcext:value-type="float">
            <text:p>0,9363</text:p>
          </table:table-cell>
          <table:table-cell table:formula="of:=[.S131]*1000" office:value-type="float" office:value="936.3" calcext:value-type="float">
            <text:p>936,3</text:p>
          </table:table-cell>
        </table:table-row>
        <table:table-row table:style-name="ro1">
          <table:table-cell table:style-name="ce2"/>
          <table:table-cell table:style-name="Default" office:value-type="float" office:value="90" calcext:value-type="float">
            <text:p>90</text:p>
          </table:table-cell>
          <table:table-cell table:style-name="ce2" office:value-type="float" office:value="908.3" calcext:value-type="float">
            <text:p>908,3</text:p>
          </table:table-cell>
          <table:table-cell table:formula="of:=[.$G$2]/([.C132]+[.$H$2]+[.$I$2])" office:value-type="float" office:value="0.000281820243023773" calcext:value-type="float">
            <text:p>0,000281820243023773</text:p>
          </table:table-cell>
          <table:table-cell table:formula="of:=ROUND([.$H$2]*[.D132];5)" office:value-type="float" office:value="2.8182" calcext:value-type="float">
            <text:p>2,818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32]" office:value-type="float" office:value="2.8182" calcext:value-type="float">
            <text:p>2,8182</text:p>
          </table:table-cell>
          <table:table-cell office:value-type="string" calcext:value-type="string">
            <text:p>;</text:p>
          </table:table-cell>
          <table:table-cell table:formula="of:=[.B132]" office:value-type="float" office:value="90" calcext:value-type="float">
            <text:p>9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9083" calcext:value-type="float">
            <text:p>0,9083</text:p>
          </table:table-cell>
          <table:table-cell table:formula="of:=[.S132]*1000" office:value-type="float" office:value="908.3" calcext:value-type="float">
            <text:p>908,3</text:p>
          </table:table-cell>
        </table:table-row>
        <table:table-row table:style-name="ro1">
          <table:table-cell table:style-name="ce2"/>
          <table:table-cell table:style-name="Default" office:value-type="float" office:value="91" calcext:value-type="float">
            <text:p>91</text:p>
          </table:table-cell>
          <table:table-cell table:style-name="ce2" office:value-type="float" office:value="881.2" calcext:value-type="float">
            <text:p>881,2</text:p>
          </table:table-cell>
          <table:table-cell table:formula="of:=[.$G$2]/([.C133]+[.$H$2]+[.$I$2])" office:value-type="float" office:value="0.000282463050870282" calcext:value-type="float">
            <text:p>0,000282463050870282</text:p>
          </table:table-cell>
          <table:table-cell table:formula="of:=ROUND([.$H$2]*[.D133];5)" office:value-type="float" office:value="2.82463" calcext:value-type="float">
            <text:p>2,8246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33]" office:value-type="float" office:value="2.82463" calcext:value-type="float">
            <text:p>2,82463</text:p>
          </table:table-cell>
          <table:table-cell office:value-type="string" calcext:value-type="string">
            <text:p>;</text:p>
          </table:table-cell>
          <table:table-cell table:formula="of:=[.B133]" office:value-type="float" office:value="91" calcext:value-type="float">
            <text:p>9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8812" calcext:value-type="float">
            <text:p>0,8812</text:p>
          </table:table-cell>
          <table:table-cell table:formula="of:=[.S133]*1000" office:value-type="float" office:value="881.2" calcext:value-type="float">
            <text:p>881,2</text:p>
          </table:table-cell>
        </table:table-row>
        <table:table-row table:style-name="ro1">
          <table:table-cell table:style-name="ce2"/>
          <table:table-cell table:style-name="Default" office:value-type="float" office:value="92" calcext:value-type="float">
            <text:p>92</text:p>
          </table:table-cell>
          <table:table-cell table:style-name="ce2" office:value-type="float" office:value="855" calcext:value-type="float">
            <text:p>855</text:p>
          </table:table-cell>
          <table:table-cell table:formula="of:=[.$G$2]/([.C134]+[.$H$2]+[.$I$2])" office:value-type="float" office:value="0.000283087304934627" calcext:value-type="float">
            <text:p>0,000283087304934627</text:p>
          </table:table-cell>
          <table:table-cell table:formula="of:=ROUND([.$H$2]*[.D134];5)" office:value-type="float" office:value="2.83087" calcext:value-type="float">
            <text:p>2,8308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34]" office:value-type="float" office:value="2.83087" calcext:value-type="float">
            <text:p>2,83087</text:p>
          </table:table-cell>
          <table:table-cell office:value-type="string" calcext:value-type="string">
            <text:p>;</text:p>
          </table:table-cell>
          <table:table-cell table:formula="of:=[.B134]" office:value-type="float" office:value="92" calcext:value-type="float">
            <text:p>9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855" calcext:value-type="float">
            <text:p>0,855</text:p>
          </table:table-cell>
          <table:table-cell table:formula="of:=[.S134]*1000" office:value-type="float" office:value="855" calcext:value-type="float">
            <text:p>855</text:p>
          </table:table-cell>
        </table:table-row>
        <table:table-row table:style-name="ro1">
          <table:table-cell table:style-name="ce2"/>
          <table:table-cell table:style-name="Default" office:value-type="float" office:value="93" calcext:value-type="float">
            <text:p>93</text:p>
          </table:table-cell>
          <table:table-cell table:style-name="ce2" office:value-type="float" office:value="829.7" calcext:value-type="float">
            <text:p>829,7</text:p>
          </table:table-cell>
          <table:table-cell table:formula="of:=[.$G$2]/([.C135]+[.$H$2]+[.$I$2])" office:value-type="float" office:value="0.000283692739460849" calcext:value-type="float">
            <text:p>0,000283692739460849</text:p>
          </table:table-cell>
          <table:table-cell table:formula="of:=ROUND([.$H$2]*[.D135];5)" office:value-type="float" office:value="2.83693" calcext:value-type="float">
            <text:p>2,8369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35]" office:value-type="float" office:value="2.83693" calcext:value-type="float">
            <text:p>2,83693</text:p>
          </table:table-cell>
          <table:table-cell office:value-type="string" calcext:value-type="string">
            <text:p>;</text:p>
          </table:table-cell>
          <table:table-cell table:formula="of:=[.B135]" office:value-type="float" office:value="93" calcext:value-type="float">
            <text:p>9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8297" calcext:value-type="float">
            <text:p>0,8297</text:p>
          </table:table-cell>
          <table:table-cell table:formula="of:=[.S135]*1000" office:value-type="float" office:value="829.7" calcext:value-type="float">
            <text:p>829,7</text:p>
          </table:table-cell>
        </table:table-row>
        <table:table-row table:style-name="ro1">
          <table:table-cell table:style-name="ce2"/>
          <table:table-cell table:style-name="Default" office:value-type="float" office:value="94" calcext:value-type="float">
            <text:p>94</text:p>
          </table:table-cell>
          <table:table-cell table:style-name="ce2" office:value-type="float" office:value="805.2" calcext:value-type="float">
            <text:p>805,2</text:p>
          </table:table-cell>
          <table:table-cell table:formula="of:=[.$G$2]/([.C136]+[.$H$2]+[.$I$2])" office:value-type="float" office:value="0.000284281503066445" calcext:value-type="float">
            <text:p>0,000284281503066445</text:p>
          </table:table-cell>
          <table:table-cell table:formula="of:=ROUND([.$H$2]*[.D136];5)" office:value-type="float" office:value="2.84282" calcext:value-type="float">
            <text:p>2,84282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36]" office:value-type="float" office:value="2.84282" calcext:value-type="float">
            <text:p>2,84282</text:p>
          </table:table-cell>
          <table:table-cell office:value-type="string" calcext:value-type="string">
            <text:p>;</text:p>
          </table:table-cell>
          <table:table-cell table:formula="of:=[.B136]" office:value-type="float" office:value="94" calcext:value-type="float">
            <text:p>9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8052" calcext:value-type="float">
            <text:p>0,8052</text:p>
          </table:table-cell>
          <table:table-cell table:formula="of:=[.S136]*1000" office:value-type="float" office:value="805.2" calcext:value-type="float">
            <text:p>805,2</text:p>
          </table:table-cell>
        </table:table-row>
        <table:table-row table:style-name="ro1">
          <table:table-cell table:style-name="ce2"/>
          <table:table-cell table:style-name="Default" office:value-type="float" office:value="95" calcext:value-type="float">
            <text:p>95</text:p>
          </table:table-cell>
          <table:table-cell table:style-name="ce2" office:value-type="float" office:value="781.6" calcext:value-type="float">
            <text:p>781,6</text:p>
          </table:table-cell>
          <table:table-cell table:formula="of:=[.$G$2]/([.C137]+[.$H$2]+[.$I$2])" office:value-type="float" office:value="0.000284850954030013" calcext:value-type="float">
            <text:p>0,000284850954030013</text:p>
          </table:table-cell>
          <table:table-cell table:formula="of:=ROUND([.$H$2]*[.D137];5)" office:value-type="float" office:value="2.84851" calcext:value-type="float">
            <text:p>2,84851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37]" office:value-type="float" office:value="2.84851" calcext:value-type="float">
            <text:p>2,84851</text:p>
          </table:table-cell>
          <table:table-cell office:value-type="string" calcext:value-type="string">
            <text:p>;</text:p>
          </table:table-cell>
          <table:table-cell table:formula="of:=[.B137]" office:value-type="float" office:value="95" calcext:value-type="float">
            <text:p>9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7816" calcext:value-type="float">
            <text:p>0,7816</text:p>
          </table:table-cell>
          <table:table-cell table:formula="of:=[.S137]*1000" office:value-type="float" office:value="781.6" calcext:value-type="float">
            <text:p>781,6</text:p>
          </table:table-cell>
        </table:table-row>
        <table:table-row table:style-name="ro1">
          <table:table-cell table:style-name="ce2"/>
          <table:table-cell table:style-name="Default" office:value-type="float" office:value="96" calcext:value-type="float">
            <text:p>96</text:p>
          </table:table-cell>
          <table:table-cell table:style-name="ce2" office:value-type="float" office:value="758.7" calcext:value-type="float">
            <text:p>758,7</text:p>
          </table:table-cell>
          <table:table-cell table:formula="of:=[.$G$2]/([.C138]+[.$H$2]+[.$I$2])" office:value-type="float" office:value="0.000285405699609651" calcext:value-type="float">
            <text:p>0,000285405699609651</text:p>
          </table:table-cell>
          <table:table-cell table:formula="of:=ROUND([.$H$2]*[.D138];5)" office:value-type="float" office:value="2.85406" calcext:value-type="float">
            <text:p>2,8540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38]" office:value-type="float" office:value="2.85406" calcext:value-type="float">
            <text:p>2,85406</text:p>
          </table:table-cell>
          <table:table-cell office:value-type="string" calcext:value-type="string">
            <text:p>;</text:p>
          </table:table-cell>
          <table:table-cell table:formula="of:=[.B138]" office:value-type="float" office:value="96" calcext:value-type="float">
            <text:p>96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7587" calcext:value-type="float">
            <text:p>0,7587</text:p>
          </table:table-cell>
          <table:table-cell table:formula="of:=[.S138]*1000" office:value-type="float" office:value="758.7" calcext:value-type="float">
            <text:p>758,7</text:p>
          </table:table-cell>
        </table:table-row>
        <table:table-row table:style-name="ro1">
          <table:table-cell table:style-name="ce2"/>
          <table:table-cell table:style-name="Default" office:value-type="float" office:value="97" calcext:value-type="float">
            <text:p>97</text:p>
          </table:table-cell>
          <table:table-cell table:style-name="ce2" office:value-type="float" office:value="736.6" calcext:value-type="float">
            <text:p>736,6</text:p>
          </table:table-cell>
          <table:table-cell table:formula="of:=[.$G$2]/([.C139]+[.$H$2]+[.$I$2])" office:value-type="float" office:value="0.000285943118109163" calcext:value-type="float">
            <text:p>0,000285943118109163</text:p>
          </table:table-cell>
          <table:table-cell table:formula="of:=ROUND([.$H$2]*[.D139];5)" office:value-type="float" office:value="2.85943" calcext:value-type="float">
            <text:p>2,8594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39]" office:value-type="float" office:value="2.85943" calcext:value-type="float">
            <text:p>2,85943</text:p>
          </table:table-cell>
          <table:table-cell office:value-type="string" calcext:value-type="string">
            <text:p>;</text:p>
          </table:table-cell>
          <table:table-cell table:formula="of:=[.B139]" office:value-type="float" office:value="97" calcext:value-type="float">
            <text:p>97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7366" calcext:value-type="float">
            <text:p>0,7366</text:p>
          </table:table-cell>
          <table:table-cell table:formula="of:=[.S139]*1000" office:value-type="float" office:value="736.6" calcext:value-type="float">
            <text:p>736,6</text:p>
          </table:table-cell>
        </table:table-row>
        <table:table-row table:style-name="ro1">
          <table:table-cell table:style-name="ce2"/>
          <table:table-cell table:style-name="Default" office:value-type="float" office:value="98" calcext:value-type="float">
            <text:p>98</text:p>
          </table:table-cell>
          <table:table-cell table:style-name="ce2" office:value-type="float" office:value="715.2" calcext:value-type="float">
            <text:p>715,2</text:p>
          </table:table-cell>
          <table:table-cell table:formula="of:=[.$G$2]/([.C140]+[.$H$2]+[.$I$2])" office:value-type="float" office:value="0.00028646544659929" calcext:value-type="float">
            <text:p>0,00028646544659929</text:p>
          </table:table-cell>
          <table:table-cell table:formula="of:=ROUND([.$H$2]*[.D140];5)" office:value-type="float" office:value="2.86465" calcext:value-type="float">
            <text:p>2,8646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40]" office:value-type="float" office:value="2.86465" calcext:value-type="float">
            <text:p>2,86465</text:p>
          </table:table-cell>
          <table:table-cell office:value-type="string" calcext:value-type="string">
            <text:p>;</text:p>
          </table:table-cell>
          <table:table-cell table:formula="of:=[.B140]" office:value-type="float" office:value="98" calcext:value-type="float">
            <text:p>98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7152" calcext:value-type="float">
            <text:p>0,7152</text:p>
          </table:table-cell>
          <table:table-cell table:formula="of:=[.S140]*1000" office:value-type="float" office:value="715.2" calcext:value-type="float">
            <text:p>715,2</text:p>
          </table:table-cell>
        </table:table-row>
        <table:table-row table:style-name="ro1">
          <table:table-cell table:style-name="ce2"/>
          <table:table-cell table:style-name="Default" office:value-type="float" office:value="99" calcext:value-type="float">
            <text:p>99</text:p>
          </table:table-cell>
          <table:table-cell table:style-name="ce2" office:value-type="float" office:value="694.5" calcext:value-type="float">
            <text:p>694,5</text:p>
          </table:table-cell>
          <table:table-cell table:formula="of:=[.$G$2]/([.C141]+[.$H$2]+[.$I$2])" office:value-type="float" office:value="0.00028697250844414" calcext:value-type="float">
            <text:p>0,00028697250844414</text:p>
          </table:table-cell>
          <table:table-cell table:formula="of:=ROUND([.$H$2]*[.D141];5)" office:value-type="float" office:value="2.86973" calcext:value-type="float">
            <text:p>2,86973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41]" office:value-type="float" office:value="2.86973" calcext:value-type="float">
            <text:p>2,86973</text:p>
          </table:table-cell>
          <table:table-cell office:value-type="string" calcext:value-type="string">
            <text:p>;</text:p>
          </table:table-cell>
          <table:table-cell table:formula="of:=[.B141]" office:value-type="float" office:value="99" calcext:value-type="float">
            <text:p>99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6945" calcext:value-type="float">
            <text:p>0,6945</text:p>
          </table:table-cell>
          <table:table-cell table:formula="of:=[.S141]*1000" office:value-type="float" office:value="694.5" calcext:value-type="float">
            <text:p>694,5</text:p>
          </table:table-cell>
        </table:table-row>
        <table:table-row table:style-name="ro1">
          <table:table-cell table:style-name="ce2"/>
          <table:table-cell table:style-name="Default" office:value-type="float" office:value="100" calcext:value-type="float">
            <text:p>100</text:p>
          </table:table-cell>
          <table:table-cell table:style-name="ce2" office:value-type="float" office:value="674.4" calcext:value-type="float">
            <text:p>674,4</text:p>
          </table:table-cell>
          <table:table-cell table:formula="of:=[.$G$2]/([.C142]+[.$H$2]+[.$I$2])" office:value-type="float" office:value="0.000287466593572261" calcext:value-type="float">
            <text:p>0,000287466593572261</text:p>
          </table:table-cell>
          <table:table-cell table:formula="of:=ROUND([.$H$2]*[.D142];5)" office:value-type="float" office:value="2.87467" calcext:value-type="float">
            <text:p>2,87467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42]" office:value-type="float" office:value="2.87467" calcext:value-type="float">
            <text:p>2,87467</text:p>
          </table:table-cell>
          <table:table-cell office:value-type="string" calcext:value-type="string">
            <text:p>;</text:p>
          </table:table-cell>
          <table:table-cell table:formula="of:=[.B142]" office:value-type="float" office:value="100" calcext:value-type="float">
            <text:p>10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6744" calcext:value-type="float">
            <text:p>0,6744</text:p>
          </table:table-cell>
          <table:table-cell table:formula="of:=[.S142]*1000" office:value-type="float" office:value="674.4" calcext:value-type="float">
            <text:p>674,4</text:p>
          </table:table-cell>
        </table:table-row>
        <table:table-row table:style-name="ro1">
          <table:table-cell table:style-name="ce2"/>
          <table:table-cell table:style-name="Default" office:value-type="float" office:value="101" calcext:value-type="float">
            <text:p>101</text:p>
          </table:table-cell>
          <table:table-cell table:style-name="ce2" office:value-type="float" office:value="655.8" calcext:value-type="float">
            <text:p>655,8</text:p>
          </table:table-cell>
          <table:table-cell table:formula="of:=[.$G$2]/([.C143]+[.$H$2]+[.$I$2])" office:value-type="float" office:value="0.000287925324731035" calcext:value-type="float">
            <text:p>0,000287925324731035</text:p>
          </table:table-cell>
          <table:table-cell table:formula="of:=ROUND([.$H$2]*[.D143];5)" office:value-type="float" office:value="2.87925" calcext:value-type="float">
            <text:p>2,8792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43]" office:value-type="float" office:value="2.87925" calcext:value-type="float">
            <text:p>2,87925</text:p>
          </table:table-cell>
          <table:table-cell office:value-type="string" calcext:value-type="string">
            <text:p>;</text:p>
          </table:table-cell>
          <table:table-cell table:formula="of:=[.B143]" office:value-type="float" office:value="101" calcext:value-type="float">
            <text:p>10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6558" calcext:value-type="float">
            <text:p>0,6558</text:p>
          </table:table-cell>
          <table:table-cell table:formula="of:=[.S143]*1000" office:value-type="float" office:value="655.8" calcext:value-type="float">
            <text:p>655,8</text:p>
          </table:table-cell>
        </table:table-row>
        <table:table-row table:style-name="ro1">
          <table:table-cell table:style-name="ce2"/>
          <table:table-cell table:style-name="Default" office:value-type="float" office:value="102" calcext:value-type="float">
            <text:p>102</text:p>
          </table:table-cell>
          <table:table-cell table:style-name="ce2" office:value-type="float" office:value="637.6" calcext:value-type="float">
            <text:p>637,6</text:p>
          </table:table-cell>
          <table:table-cell table:formula="of:=[.$G$2]/([.C144]+[.$H$2]+[.$I$2])" office:value-type="float" office:value="0.000288375610091428" calcext:value-type="float">
            <text:p>0,000288375610091428</text:p>
          </table:table-cell>
          <table:table-cell table:formula="of:=ROUND([.$H$2]*[.D144];5)" office:value-type="float" office:value="2.88376" calcext:value-type="float">
            <text:p>2,8837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44]" office:value-type="float" office:value="2.88376" calcext:value-type="float">
            <text:p>2,88376</text:p>
          </table:table-cell>
          <table:table-cell office:value-type="string" calcext:value-type="string">
            <text:p>;</text:p>
          </table:table-cell>
          <table:table-cell table:formula="of:=[.B144]" office:value-type="float" office:value="102" calcext:value-type="float">
            <text:p>10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6376" calcext:value-type="float">
            <text:p>0,6376</text:p>
          </table:table-cell>
          <table:table-cell table:formula="of:=[.S144]*1000" office:value-type="float" office:value="637.6" calcext:value-type="float">
            <text:p>637,6</text:p>
          </table:table-cell>
        </table:table-row>
        <table:table-row table:style-name="ro1">
          <table:table-cell table:style-name="ce2"/>
          <table:table-cell table:style-name="Default" office:value-type="float" office:value="103" calcext:value-type="float">
            <text:p>103</text:p>
          </table:table-cell>
          <table:table-cell table:style-name="ce2" office:value-type="float" office:value="619.9" calcext:value-type="float">
            <text:p>619,9</text:p>
          </table:table-cell>
          <table:table-cell table:formula="of:=[.$G$2]/([.C145]+[.$H$2]+[.$I$2])" office:value-type="float" office:value="0.000288814877924939" calcext:value-type="float">
            <text:p>0,000288814877924939</text:p>
          </table:table-cell>
          <table:table-cell table:formula="of:=ROUND([.$H$2]*[.D145];5)" office:value-type="float" office:value="2.88815" calcext:value-type="float">
            <text:p>2,8881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45]" office:value-type="float" office:value="2.88815" calcext:value-type="float">
            <text:p>2,88815</text:p>
          </table:table-cell>
          <table:table-cell office:value-type="string" calcext:value-type="string">
            <text:p>;</text:p>
          </table:table-cell>
          <table:table-cell table:formula="of:=[.B145]" office:value-type="float" office:value="103" calcext:value-type="float">
            <text:p>10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6199" calcext:value-type="float">
            <text:p>0,6199</text:p>
          </table:table-cell>
          <table:table-cell table:formula="of:=[.S145]*1000" office:value-type="float" office:value="619.9" calcext:value-type="float">
            <text:p>619,9</text:p>
          </table:table-cell>
        </table:table-row>
        <table:table-row table:style-name="ro1">
          <table:table-cell table:style-name="ce2"/>
          <table:table-cell table:style-name="Default" office:value-type="float" office:value="104" calcext:value-type="float">
            <text:p>104</text:p>
          </table:table-cell>
          <table:table-cell table:style-name="ce2" office:value-type="float" office:value="602.6" calcext:value-type="float">
            <text:p>602,6</text:p>
          </table:table-cell>
          <table:table-cell table:formula="of:=[.$G$2]/([.C146]+[.$H$2]+[.$I$2])" office:value-type="float" office:value="0.000289245513936531" calcext:value-type="float">
            <text:p>0,000289245513936531</text:p>
          </table:table-cell>
          <table:table-cell table:formula="of:=ROUND([.$H$2]*[.D146];5)" office:value-type="float" office:value="2.89246" calcext:value-type="float">
            <text:p>2,89246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46]" office:value-type="float" office:value="2.89246" calcext:value-type="float">
            <text:p>2,89246</text:p>
          </table:table-cell>
          <table:table-cell office:value-type="string" calcext:value-type="string">
            <text:p>;</text:p>
          </table:table-cell>
          <table:table-cell table:formula="of:=[.B146]" office:value-type="float" office:value="104" calcext:value-type="float">
            <text:p>104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6026" calcext:value-type="float">
            <text:p>0,6026</text:p>
          </table:table-cell>
          <table:table-cell table:formula="of:=[.S146]*1000" office:value-type="float" office:value="602.6" calcext:value-type="float">
            <text:p>602,6</text:p>
          </table:table-cell>
        </table:table-row>
        <table:table-row table:style-name="ro1">
          <table:table-cell table:style-name="ce2"/>
          <table:table-cell table:style-name="Default" office:value-type="float" office:value="105" calcext:value-type="float">
            <text:p>105</text:p>
          </table:table-cell>
          <table:table-cell table:style-name="ce2" office:value-type="float" office:value="585.8" calcext:value-type="float">
            <text:p>585,8</text:p>
          </table:table-cell>
          <table:table-cell table:formula="of:=[.$G$2]/([.C147]+[.$H$2]+[.$I$2])" office:value-type="float" office:value="0.000289664934661396" calcext:value-type="float">
            <text:p>0,000289664934661396</text:p>
          </table:table-cell>
          <table:table-cell table:formula="of:=ROUND([.$H$2]*[.D147];5)" office:value-type="float" office:value="2.89665" calcext:value-type="float">
            <text:p>2,89665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formula="of:=[.E147]" office:value-type="float" office:value="2.89665" calcext:value-type="float">
            <text:p>2,89665</text:p>
          </table:table-cell>
          <table:table-cell office:value-type="string" calcext:value-type="string">
            <text:p>;</text:p>
          </table:table-cell>
          <table:table-cell table:formula="of:=[.B147]" office:value-type="float" office:value="105" calcext:value-type="float">
            <text:p>105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5858" calcext:value-type="float">
            <text:p>0,5858</text:p>
          </table:table-cell>
          <table:table-cell table:formula="of:=[.S147]*1000" office:value-type="float" office:value="585.8" calcext:value-type="float">
            <text:p>585,8</text:p>
          </table:table-cell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0.5694" calcext:value-type="float">
            <text:p>0,5694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07" calcext:value-type="float">
            <text:p>107</text:p>
          </table:table-cell>
          <table:table-cell office:value-type="float" office:value="0.5535" calcext:value-type="float">
            <text:p>0,553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08" calcext:value-type="float">
            <text:p>108</text:p>
          </table:table-cell>
          <table:table-cell office:value-type="float" office:value="0.538" calcext:value-type="float">
            <text:p>0,538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09" calcext:value-type="float">
            <text:p>109</text:p>
          </table:table-cell>
          <table:table-cell office:value-type="float" office:value="0.5229" calcext:value-type="float">
            <text:p>0,522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10" calcext:value-type="float">
            <text:p>110</text:p>
          </table:table-cell>
          <table:table-cell office:value-type="float" office:value="0.5083" calcext:value-type="float">
            <text:p>0,508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11" calcext:value-type="float">
            <text:p>111</text:p>
          </table:table-cell>
          <table:table-cell office:value-type="float" office:value="0.4941" calcext:value-type="float">
            <text:p>0,4941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12" calcext:value-type="float">
            <text:p>112</text:p>
          </table:table-cell>
          <table:table-cell office:value-type="float" office:value="0.4803" calcext:value-type="float">
            <text:p>0,480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13" calcext:value-type="float">
            <text:p>113</text:p>
          </table:table-cell>
          <table:table-cell office:value-type="float" office:value="0.4669" calcext:value-type="float">
            <text:p>0,466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14" calcext:value-type="float">
            <text:p>114</text:p>
          </table:table-cell>
          <table:table-cell office:value-type="float" office:value="0.4539" calcext:value-type="float">
            <text:p>0,453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15" calcext:value-type="float">
            <text:p>115</text:p>
          </table:table-cell>
          <table:table-cell office:value-type="float" office:value="0.4412" calcext:value-type="float">
            <text:p>0,4412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16" calcext:value-type="float">
            <text:p>116</text:p>
          </table:table-cell>
          <table:table-cell office:value-type="float" office:value="0.429" calcext:value-type="float">
            <text:p>0,42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17" calcext:value-type="float">
            <text:p>117</text:p>
          </table:table-cell>
          <table:table-cell office:value-type="float" office:value="0.4171" calcext:value-type="float">
            <text:p>0,4171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18" calcext:value-type="float">
            <text:p>118</text:p>
          </table:table-cell>
          <table:table-cell office:value-type="float" office:value="0.4055" calcext:value-type="float">
            <text:p>0,405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19" calcext:value-type="float">
            <text:p>119</text:p>
          </table:table-cell>
          <table:table-cell office:value-type="float" office:value="0.3944" calcext:value-type="float">
            <text:p>0,3944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20" calcext:value-type="float">
            <text:p>120</text:p>
          </table:table-cell>
          <table:table-cell office:value-type="float" office:value="0.3835" calcext:value-type="float">
            <text:p>0,383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21" calcext:value-type="float">
            <text:p>121</text:p>
          </table:table-cell>
          <table:table-cell office:value-type="float" office:value="0.373" calcext:value-type="float">
            <text:p>0,37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22" calcext:value-type="float">
            <text:p>122</text:p>
          </table:table-cell>
          <table:table-cell office:value-type="float" office:value="0.3628" calcext:value-type="float">
            <text:p>0,3628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23" calcext:value-type="float">
            <text:p>123</text:p>
          </table:table-cell>
          <table:table-cell office:value-type="float" office:value="0.353" calcext:value-type="float">
            <text:p>0,35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24" calcext:value-type="float">
            <text:p>124</text:p>
          </table:table-cell>
          <table:table-cell office:value-type="float" office:value="0.3434" calcext:value-type="float">
            <text:p>0,3434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25" calcext:value-type="float">
            <text:p>125</text:p>
          </table:table-cell>
          <table:table-cell office:value-type="float" office:value="0.3341" calcext:value-type="float">
            <text:p>0,3341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26" calcext:value-type="float">
            <text:p>126</text:p>
          </table:table-cell>
          <table:table-cell office:value-type="float" office:value="0.3253" calcext:value-type="float">
            <text:p>0,325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27" calcext:value-type="float">
            <text:p>127</text:p>
          </table:table-cell>
          <table:table-cell office:value-type="float" office:value="0.3167" calcext:value-type="float">
            <text:p>0,3167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28" calcext:value-type="float">
            <text:p>128</text:p>
          </table:table-cell>
          <table:table-cell office:value-type="float" office:value="0.3083" calcext:value-type="float">
            <text:p>0,308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29" calcext:value-type="float">
            <text:p>129</text:p>
          </table:table-cell>
          <table:table-cell office:value-type="float" office:value="0.3002" calcext:value-type="float">
            <text:p>0,3002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30" calcext:value-type="float">
            <text:p>130</text:p>
          </table:table-cell>
          <table:table-cell office:value-type="float" office:value="0.2924" calcext:value-type="float">
            <text:p>0,2924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31" calcext:value-type="float">
            <text:p>131</text:p>
          </table:table-cell>
          <table:table-cell office:value-type="float" office:value="0.2848" calcext:value-type="float">
            <text:p>0,2848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32" calcext:value-type="float">
            <text:p>132</text:p>
          </table:table-cell>
          <table:table-cell office:value-type="float" office:value="0.2774" calcext:value-type="float">
            <text:p>0,2774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33" calcext:value-type="float">
            <text:p>133</text:p>
          </table:table-cell>
          <table:table-cell office:value-type="float" office:value="0.2702" calcext:value-type="float">
            <text:p>0,2702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34" calcext:value-type="float">
            <text:p>134</text:p>
          </table:table-cell>
          <table:table-cell office:value-type="float" office:value="0.2633" calcext:value-type="float">
            <text:p>0,263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35" calcext:value-type="float">
            <text:p>135</text:p>
          </table:table-cell>
          <table:table-cell office:value-type="float" office:value="0.2565" calcext:value-type="float">
            <text:p>0,256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36" calcext:value-type="float">
            <text:p>136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37" calcext:value-type="float">
            <text:p>137</text:p>
          </table:table-cell>
          <table:table-cell office:value-type="float" office:value="0.2437" calcext:value-type="float">
            <text:p>0,2437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38" calcext:value-type="float">
            <text:p>138</text:p>
          </table:table-cell>
          <table:table-cell office:value-type="float" office:value="0.2375" calcext:value-type="float">
            <text:p>0,237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39" calcext:value-type="float">
            <text:p>139</text:p>
          </table:table-cell>
          <table:table-cell office:value-type="float" office:value="0.2316" calcext:value-type="float">
            <text:p>0,2316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40" calcext:value-type="float">
            <text:p>140</text:p>
          </table:table-cell>
          <table:table-cell office:value-type="float" office:value="0.2258" calcext:value-type="float">
            <text:p>0,2258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41" calcext:value-type="float">
            <text:p>141</text:p>
          </table:table-cell>
          <table:table-cell office:value-type="float" office:value="0.2202" calcext:value-type="float">
            <text:p>0,2202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42" calcext:value-type="float">
            <text:p>142</text:p>
          </table:table-cell>
          <table:table-cell office:value-type="float" office:value="0.2148" calcext:value-type="float">
            <text:p>0,2148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43" calcext:value-type="float">
            <text:p>143</text:p>
          </table:table-cell>
          <table:table-cell office:value-type="float" office:value="0.2095" calcext:value-type="float">
            <text:p>0,209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44" calcext:value-type="float">
            <text:p>144</text:p>
          </table:table-cell>
          <table:table-cell office:value-type="float" office:value="0.2044" calcext:value-type="float">
            <text:p>0,2044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45" calcext:value-type="float">
            <text:p>145</text:p>
          </table:table-cell>
          <table:table-cell office:value-type="float" office:value="0.1994" calcext:value-type="float">
            <text:p>0,1994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46" calcext:value-type="float">
            <text:p>146</text:p>
          </table:table-cell>
          <table:table-cell office:value-type="float" office:value="0.1946" calcext:value-type="float">
            <text:p>0,1946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47" calcext:value-type="float">
            <text:p>147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48" calcext:value-type="float">
            <text:p>148</text:p>
          </table:table-cell>
          <table:table-cell office:value-type="float" office:value="0.1855" calcext:value-type="float">
            <text:p>0,185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49" calcext:value-type="float">
            <text:p>149</text:p>
          </table:table-cell>
          <table:table-cell office:value-type="float" office:value="0.1811" calcext:value-type="float">
            <text:p>0,1811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50" calcext:value-type="float">
            <text:p>150</text:p>
          </table:table-cell>
          <table:table-cell office:value-type="float" office:value="0.1769" calcext:value-type="float">
            <text:p>0,176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51" calcext:value-type="float">
            <text:p>151</text:p>
          </table:table-cell>
          <table:table-cell office:value-type="float" office:value="0.1728" calcext:value-type="float">
            <text:p>0,1728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52" calcext:value-type="float">
            <text:p>152</text:p>
          </table:table-cell>
          <table:table-cell office:value-type="float" office:value="0.1688" calcext:value-type="float">
            <text:p>0,1688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53" calcext:value-type="float">
            <text:p>153</text:p>
          </table:table-cell>
          <table:table-cell office:value-type="float" office:value="0.165" calcext:value-type="float">
            <text:p>0,16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54" calcext:value-type="float">
            <text:p>154</text:p>
          </table:table-cell>
          <table:table-cell office:value-type="float" office:value="0.1612" calcext:value-type="float">
            <text:p>0,1612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55" calcext:value-type="float">
            <text:p>155</text:p>
          </table:table-cell>
          <table:table-cell office:value-type="float" office:value="0.1576" calcext:value-type="float">
            <text:p>0,1576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56" calcext:value-type="float">
            <text:p>156</text:p>
          </table:table-cell>
          <table:table-cell office:value-type="float" office:value="0.1541" calcext:value-type="float">
            <text:p>0,1541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57" calcext:value-type="float">
            <text:p>157</text:p>
          </table:table-cell>
          <table:table-cell office:value-type="float" office:value="0.1507" calcext:value-type="float">
            <text:p>0,1507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58" calcext:value-type="float">
            <text:p>158</text:p>
          </table:table-cell>
          <table:table-cell office:value-type="float" office:value="0.1474" calcext:value-type="float">
            <text:p>0,1474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59" calcext:value-type="float">
            <text:p>159</text:p>
          </table:table-cell>
          <table:table-cell office:value-type="float" office:value="0.1441" calcext:value-type="float">
            <text:p>0,1441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60" calcext:value-type="float">
            <text:p>160</text:p>
          </table:table-cell>
          <table:table-cell office:value-type="float" office:value="0.141" calcext:value-type="float">
            <text:p>0,141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61" calcext:value-type="float">
            <text:p>161</text:p>
          </table:table-cell>
          <table:table-cell office:value-type="float" office:value="0.1379" calcext:value-type="float">
            <text:p>0,137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62" calcext:value-type="float">
            <text:p>162</text:p>
          </table:table-cell>
          <table:table-cell office:value-type="float" office:value="0.135" calcext:value-type="float">
            <text:p>0,13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63" calcext:value-type="float">
            <text:p>163</text:p>
          </table:table-cell>
          <table:table-cell office:value-type="float" office:value="0.1321" calcext:value-type="float">
            <text:p>0,1321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64" calcext:value-type="float">
            <text:p>164</text:p>
          </table:table-cell>
          <table:table-cell office:value-type="float" office:value="0.1293" calcext:value-type="float">
            <text:p>0,129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65" calcext:value-type="float">
            <text:p>165</text:p>
          </table:table-cell>
          <table:table-cell office:value-type="float" office:value="0.1265" calcext:value-type="float">
            <text:p>0,126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66" calcext:value-type="float">
            <text:p>166</text:p>
          </table:table-cell>
          <table:table-cell office:value-type="float" office:value="0.1239" calcext:value-type="float">
            <text:p>0,123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67" calcext:value-type="float">
            <text:p>167</text:p>
          </table:table-cell>
          <table:table-cell office:value-type="float" office:value="0.1213" calcext:value-type="float">
            <text:p>0,121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68" calcext:value-type="float">
            <text:p>168</text:p>
          </table:table-cell>
          <table:table-cell office:value-type="float" office:value="0.1187" calcext:value-type="float">
            <text:p>0,1187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69" calcext:value-type="float">
            <text:p>169</text:p>
          </table:table-cell>
          <table:table-cell office:value-type="float" office:value="0.1163" calcext:value-type="float">
            <text:p>0,116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70" calcext:value-type="float">
            <text:p>170</text:p>
          </table:table-cell>
          <table:table-cell office:value-type="float" office:value="0.1139" calcext:value-type="float">
            <text:p>0,113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71" calcext:value-type="float">
            <text:p>171</text:p>
          </table:table-cell>
          <table:table-cell office:value-type="float" office:value="0.1115" calcext:value-type="float">
            <text:p>0,111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72" calcext:value-type="float">
            <text:p>172</text:p>
          </table:table-cell>
          <table:table-cell office:value-type="float" office:value="0.1092" calcext:value-type="float">
            <text:p>0,1092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73" calcext:value-type="float">
            <text:p>173</text:p>
          </table:table-cell>
          <table:table-cell office:value-type="float" office:value="0.107" calcext:value-type="float">
            <text:p>0,107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74" calcext:value-type="float">
            <text:p>174</text:p>
          </table:table-cell>
          <table:table-cell office:value-type="float" office:value="0.1048" calcext:value-type="float">
            <text:p>0,1048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75" calcext:value-type="float">
            <text:p>175</text:p>
          </table:table-cell>
          <table:table-cell office:value-type="float" office:value="0.1027" calcext:value-type="float">
            <text:p>0,1027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76" calcext:value-type="float">
            <text:p>176</text:p>
          </table:table-cell>
          <table:table-cell office:value-type="float" office:value="0.1006" calcext:value-type="float">
            <text:p>0,1006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77" calcext:value-type="float">
            <text:p>177</text:p>
          </table:table-cell>
          <table:table-cell office:value-type="float" office:value="0.0986" calcext:value-type="float">
            <text:p>0,0986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78" calcext:value-type="float">
            <text:p>178</text:p>
          </table:table-cell>
          <table:table-cell office:value-type="float" office:value="0.0966" calcext:value-type="float">
            <text:p>0,0966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79" calcext:value-type="float">
            <text:p>179</text:p>
          </table:table-cell>
          <table:table-cell office:value-type="float" office:value="0.0947" calcext:value-type="float">
            <text:p>0,0947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80" calcext:value-type="float">
            <text:p>180</text:p>
          </table:table-cell>
          <table:table-cell office:value-type="float" office:value="0.0928" calcext:value-type="float">
            <text:p>0,0928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81" calcext:value-type="float">
            <text:p>181</text:p>
          </table:table-cell>
          <table:table-cell office:value-type="float" office:value="0.0909" calcext:value-type="float">
            <text:p>0,090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82" calcext:value-type="float">
            <text:p>182</text:p>
          </table:table-cell>
          <table:table-cell office:value-type="float" office:value="0.0891" calcext:value-type="float">
            <text:p>0,0891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83" calcext:value-type="float">
            <text:p>183</text:p>
          </table:table-cell>
          <table:table-cell office:value-type="float" office:value="0.0873" calcext:value-type="float">
            <text:p>0,087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84" calcext:value-type="float">
            <text:p>184</text:p>
          </table:table-cell>
          <table:table-cell office:value-type="float" office:value="0.0856" calcext:value-type="float">
            <text:p>0,0856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85" calcext:value-type="float">
            <text:p>185</text:p>
          </table:table-cell>
          <table:table-cell office:value-type="float" office:value="0.0839" calcext:value-type="float">
            <text:p>0,083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86" calcext:value-type="float">
            <text:p>186</text:p>
          </table:table-cell>
          <table:table-cell office:value-type="float" office:value="0.0822" calcext:value-type="float">
            <text:p>0,0822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87" calcext:value-type="float">
            <text:p>187</text:p>
          </table:table-cell>
          <table:table-cell office:value-type="float" office:value="0.0806" calcext:value-type="float">
            <text:p>0,0806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88" calcext:value-type="float">
            <text:p>188</text:p>
          </table:table-cell>
          <table:table-cell office:value-type="float" office:value="0.079" calcext:value-type="float">
            <text:p>0,07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89" calcext:value-type="float">
            <text:p>189</text:p>
          </table:table-cell>
          <table:table-cell office:value-type="float" office:value="0.0774" calcext:value-type="float">
            <text:p>0,0774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90" calcext:value-type="float">
            <text:p>190</text:p>
          </table:table-cell>
          <table:table-cell office:value-type="float" office:value="0.0759" calcext:value-type="float">
            <text:p>0,075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91" calcext:value-type="float">
            <text:p>191</text:p>
          </table:table-cell>
          <table:table-cell office:value-type="float" office:value="0.0743" calcext:value-type="float">
            <text:p>0,0743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92" calcext:value-type="float">
            <text:p>192</text:p>
          </table:table-cell>
          <table:table-cell office:value-type="float" office:value="0.0729" calcext:value-type="float">
            <text:p>0,0729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93" calcext:value-type="float">
            <text:p>193</text:p>
          </table:table-cell>
          <table:table-cell office:value-type="float" office:value="0.0714" calcext:value-type="float">
            <text:p>0,0714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94" calcext:value-type="float">
            <text:p>194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95" calcext:value-type="float">
            <text:p>195</text:p>
          </table:table-cell>
          <table:table-cell office:value-type="float" office:value="0.0686" calcext:value-type="float">
            <text:p>0,0686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96" calcext:value-type="float">
            <text:p>196</text:p>
          </table:table-cell>
          <table:table-cell office:value-type="float" office:value="0.0672" calcext:value-type="float">
            <text:p>0,0672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97" calcext:value-type="float">
            <text:p>197</text:p>
          </table:table-cell>
          <table:table-cell office:value-type="float" office:value="0.0658" calcext:value-type="float">
            <text:p>0,0658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98" calcext:value-type="float">
            <text:p>198</text:p>
          </table:table-cell>
          <table:table-cell office:value-type="float" office:value="0.0645" calcext:value-type="float">
            <text:p>0,0645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199" calcext:value-type="float">
            <text:p>199</text:p>
          </table:table-cell>
          <table:table-cell office:value-type="float" office:value="0.0631" calcext:value-type="float">
            <text:p>0,0631</text:p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14"/>
          <table:table-cell office:value-type="float" office:value="200" calcext:value-type="float">
            <text:p>200</text:p>
          </table:table-cell>
          <table:table-cell office:value-type="float" office:value="0.0619" calcext:value-type="float">
            <text:p>0,0619</text:p>
          </table:table-cell>
          <table:table-cell/>
        </table:table-row>
        <table:table-row table:style-name="ro1" table:number-rows-repeated="21">
          <table:table-cell table:style-name="ce2" table:number-columns-repeated="3"/>
          <table:table-cell table:number-columns-repeated="17"/>
        </table:table-row>
        <table:table-row table:style-name="ro1" table:number-rows-repeated="104831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euille3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(0.13441 </text:p>
          </table:table-cell>
          <table:table-cell office:value-type="string" calcext:value-type="string">
            <text:p>,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38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4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4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5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6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6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7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773</text:p>
          </table:table-cell>
          <table:table-cell office:value-type="string" calcext:value-type="string">
            <text:p>,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8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9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199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0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1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2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31</text:p>
          </table:table-cell>
          <table:table-cell office:value-type="string" calcext:value-type="string">
            <text:p>,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3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4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5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58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6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7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8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89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9714</text:p>
          </table:table-cell>
          <table:table-cell office:value-type="string" calcext:value-type="string">
            <text:p>,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30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31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32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330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3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348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35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36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37718</text:p>
          </table:table-cell>
          <table:table-cell office:value-type="string" calcext:value-type="string">
            <text:p>,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38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39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40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41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42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438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449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460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47225</text:p>
          </table:table-cell>
          <table:table-cell office:value-type="string" calcext:value-type="string">
            <text:p>,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48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49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50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5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5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54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55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569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58292</text:p>
          </table:table-cell>
          <table:table-cell office:value-type="string" calcext:value-type="string">
            <text:p>,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59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609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62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63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65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66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679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6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70906</text:p>
          </table:table-cell>
          <table:table-cell office:value-type="string" calcext:value-type="string">
            <text:p>,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72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7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75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769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78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80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81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83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8496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86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88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899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91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93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9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9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98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00279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020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03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05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07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09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110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128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14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16573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18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20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22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240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259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27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29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31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33508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35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37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39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41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430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449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468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48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50709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5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5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56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58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60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62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6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659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678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69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71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73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75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77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789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80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82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84432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86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880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89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91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93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95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968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1.98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00312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020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03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05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070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08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10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119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13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15214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16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18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199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21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230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24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260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27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28987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30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318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33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34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36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388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40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415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4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44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45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46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479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49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50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51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52881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540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55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56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57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58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59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608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619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63006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640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650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66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67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6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69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00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1983</text:p>
          </table:table-cell>
          <table:table-cell office:value-type="string" calcext:value-type="string">
            <text:p>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29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4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5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6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8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90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79895</text:p>
          </table:table-cell>
          <table:table-cell office:value-type="string" calcext:value-type="string">
            <text:p>,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0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1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2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30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38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4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5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6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6834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7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8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89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89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0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09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1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2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2898</text:p>
          </table:table-cell>
          <table:table-cell office:value-type="string" calcext:value-type="string">
            <text:p>,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3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4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4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5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59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6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70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7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8184</text:p>
          </table:table-cell>
          <table:table-cell office:value-type="string" calcext:value-type="string">
            <text:p>,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8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9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2.99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0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0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1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1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2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2784</text:p>
          </table:table-cell>
          <table:table-cell office:value-type="string" calcext:value-type="string">
            <text:p>,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3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3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4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50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5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59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6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6782</text:p>
          </table:table-cell>
          <table:table-cell office:value-type="string" calcext:value-type="string">
            <text:p>,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7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5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7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6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79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6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8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7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8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7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9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8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9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8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098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9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10257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10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.55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109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1.11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1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1.6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11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2.22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119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2.77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12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3.3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12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3.8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129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4.44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3.13276</text:p>
          </table:table-cell>
          <table:table-cell office:value-type="string" calcext:value-type="string">
            <text:p>,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00-00-00</text:date>, <text:time style:data-style-name="N2" text:time-value="07:42:06.7322113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1T09:44:07.638288132</meta:creation-date>
    <dc:date>2026-06-22T08:08:10.064101197</dc:date>
    <meta:editing-duration>PT9H47M16S</meta:editing-duration>
    <meta:editing-cycles>9</meta:editing-cycles>
    <meta:generator>LibreOffice/24.2.7.2$Linux_X86_64 LibreOffice_project/420$Build-2</meta:generator>
    <meta:document-statistic meta:table-count="4" meta:cell-count="5610" meta:object-count="0"/>
  </office:meta>
</office:document-meta>
</file>